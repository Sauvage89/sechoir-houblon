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A00000356EFECBA0E.png" manifest:media-type="image/png"/>
  <manifest:file-entry manifest:full-path="Pictures/1000000000000683000002E9481009D0.png" manifest:media-type="image/png"/>
  <manifest:file-entry manifest:full-path="Pictures/10000000000003F6000002D99E63D3C3.png" manifest:media-type="image/png"/>
  <manifest:file-entry manifest:full-path="Pictures/10000000000006DA0000031B031F7B74.png" manifest:media-type="image/png"/>
  <manifest:file-entry manifest:full-path="Pictures/10000000000006BA000002DA5F23AAF7.png" manifest:media-type="image/png"/>
  <manifest:file-entry manifest:full-path="Pictures/100000000000060B000002F10462C7B1.png" manifest:media-type="image/png"/>
  <manifest:file-entry manifest:full-path="Pictures/10000000000006CF0000032E52F48D7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002cm" fo:margin-top="0cm" fo:margin-bottom="0cm" table:align="center" style:writing-mode="page"/>
    </style:style>
    <style:style style:name="Tableau1.A" style:family="table-column">
      <style:table-column-properties style:column-width="11.896cm"/>
    </style:style>
    <style:style style:name="Tableau1.B" style:family="table-column">
      <style:table-column-properties style:column-width="5.106cm"/>
    </style:style>
    <style:style style:name="Tableau1.1" style:family="table-row">
      <style:table-row-properties fo:keep-together="auto"/>
    </style:style>
    <style:style style:name="Tableau1.A1" style:family="table-cell">
      <style:table-cell-properties fo:background-color="transparent" fo:padding-left="0.123cm" fo:padding-right="0.123cm" fo:padding-top="0cm" fo:padding-bottom="0cm" fo:border="0.5pt solid #000000">
        <style:background-image/>
      </style:table-cell-properties>
    </style:style>
    <style:style style:name="Tableau2" style:family="table">
      <style:table-properties style:width="17.002cm" fo:margin-top="0cm" fo:margin-bottom="0cm" table:align="center" style:writing-mode="page"/>
    </style:style>
    <style:style style:name="Tableau2.A" style:family="table-column">
      <style:table-column-properties style:column-width="4.133cm"/>
    </style:style>
    <style:style style:name="Tableau2.B" style:family="table-column">
      <style:table-column-properties style:column-width="12.869cm"/>
    </style:style>
    <style:style style:name="Tableau2.1" style:family="table-row">
      <style:table-row-properties fo:keep-together="auto"/>
    </style:style>
    <style:style style:name="Tableau2.A1" style:family="table-cell">
      <style:table-cell-properties fo:background-color="transparent" fo:padding-left="0.123cm" fo:padding-right="0.123cm" fo:padding-top="0cm" fo:padding-bottom="0cm" fo:border="0.5pt solid #000000">
        <style:background-image/>
      </style:table-cell-properties>
    </style:style>
    <style:style style:name="Tableau3" style:family="table">
      <style:table-properties style:width="15.439cm" table:align="left"/>
    </style:style>
    <style:style style:name="Tableau3.A" style:family="table-column">
      <style:table-column-properties style:column-width="5.711cm"/>
    </style:style>
    <style:style style:name="Tableau3.B" style:family="table-column">
      <style:table-column-properties style:column-width="4.909cm"/>
    </style:style>
    <style:style style:name="Tableau3.C" style:family="table-column">
      <style:table-column-properties style:column-width="2.884cm"/>
    </style:style>
    <style:style style:name="Tableau3.D" style:family="table-column">
      <style:table-column-properties style:column-width="1.935cm"/>
    </style:style>
    <style:style style:name="Tableau3.A1" style:family="table-cell">
      <style:table-cell-properties style:vertical-align="middle" fo:padding="0.049cm" fo:border="none"/>
    </style:style>
    <style:style style:name="P1"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0e3876"/>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officeooo:paragraph-rsid="000e3876"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officeooo:paragraph-rsid="000e3876" style:font-size-asian="3pt" style:font-weight-asian="bold"/>
    </style:style>
    <style:style style:name="P4" style:family="paragraph" style:parent-style-name="Standard">
      <style:paragraph-properties fo:text-align="center" style:justify-single-word="false"/>
      <style:text-properties fo:font-size="8pt" fo:font-weight="bold" officeooo:paragraph-rsid="000e3876" style:font-size-asian="8pt" style:font-weight-asian="bold"/>
    </style:style>
    <style:style style:name="P5" style:family="paragraph" style:parent-style-name="Standard">
      <style:paragraph-properties fo:margin-top="0.106cm" fo:margin-bottom="0.106cm" style:contextual-spacing="false"/>
      <style:text-properties officeooo:paragraph-rsid="000e3876"/>
    </style:style>
    <style:style style:name="P6" style:family="paragraph" style:parent-style-name="Standard">
      <style:paragraph-properties fo:margin-top="0.106cm" fo:margin-bottom="0.106cm" style:contextual-spacing="false" fo:text-align="center" style:justify-single-word="false"/>
      <style:text-properties officeooo:paragraph-rsid="000e3876"/>
    </style:style>
    <style:style style:name="P7" style:family="paragraph" style:parent-style-name="texte1">
      <style:paragraph-properties fo:margin-top="0cm" fo:margin-bottom="0cm" style:contextual-spacing="false"/>
      <style:text-properties style:font-name="Calibri" officeooo:paragraph-rsid="000e3876"/>
    </style:style>
    <style:style style:name="P8" style:family="paragraph" style:parent-style-name="Standard">
      <style:paragraph-properties fo:margin-top="0.106cm" fo:margin-bottom="0.106cm" style:contextual-spacing="false"/>
      <style:text-properties fo:font-style="italic" officeooo:paragraph-rsid="000e3876" style:font-style-asian="italic"/>
    </style:style>
    <style:style style:name="P9" style:family="paragraph" style:parent-style-name="Standard">
      <style:text-properties officeooo:paragraph-rsid="000e3876"/>
    </style:style>
    <style:style style:name="P10" style:family="paragraph" style:parent-style-name="texte1">
      <style:text-properties style:font-name="Calibri" officeooo:paragraph-rsid="000e3876"/>
    </style:style>
    <style:style style:name="P11" style:family="paragraph" style:parent-style-name="Heading_20_1">
      <style:text-properties officeooo:paragraph-rsid="002c463e"/>
    </style:style>
    <style:style style:name="P12" style:family="paragraph" style:parent-style-name="Heading_20_1">
      <style:text-properties officeooo:rsid="002c463e" officeooo:paragraph-rsid="002c463e"/>
    </style:style>
    <style:style style:name="P13" style:family="paragraph" style:parent-style-name="Standard">
      <style:text-properties officeooo:rsid="002c463e" officeooo:paragraph-rsid="002c463e"/>
    </style:style>
    <style:style style:name="P14" style:family="paragraph" style:parent-style-name="Heading_20_2">
      <style:paragraph-properties fo:margin-top="0.051cm" fo:margin-bottom="0cm" style:contextual-spacing="false"/>
    </style:style>
    <style:style style:name="P15" style:family="paragraph" style:parent-style-name="Text_20_body">
      <style:text-properties officeooo:rsid="001cff0b"/>
    </style:style>
    <style:style style:name="P16" style:family="paragraph" style:parent-style-name="Standard">
      <style:text-properties officeooo:rsid="001cff0b" officeooo:paragraph-rsid="001cff0b"/>
    </style:style>
    <style:style style:name="P17" style:family="paragraph" style:parent-style-name="Standard">
      <style:text-properties officeooo:paragraph-rsid="001cff0b"/>
    </style:style>
    <style:style style:name="P18" style:family="paragraph" style:parent-style-name="Heading_20_2">
      <style:paragraph-properties fo:margin-top="0.101cm" fo:margin-bottom="0.101cm" style:contextual-spacing="false"/>
    </style:style>
    <style:style style:name="P19" style:family="paragraph" style:parent-style-name="Text_20_body">
      <style:paragraph-properties fo:margin-top="0cm" fo:margin-bottom="0cm" style:contextual-spacing="false"/>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text-properties officeooo:paragraph-rsid="00552536"/>
    </style:style>
    <style:style style:name="P23" style:family="paragraph" style:parent-style-name="Text_20_body" style:list-style-name="L2">
      <style:paragraph-properties fo:margin-top="0cm" fo:margin-bottom="0cm" style:contextual-spacing="false"/>
      <style:text-properties officeooo:paragraph-rsid="00555807"/>
    </style:style>
    <style:style style:name="P24" style:family="paragraph" style:parent-style-name="Text_20_body" style:list-style-name="L2">
      <style:text-properties officeooo:paragraph-rsid="0072cda5"/>
    </style:style>
    <style:style style:name="P25" style:family="paragraph" style:parent-style-name="Heading_20_1">
      <style:paragraph-properties fo:margin-top="0cm" fo:margin-bottom="0cm" style:contextual-spacing="true" fo:text-align="start" style:justify-single-word="false"/>
      <style:text-properties officeooo:paragraph-rsid="0069dabb"/>
    </style:style>
    <style:style style:name="P26" style:family="paragraph" style:parent-style-name="Heading_20_2" style:master-page-name="">
      <loext:graphic-properties draw:fill="none"/>
      <style:paragraph-properties fo:margin-left="-0.3cm" fo:margin-right="0cm" fo:margin-top="0.353cm" fo:margin-bottom="0.212cm" style:contextual-spacing="false" fo:text-indent="0cm" style:auto-text-indent="false" style:page-number="auto" fo:background-color="transparent"/>
      <style:text-properties officeooo:paragraph-rsid="008fdb63"/>
    </style:style>
    <style:style style:name="P27" style:family="paragraph" style:parent-style-name="Standard">
      <style:paragraph-properties fo:margin-top="0cm" fo:margin-bottom="0cm" style:contextual-spacing="true"/>
      <style:text-properties officeooo:paragraph-rsid="008cecfc"/>
    </style:style>
    <style:style style:name="P28" style:family="paragraph" style:parent-style-name="Heading_20_2">
      <style:text-properties officeooo:paragraph-rsid="009d736a"/>
    </style:style>
    <style:style style:name="P29" style:family="paragraph" style:parent-style-name="Standard">
      <style:text-properties officeooo:paragraph-rsid="00ae3720"/>
    </style:style>
    <style:style style:name="P30" style:family="paragraph" style:parent-style-name="Standard">
      <style:text-properties officeooo:rsid="0023ef49" officeooo:paragraph-rsid="0023ef49"/>
    </style:style>
    <style:style style:name="P31" style:family="paragraph" style:parent-style-name="Heading_20_2">
      <style:text-properties fo:font-size="14pt" style:font-size-asian="14pt" style:font-size-complex="14pt"/>
    </style:style>
    <style:style style:name="P32" style:family="paragraph" style:parent-style-name="Heading_20_2">
      <style:paragraph-properties fo:margin-top="0cm" fo:margin-bottom="0cm" style:contextual-spacing="false"/>
      <style:text-properties fo:font-size="14pt" style:font-size-asian="14pt" style:font-size-complex="14pt"/>
    </style:style>
    <style:style style:name="P33" style:family="paragraph" style:parent-style-name="Standard">
      <style:paragraph-properties fo:margin-top="0cm" fo:margin-bottom="0cm" style:contextual-spacing="false"/>
      <style:text-properties fo:font-size="14pt" style:font-size-asian="14pt" style:font-size-complex="14pt"/>
    </style:style>
    <style:style style:name="P34" style:family="paragraph" style:parent-style-name="Text_20_body">
      <style:paragraph-properties fo:margin-top="0cm" fo:margin-bottom="0cm" style:contextual-spacing="false"/>
      <style:text-properties fo:font-size="14pt" style:font-size-asian="14pt" style:font-size-complex="14pt"/>
    </style:style>
    <style:style style:name="P35" style:family="paragraph" style:parent-style-name="Text_20_body">
      <style:paragraph-properties fo:margin-top="0cm" fo:margin-bottom="0cm" style:contextual-spacing="false"/>
      <style:text-properties fo:font-size="14pt" officeooo:paragraph-rsid="012ac06b" style:font-size-asian="14pt" style:font-size-complex="14pt"/>
    </style:style>
    <style:style style:name="P36" style:family="paragraph" style:parent-style-name="Heading_20_2">
      <style:paragraph-properties fo:margin-top="0cm" fo:margin-bottom="0cm" style:contextual-spacing="false"/>
    </style:style>
    <style:style style:name="P37" style:family="paragraph" style:parent-style-name="Standard">
      <style:text-properties style:font-name="Calibri" officeooo:rsid="0024afa2" officeooo:paragraph-rsid="0024afa2"/>
    </style:style>
    <style:style style:name="P38" style:family="paragraph" style:parent-style-name="Heading_20_1">
      <style:text-properties officeooo:paragraph-rsid="0024afa2"/>
    </style:style>
    <style:style style:name="P39" style:family="paragraph" style:parent-style-name="Standard">
      <style:text-properties officeooo:rsid="0024afa2" officeooo:paragraph-rsid="0024afa2"/>
    </style:style>
    <style:style style:name="P40" style:family="paragraph" style:parent-style-name="texte1">
      <style:paragraph-properties fo:margin-left="0cm" fo:text-indent="0cm" style:auto-text-indent="false"/>
      <style:text-properties style:font-name="Calibri" officeooo:paragraph-rsid="000e3876"/>
    </style:style>
    <style:style style:name="P41" style:family="paragraph" style:parent-style-name="Heading_20_1">
      <style:text-properties officeooo:paragraph-rsid="002664e4"/>
    </style:style>
    <style:style style:name="P42" style:family="paragraph" style:parent-style-name="Standard">
      <style:text-properties style:font-name="Arial2"/>
    </style:style>
    <style:style style:name="P43" style:family="paragraph" style:parent-style-name="texte1">
      <style:paragraph-properties fo:margin-left="0cm" fo:text-indent="0cm" style:auto-text-indent="false"/>
      <style:text-properties style:font-name="Arial2" officeooo:rsid="00cba31b" officeooo:paragraph-rsid="00cba31b"/>
    </style:style>
    <style:style style:name="P44" style:family="paragraph" style:parent-style-name="texte1">
      <style:paragraph-properties fo:margin-left="0cm" fo:text-indent="0cm" style:auto-text-indent="false"/>
      <style:text-properties style:font-name="Cambria" officeooo:rsid="00cba31b" officeooo:paragraph-rsid="00cba31b"/>
    </style:style>
    <style:style style:name="P45"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size="16pt" fo:font-weight="bold" officeooo:paragraph-rsid="00d46d33" style:font-name-asian="Arial3" style:font-size-asian="16pt" style:font-weight-asian="bold" style:font-name-complex="Arial3" style:font-size-complex="16pt" style:font-weight-complex="bold"/>
    </style:style>
    <style:style style:name="P46" style:family="paragraph" style:parent-style-name="Heading_20_2">
      <style:paragraph-properties fo:margin-top="0.529cm" fo:margin-bottom="0.212cm" style:contextual-spacing="false"/>
      <style:text-properties fo:color="#2e75b6" loext:opacity="100%" style:font-name="Arial" fo:font-size="13pt" fo:font-weight="bold" officeooo:paragraph-rsid="00d46d33" style:font-name-asian="Arial3" style:font-size-asian="13pt" style:font-weight-asian="bold" style:font-name-complex="Arial3" style:font-size-complex="13pt" style:font-weight-complex="bold"/>
    </style:style>
    <style:style style:name="P47"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46d33" style:font-name-asian="Arial3" style:font-size-asian="11pt" style:font-name-complex="Arial3" style:font-size-complex="11pt"/>
    </style:style>
    <style:style style:name="P48"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1pt" officeooo:paragraph-rsid="00d46d33" style:font-name-asian="Arial3" style:font-size-asian="11pt" style:font-name-complex="Arial3" style:font-size-complex="11pt"/>
    </style:style>
    <style:style style:name="P49" style:family="paragraph" style:parent-style-name="Text_20_body" style:list-style-name="L3">
      <style:paragraph-properties fo:margin-top="0.141cm" fo:margin-bottom="0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50" style:family="paragraph" style:parent-style-name="Text_20_body" style:list-style-name="L3">
      <style:paragraph-properties fo:margin-top="0.141cm" fo:margin-bottom="0.499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51" style:family="paragraph" style:parent-style-name="Heading_20_2">
      <style:paragraph-properties fo:margin-top="0.529cm" fo:margin-bottom="0.212cm" style:contextual-spacing="false"/>
      <style:text-properties fo:color="#2e75b6" loext:opacity="100%" style:font-name="Arial" fo:font-size="13pt" fo:font-weight="bold" officeooo:paragraph-rsid="0145a48d" style:font-name-asian="Arial3" style:font-size-asian="13pt" style:font-weight-asian="bold" style:font-name-complex="Arial3" style:font-size-complex="13pt" style:font-weight-complex="bold"/>
    </style:style>
    <style:style style:name="P52" style:family="paragraph" style:parent-style-name="Standard">
      <style:paragraph-properties fo:margin-top="0cm" fo:margin-bottom="0cm" style:contextual-spacing="false" fo:text-align="justify" style:justify-single-word="false" loext:word-spacing-minimum="75%" loext:word-spacing-maximum="133%"/>
      <style:text-properties style:font-name="Arial" fo:font-size="11pt" officeooo:paragraph-rsid="00d46d33" style:font-name-asian="Arial3" style:font-size-asian="11pt" style:font-name-complex="Arial3" style:font-size-complex="11pt"/>
    </style:style>
    <style:style style:name="P53" style:family="paragraph" style:parent-style-name="List_20_Paragraph" style:list-style-name="WWNum2">
      <style:paragraph-properties fo:margin-top="0.071cm" fo:margin-bottom="0.071cm" style:contextual-spacing="false"/>
      <style:text-properties style:font-name="Arial" fo:font-size="11pt" officeooo:paragraph-rsid="00d46d33" style:font-name-asian="Arial3" style:font-size-asian="11pt" style:font-name-complex="Arial3" style:font-size-complex="11pt"/>
    </style:style>
    <style:style style:name="P54" style:family="paragraph" style:parent-style-name="List_20_Paragraph" style:list-style-name="WWNum2">
      <style:paragraph-properties fo:margin-top="0cm" fo:margin-bottom="0cm" style:contextual-spacing="false"/>
      <style:text-properties style:font-name="Arial" fo:font-size="11pt" officeooo:paragraph-rsid="00d46d33" style:font-name-asian="Arial3" style:font-size-asian="11pt" style:font-name-complex="Arial3" style:font-size-complex="11pt"/>
    </style:style>
    <style:style style:name="P55" style:family="paragraph" style:parent-style-name="List_20_Paragraph">
      <style:paragraph-properties fo:margin-top="0cm" fo:margin-bottom="0cm" style:contextual-spacing="false"/>
      <style:text-properties style:font-name="Arial" fo:font-size="11pt" officeooo:paragraph-rsid="00d46d33" style:font-name-asian="Arial3" style:font-size-asian="11pt" style:font-name-complex="Arial3" style:font-size-complex="11pt"/>
    </style:style>
    <style:style style:name="P56" style:family="paragraph" style:parent-style-name="Heading_20_2">
      <style:paragraph-properties fo:margin-top="0cm" fo:margin-bottom="0cm" style:contextual-spacing="false"/>
      <style:text-properties fo:color="#2e75b6" loext:opacity="100%" style:font-name="Arial" fo:font-size="13pt" fo:font-weight="bold" officeooo:paragraph-rsid="0145a48d" style:font-name-asian="Arial3" style:font-size-asian="13pt" style:font-weight-asian="bold" style:font-name-complex="Arial3" style:font-size-complex="13pt" style:font-weight-complex="bold"/>
    </style:style>
    <style:style style:name="P57" style:family="paragraph" style:parent-style-name="Standard">
      <style:paragraph-properties fo:margin-top="0cm" fo:margin-bottom="0cm" style:contextual-spacing="false"/>
      <style:text-properties fo:color="#2e75b6" loext:opacity="100%" style:font-name="Arial" fo:font-size="13pt" fo:font-weight="bold" officeooo:paragraph-rsid="0145a48d" style:font-name-asian="Arial3" style:font-size-asian="13pt" style:font-weight-asian="bold" style:font-name-complex="Arial3" style:font-size-complex="13pt" style:font-weight-complex="bold"/>
    </style:style>
    <style:style style:name="P58" style:family="paragraph" style:parent-style-name="Standard">
      <style:paragraph-properties fo:margin-top="0cm" fo:margin-bottom="0cm" style:contextual-spacing="false" fo:text-align="justify" style:justify-single-word="false" loext:word-spacing-minimum="75%" loext:word-spacing-maximum="133%"/>
      <style:text-properties fo:color="#2e75b6" loext:opacity="100%" style:font-name="Arial" fo:font-size="13pt" fo:font-weight="bold" officeooo:rsid="0140f176" officeooo:paragraph-rsid="00d46d33" style:font-name-asian="Arial3" style:font-size-asian="13pt" style:font-weight-asian="bold" style:font-name-complex="Arial3" style:font-size-complex="13pt" style:font-weight-complex="bold"/>
    </style:style>
    <style:style style:name="P59" style:family="paragraph" style:parent-style-name="Heading_20_2">
      <style:paragraph-properties fo:margin-top="0cm" fo:margin-bottom="0cm" style:contextual-spacing="false"/>
      <style:text-properties fo:color="#2e75b6" loext:opacity="100%" style:font-name="Arial2" fo:font-weight="bold" officeooo:paragraph-rsid="0158753e" style:font-weight-asian="bold" style:font-weight-complex="bold"/>
    </style:style>
    <style:style style:name="P60" style:family="paragraph" style:parent-style-name="Standard">
      <style:paragraph-properties fo:margin-top="0cm" fo:margin-bottom="0cm" style:contextual-spacing="false"/>
      <style:text-properties fo:color="#2e75b6" loext:opacity="100%" style:font-name="Arial2" fo:font-weight="bold" officeooo:paragraph-rsid="0158753e" style:font-weight-asian="bold" style:font-weight-complex="bold"/>
    </style:style>
    <style:style style:name="P61" style:family="paragraph" style:parent-style-name="Standard">
      <style:text-properties style:font-name="Arial2" fo:font-size="11pt" style:font-size-asian="11pt" style:font-size-complex="11pt"/>
    </style:style>
    <style:style style:name="P62" style:family="paragraph" style:parent-style-name="Standard">
      <style:paragraph-properties fo:margin-top="0.201cm" fo:margin-bottom="0.201cm" style:contextual-spacing="false" fo:text-align="start" style:justify-single-word="false"/>
      <style:text-properties fo:color="#2e75b6" loext:opacity="100%" style:font-name="Arial" fo:font-size="13pt" fo:font-weight="bold" officeooo:rsid="0140f176" officeooo:paragraph-rsid="0159669d" style:font-name-asian="Arial3" style:font-size-asian="13pt" style:font-weight-asian="bold" style:font-name-complex="Arial3" style:font-size-complex="13pt" style:font-weight-complex="bold"/>
    </style:style>
    <style:style style:name="P63" style:family="paragraph" style:parent-style-name="Standard">
      <style:paragraph-properties fo:margin-top="0.201cm" fo:margin-bottom="0.201cm" style:contextual-spacing="false" fo:text-align="start" style:justify-single-word="false"/>
      <style:text-properties fo:color="#2e75b6" loext:opacity="100%" officeooo:paragraph-rsid="0159669d"/>
    </style:style>
    <style:style style:name="P64" style:family="paragraph" style:parent-style-name="Standard">
      <style:paragraph-properties fo:margin-top="0cm" fo:margin-bottom="0cm" style:contextual-spacing="false" fo:text-align="start" style:justify-single-word="false"/>
      <style:text-properties style:font-name="Arial2" fo:font-size="11pt" officeooo:paragraph-rsid="01491550" style:font-size-asian="11pt" style:font-size-complex="11pt"/>
    </style:style>
    <style:style style:name="P65" style:family="paragraph" style:parent-style-name="Text_20_body">
      <style:paragraph-properties fo:margin-top="0cm" fo:margin-bottom="0cm" style:contextual-spacing="false" fo:text-align="start" style:justify-single-word="false"/>
      <style:text-properties style:font-name="Arial2" fo:font-size="11pt" officeooo:paragraph-rsid="01491550" style:font-size-asian="11pt" style:font-size-complex="11pt"/>
    </style:style>
    <style:style style:name="P66" style:family="paragraph" style:parent-style-name="Heading_20_2">
      <style:text-properties fo:color="#2e75b6" loext:opacity="100%" style:font-name="Arial2" fo:font-weight="bold" style:font-weight-asian="bold" style:font-weight-complex="bold"/>
    </style:style>
    <style:style style:name="P67" style:family="paragraph" style:parent-style-name="Standard" style:list-style-name="L4"/>
    <style:style style:name="P68" style:family="paragraph" style:parent-style-name="Text_20_body">
      <style:paragraph-properties fo:margin-left="0cm" fo:text-indent="0cm" style:auto-text-indent="false"/>
      <style:text-properties style:font-name="Arial2"/>
    </style:style>
    <style:style style:name="P69" style:family="paragraph" style:parent-style-name="Text_20_body">
      <style:paragraph-properties fo:margin-top="0.212cm" fo:margin-bottom="0.499cm" style:contextual-spacing="false"/>
      <style:text-properties style:font-name="Arial2"/>
    </style:style>
    <style:style style:name="P70" style:family="paragraph" style:parent-style-name="Text_20_body" style:list-style-name="L5">
      <style:paragraph-properties fo:margin-top="0.212cm" fo:margin-bottom="0cm" style:contextual-spacing="false"/>
      <style:text-properties style:font-name="Arial2"/>
    </style:style>
    <style:style style:name="P71" style:family="paragraph" style:parent-style-name="Text_20_body" style:list-style-name="L5">
      <style:paragraph-properties fo:margin-top="0.212cm" fo:margin-bottom="0.499cm" style:contextual-spacing="false"/>
      <style:text-properties style:font-name="Arial2"/>
    </style:style>
    <style:style style:name="P72" style:family="paragraph" style:parent-style-name="Horizontal_20_Line">
      <style:paragraph-properties fo:margin-top="0.212cm" fo:margin-bottom="0cm" style:contextual-spacing="false"/>
      <style:text-properties style:font-name="Arial2"/>
    </style:style>
    <style:style style:name="P73" style:family="paragraph" style:parent-style-name="Text_20_body" style:list-style-name="L6">
      <style:paragraph-properties fo:margin-top="0.212cm" fo:margin-bottom="0cm" style:contextual-spacing="false"/>
      <style:text-properties style:font-name="Arial2"/>
    </style:style>
    <style:style style:name="P74" style:family="paragraph" style:parent-style-name="Text_20_body" style:list-style-name="L6">
      <style:paragraph-properties fo:margin-top="0.212cm" fo:margin-bottom="0.499cm" style:contextual-spacing="false"/>
      <style:text-properties style:font-name="Arial2"/>
    </style:style>
    <style:style style:name="P75" style:family="paragraph" style:parent-style-name="texte1">
      <style:paragraph-properties fo:margin-left="0cm" fo:text-indent="0cm" style:auto-text-indent="false"/>
      <style:text-properties style:font-name="Arial2"/>
    </style:style>
    <style:style style:name="P76" style:family="paragraph" style:parent-style-name="Text_20_body">
      <style:paragraph-properties fo:margin-top="0cm" fo:margin-bottom="0cm" style:contextual-spacing="false"/>
      <style:text-properties style:font-name="Arial2"/>
    </style:style>
    <style:style style:name="P77" style:family="paragraph" style:parent-style-name="Text_20_body">
      <style:paragraph-properties fo:margin-top="0cm" fo:margin-bottom="0cm" style:contextual-spacing="false"/>
      <style:text-properties style:font-name="Arial2" fo:font-size="11pt" style:font-size-asian="11pt" style:font-size-complex="11pt"/>
    </style:style>
    <style:style style:name="P78" style:family="paragraph" style:parent-style-name="Text_20_body" style:list-style-name="L7">
      <style:paragraph-properties fo:margin-top="0cm" fo:margin-bottom="0cm" style:contextual-spacing="false"/>
      <style:text-properties style:font-name="Arial2" fo:font-size="11pt" style:font-size-asian="11pt" style:font-size-complex="11pt"/>
    </style:style>
    <style:style style:name="P79" style:family="paragraph" style:parent-style-name="Text_20_body">
      <style:paragraph-properties fo:margin-top="0cm" fo:margin-bottom="0.198cm" style:contextual-spacing="false"/>
      <style:text-properties style:font-name="Arial2"/>
    </style:style>
    <style:style style:name="P80" style:family="paragraph" style:parent-style-name="Text_20_body">
      <style:paragraph-properties fo:margin-left="0cm" fo:margin-right="0cm" fo:margin-top="0cm" fo:margin-bottom="0cm" style:contextual-spacing="false" fo:text-indent="0cm" style:auto-text-indent="false"/>
      <style:text-properties style:font-name="Arial2" fo:font-size="11pt" style:font-size-asian="11pt" style:font-size-complex="11pt"/>
    </style:style>
    <style:style style:name="P81" style:family="paragraph" style:parent-style-name="Preformatted_20_Text">
      <loext:graphic-properties draw:fill="none" draw:fill-color="#ffffff"/>
      <style:paragraph-properties fo:margin-left="0cm" fo:margin-right="0cm" fo:margin-top="0cm" fo:margin-bottom="0cm" style:contextual-spacing="false" fo:text-indent="0cm" style:auto-text-indent="false" fo:background-color="transparent"/>
      <style:text-properties style:font-name="Arial2"/>
    </style:style>
    <style:style style:name="P82" style:family="paragraph" style:parent-style-name="texte1">
      <style:paragraph-properties fo:margin-left="0cm" fo:text-indent="0cm" style:auto-text-indent="false"/>
      <style:text-properties style:font-name="Arial2" fo:font-size="11pt" style:font-size-asian="11pt" style:font-size-complex="11pt"/>
    </style:style>
    <style:style style:name="P83" style:family="paragraph" style:parent-style-name="texte1">
      <style:paragraph-properties fo:margin-left="0cm" fo:text-indent="0cm" style:auto-text-indent="false"/>
      <style:text-properties style:font-name="Cambria"/>
    </style:style>
    <style:style style:name="P84"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size="16pt" fo:font-weight="bold" officeooo:paragraph-rsid="00d5bfb0" style:font-name-asian="Arial3" style:font-size-asian="16pt" style:font-weight-asian="bold" style:font-name-complex="Arial3" style:font-size-complex="16pt" style:font-weight-complex="bold"/>
    </style:style>
    <style:style style:name="P85" style:family="paragraph" style:parent-style-name="Heading_20_2">
      <style:paragraph-properties fo:margin-top="0.529cm" fo:margin-bottom="0.212cm" style:contextual-spacing="false"/>
      <style:text-properties fo:color="#2e75b6" loext:opacity="100%" style:font-name="Arial" fo:font-size="13pt" fo:font-weight="bold" officeooo:paragraph-rsid="00d5bfb0" style:font-name-asian="Arial3" style:font-size-asian="13pt" style:font-weight-asian="bold" style:font-name-complex="Arial3" style:font-size-complex="13pt" style:font-weight-complex="bold"/>
    </style:style>
    <style:style style:name="P86"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5bfb0" style:font-name-asian="Arial3" style:font-size-asian="11pt" style:font-name-complex="Arial3" style:font-size-complex="11pt"/>
    </style:style>
    <style:style style:name="P87"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e4b5d" style:font-name-asian="Arial3" style:font-size-asian="11pt" style:font-name-complex="Arial3" style:font-size-complex="11pt"/>
    </style:style>
    <style:style style:name="P88" style:family="paragraph" style:parent-style-name="Text_20_body" style:list-style-name="L8">
      <style:paragraph-properties fo:margin-top="0cm" fo:margin-bottom="0cm" style:contextual-spacing="false" fo:text-align="justify" style:justify-single-word="false" loext:word-spacing-minimum="75%" loext:word-spacing-maximum="133%"/>
      <style:text-properties style:font-name="Arial" fo:font-size="11pt" officeooo:paragraph-rsid="00de4b5d" style:font-name-asian="Arial3" style:font-size-asian="11pt" style:font-size-complex="11pt"/>
    </style:style>
    <style:style style:name="P89" style:family="paragraph" style:parent-style-name="Text_20_body" style:list-style-name="L9">
      <style:paragraph-properties fo:margin-top="0.071cm" fo:margin-bottom="0cm" style:contextual-spacing="false"/>
      <style:text-properties style:font-name="Arial" fo:font-size="11pt" officeooo:paragraph-rsid="00de4b5d" style:font-name-asian="Arial3" style:font-size-asian="11pt" style:font-size-complex="11pt"/>
    </style:style>
    <style:style style:name="P90" style:family="paragraph" style:parent-style-name="Text_20_body" style:list-style-name="L10">
      <style:paragraph-properties fo:margin-top="0.071cm" fo:margin-bottom="0cm" style:contextual-spacing="false"/>
      <style:text-properties style:font-name="Arial" fo:font-size="11pt" style:font-name-asian="Arial3" style:font-size-asian="11pt" style:font-size-complex="11pt"/>
    </style:style>
    <style:style style:name="P91" style:family="paragraph" style:parent-style-name="Text_20_body" style:list-style-name="L11">
      <style:paragraph-properties fo:margin-top="0.071cm" fo:margin-bottom="0cm" style:contextual-spacing="false"/>
      <style:text-properties style:font-name="Arial" fo:font-size="11pt" style:font-name-asian="Arial3" style:font-size-asian="11pt" style:font-size-complex="11pt"/>
    </style:style>
    <style:style style:name="P92" style:family="paragraph" style:parent-style-name="Text_20_body" style:list-style-name="L12">
      <style:paragraph-properties fo:margin-top="0.071cm" fo:margin-bottom="0cm" style:contextual-spacing="false"/>
      <style:text-properties style:font-name="Arial" fo:font-size="11pt" style:font-name-asian="Arial3" style:font-size-asian="11pt" style:font-size-complex="11pt"/>
    </style:style>
    <style:style style:name="P93" style:family="paragraph" style:parent-style-name="Text_20_body" style:list-style-name="L13">
      <style:paragraph-properties fo:margin-top="0.071cm" fo:margin-bottom="0cm" style:contextual-spacing="false"/>
      <style:text-properties style:font-name="Arial" fo:font-size="11pt" style:font-name-asian="Arial3" style:font-size-asian="11pt" style:font-size-complex="11pt"/>
    </style:style>
    <style:style style:name="P94" style:family="paragraph" style:parent-style-name="Text_20_body" style:list-style-name="L14">
      <style:paragraph-properties fo:margin-top="0.071cm" fo:margin-bottom="0cm" style:contextual-spacing="false"/>
      <style:text-properties style:font-name="Arial" fo:font-size="11pt" style:font-name-asian="Arial3" style:font-size-asian="11pt" style:font-size-complex="11pt"/>
    </style:style>
    <style:style style:name="P95" style:family="paragraph" style:parent-style-name="Text_20_body" style:list-style-name="L15">
      <style:paragraph-properties fo:margin-top="0.071cm" fo:margin-bottom="0cm" style:contextual-spacing="false"/>
      <style:text-properties style:font-name="Arial" fo:font-size="11pt" style:font-name-asian="Arial3" style:font-size-asian="11pt" style:font-size-complex="11pt"/>
    </style:style>
    <style:style style:name="P96" style:family="paragraph" style:parent-style-name="Text_20_body" style:list-style-name="L16">
      <style:paragraph-properties fo:margin-top="0.071cm" fo:margin-bottom="0.071cm" style:contextual-spacing="false"/>
    </style:style>
    <style:style style:name="P97" style:family="paragraph" style:parent-style-name="Heading_20_2">
      <style:paragraph-properties fo:margin-top="0.529cm" fo:margin-bottom="0.212cm" style:contextual-spacing="false" fo:text-align="start" style:justify-single-word="false"/>
      <style:text-properties fo:color="#2e75b6" loext:opacity="100%" style:font-name="Arial" fo:font-size="13pt" fo:font-weight="bold" officeooo:paragraph-rsid="00d5bfb0" style:font-name-asian="Arial3" style:font-size-asian="13pt" style:font-weight-asian="bold" style:font-name-complex="Arial3" style:font-size-complex="13pt" style:font-weight-complex="bold"/>
    </style:style>
    <style:style style:name="P98" style:family="paragraph" style:parent-style-name="texte1">
      <style:paragraph-properties fo:margin-left="0cm" fo:text-indent="0cm" style:auto-text-indent="false"/>
      <style:text-properties style:font-name="Cambria" officeooo:paragraph-rsid="00cf255a"/>
    </style:style>
    <style:style style:name="P99" style:family="paragraph" style:parent-style-name="Heading_20_2">
      <style:paragraph-properties fo:margin-top="0cm" fo:margin-bottom="0cm" style:contextual-spacing="false" fo:text-align="start" style:justify-single-word="false"/>
      <style:text-properties fo:color="#2e75b6" loext:opacity="100%" style:font-name="Arial" fo:font-size="13pt" fo:font-weight="bold" officeooo:rsid="00f569ca" officeooo:paragraph-rsid="00f569ca" style:font-name-asian="Arial3" style:font-size-asian="13pt" style:font-weight-asian="bold" style:font-name-complex="Arial3" style:font-size-complex="13pt" style:font-weight-complex="bold"/>
    </style:style>
    <style:style style:name="P100" style:family="paragraph" style:parent-style-name="Standard">
      <style:paragraph-properties fo:margin-top="0cm" fo:margin-bottom="0cm" style:contextual-spacing="false" fo:text-align="start" style:justify-single-word="false"/>
      <style:text-properties fo:color="#2e75b6" loext:opacity="100%" style:font-name="Arial" fo:font-size="13pt" fo:font-weight="bold" officeooo:rsid="00f569ca" officeooo:paragraph-rsid="00f569ca" style:font-name-asian="Arial3" style:font-size-asian="13pt" style:font-weight-asian="bold" style:font-name-complex="Arial3" style:font-size-complex="13pt" style:font-weight-complex="bold"/>
    </style:style>
    <style:style style:name="P101" style:family="paragraph" style:parent-style-name="Text_20_body">
      <style:paragraph-properties fo:text-align="start" style:justify-single-word="false"/>
      <style:text-properties fo:color="#111111" loext:opacity="100%" style:font-name="Arial2" fo:font-size="11pt" fo:font-weight="normal" officeooo:rsid="00fff832" style:font-size-asian="11pt" style:font-weight-asian="normal" style:font-size-complex="11pt" style:font-weight-complex="normal"/>
    </style:style>
    <style:style style:name="P102" style:family="paragraph" style:parent-style-name="Text_20_body">
      <style:paragraph-properties fo:text-align="start" style:justify-single-word="false"/>
      <style:text-properties fo:color="#111111" loext:opacity="100%" style:font-name="Arial2" fo:font-size="11pt" officeooo:rsid="00fff832" style:font-size-asian="11pt" style:font-size-complex="11pt"/>
    </style:style>
    <style:style style:name="P103" style:family="paragraph" style:parent-style-name="Standard">
      <style:paragraph-properties fo:text-align="justify" style:justify-single-word="false"/>
      <style:text-properties fo:color="#111111" loext:opacity="100%" style:font-name="Arial2" fo:font-size="11pt" fo:font-weight="normal" officeooo:rsid="0101e1cb" officeooo:paragraph-rsid="0101e1cb" style:font-size-asian="11pt" style:font-weight-asian="normal" style:font-size-complex="11pt" style:font-weight-complex="normal"/>
    </style:style>
    <style:style style:name="P104" style:family="paragraph" style:parent-style-name="Standard">
      <style:paragraph-properties fo:text-align="justify" style:justify-single-word="false"/>
      <style:text-properties fo:color="#111111" loext:opacity="100%" style:font-name="Arial2" fo:font-size="11pt" fo:font-weight="normal" officeooo:rsid="0108e102" officeooo:paragraph-rsid="0108e102" style:font-size-asian="11pt" style:font-weight-asian="normal" style:font-size-complex="11pt" style:font-weight-complex="normal"/>
    </style:style>
    <style:style style:name="P105" style:family="paragraph" style:parent-style-name="Standard">
      <style:paragraph-properties fo:text-align="justify" style:justify-single-word="false"/>
      <style:text-properties officeooo:paragraph-rsid="00fcec2a"/>
    </style:style>
    <style:style style:name="P106" style:family="paragraph" style:parent-style-name="Heading_20_2">
      <style:paragraph-properties fo:margin-top="0cm" fo:margin-bottom="0cm" style:contextual-spacing="false" fo:text-align="start" style:justify-single-word="false"/>
      <style:text-properties fo:color="#2e75b6" loext:opacity="100%" style:font-name="Arial" fo:font-size="13pt" fo:font-weight="bold" officeooo:rsid="00f569ca" officeooo:paragraph-rsid="011143f1" style:font-name-asian="Arial3" style:font-size-asian="13pt" style:font-weight-asian="bold" style:font-name-complex="Arial3" style:font-size-complex="13pt" style:font-weight-complex="bold"/>
    </style:style>
    <style:style style:name="P107" style:family="paragraph" style:parent-style-name="Standard">
      <style:paragraph-properties fo:margin-top="0cm" fo:margin-bottom="0cm" style:contextual-spacing="false" fo:text-align="start" style:justify-single-word="false"/>
      <style:text-properties fo:color="#2e75b6" loext:opacity="100%" style:font-name="Arial" fo:font-size="13pt" fo:font-weight="bold" officeooo:rsid="00f569ca" officeooo:paragraph-rsid="011143f1" style:font-name-asian="Arial3" style:font-size-asian="13pt" style:font-weight-asian="bold" style:font-name-complex="Arial3" style:font-size-complex="13pt" style:font-weight-complex="bold"/>
    </style:style>
    <style:style style:name="P108" style:family="paragraph" style:parent-style-name="Text_20_body">
      <style:paragraph-properties fo:text-align="start" style:justify-single-word="false"/>
      <style:text-properties fo:color="#111111" loext:opacity="100%" style:font-name="Arial2" fo:font-size="11pt" fo:font-weight="normal" officeooo:rsid="00fff832" officeooo:paragraph-rsid="011143f1" style:font-size-asian="11pt" style:font-weight-asian="normal" style:font-size-complex="11pt" style:font-weight-complex="normal"/>
    </style:style>
    <style:style style:name="P109" style:family="paragraph" style:parent-style-name="Text_20_body">
      <style:text-properties fo:color="#111111" loext:opacity="100%" style:font-name="Arial2" fo:font-size="11pt" officeooo:rsid="00fff832" style:font-size-asian="11pt" style:font-size-complex="11pt"/>
    </style:style>
    <style:style style:name="P110" style:family="paragraph" style:parent-style-name="Text_20_body">
      <style:paragraph-properties fo:margin-top="0cm" fo:margin-bottom="0cm" style:contextual-spacing="false" fo:text-align="start" style:justify-single-word="false"/>
      <style:text-properties fo:color="#111111" loext:opacity="100%" style:font-name="Arial2" fo:font-size="11pt" fo:font-weight="normal" officeooo:rsid="00fff832" officeooo:paragraph-rsid="01192b13" style:font-size-asian="11pt" style:font-weight-asian="normal" style:font-size-complex="11pt" style:font-weight-complex="normal"/>
    </style:style>
    <style:style style:name="P111" style:family="paragraph" style:parent-style-name="Text_20_body" style:list-style-name="L17">
      <style:paragraph-properties fo:margin-top="0cm" fo:margin-bottom="0cm" style:contextual-spacing="false" fo:text-align="start" style:justify-single-word="false"/>
      <style:text-properties fo:color="#111111" loext:opacity="100%" style:font-name="Arial2" fo:font-size="11pt" officeooo:rsid="00fff832" officeooo:paragraph-rsid="01192b13" style:font-size-asian="11pt" style:font-size-complex="11pt"/>
    </style:style>
    <style:style style:name="P112" style:family="paragraph" style:parent-style-name="Text_20_body" style:list-style-name="L17">
      <style:paragraph-properties fo:margin-top="0cm" fo:margin-bottom="0cm" style:contextual-spacing="false" fo:text-align="start" style:justify-single-word="false"/>
      <style:text-properties fo:color="#111111" loext:opacity="100%" style:font-name="Arial2" fo:font-size="11pt" officeooo:rsid="00fff832" officeooo:paragraph-rsid="0119ac01" style:font-size-asian="11pt" style:font-size-complex="11pt"/>
    </style:style>
    <style:style style:name="P113"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officeooo:paragraph-rsid="00d78a60"/>
    </style:style>
    <style:style style:name="P114" style:family="paragraph" style:parent-style-name="Standard">
      <style:paragraph-properties fo:margin-top="0.106cm" fo:margin-bottom="0.106cm" style:contextual-spacing="false"/>
      <style:text-properties officeooo:paragraph-rsid="00d78a60"/>
    </style:style>
    <style:style style:name="P115" style:family="paragraph" style:parent-style-name="Heading_20_2">
      <style:paragraph-properties fo:margin-top="0.529cm" fo:margin-bottom="0.212cm" style:contextual-spacing="false"/>
      <style:text-properties fo:color="#2e75b6" loext:opacity="100%" style:font-name="Arial" fo:font-size="13pt" fo:font-weight="bold" officeooo:paragraph-rsid="00d78a60" style:font-name-asian="Arial3" style:font-size-asian="13pt" style:font-weight-asian="bold" style:font-name-complex="Arial3" style:font-size-complex="13pt" style:font-weight-complex="bold"/>
    </style:style>
    <style:style style:name="P116"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78a60" style:font-name-asian="Arial3" style:font-size-asian="11pt" style:font-name-complex="Arial3" style:font-size-complex="11pt"/>
    </style:style>
    <style:style style:name="P117"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1pt" officeooo:paragraph-rsid="00d78a60" style:font-name-asian="Arial3" style:font-size-asian="11pt" style:font-name-complex="Arial3" style:font-size-complex="11pt"/>
    </style:style>
    <style:style style:name="P118"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19" style:family="paragraph" style:parent-style-name="Horizontal_20_Line">
      <style:paragraph-properties fo:margin-top="0.141cm" fo:margin-bottom="0.141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20" style:family="paragraph" style:parent-style-name="Text_20_body">
      <style:paragraph-properties fo:margin-left="0cm" fo:margin-right="0cm" fo:margin-top="0.141cm" fo:margin-bottom="0.499cm" style:contextual-spacing="false" fo:text-align="justify" style:justify-single-word="false" fo:text-indent="0cm" style:auto-text-indent="false" loext:word-spacing-minimum="75%" loext:word-spacing-maximum="133%"/>
      <style:text-properties style:font-name="Arial" fo:font-size="11pt" style:font-name-asian="Arial3" style:font-size-asian="11pt" style:font-size-complex="11pt"/>
    </style:style>
    <style:style style:name="P121" style:family="paragraph" style:parent-style-name="Preformatted_20_Text">
      <loext:graphic-properties draw:fill="none" draw:fill-color="#ffffff"/>
      <style:paragraph-properties fo:margin-left="0cm" fo:margin-right="0cm" fo:margin-top="0.141cm" fo:margin-bottom="0.141cm" style:contextual-spacing="false" fo:text-align="justify" style:justify-single-word="false" fo:text-indent="0cm" style:auto-text-indent="false" fo:background-color="transparent" loext:word-spacing-minimum="75%" loext:word-spacing-maximum="133%"/>
      <style:text-properties style:font-name="Arial" fo:font-size="11pt" style:font-name-asian="Arial3" style:font-size-asian="11pt" style:font-name-complex="Arial3" style:font-size-complex="11pt"/>
    </style:style>
    <style:style style:name="P122" style:family="paragraph" style:parent-style-name="Text_20_body" style:list-style-name="L18">
      <style:paragraph-properties fo:margin-top="0.141cm" fo:margin-bottom="0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23" style:family="paragraph" style:parent-style-name="Text_20_body" style:list-style-name="L18">
      <style:paragraph-properties fo:margin-top="0.141cm" fo:margin-bottom="0.499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24"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size="16pt" fo:font-weight="bold" officeooo:paragraph-rsid="00d78a60" style:font-name-asian="Arial3" style:font-size-asian="16pt" style:font-weight-asian="bold" style:font-name-complex="Arial3" style:font-size-complex="16pt" style:font-weight-complex="bold"/>
    </style:style>
    <style:style style:name="P125"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0d78a60"/>
    </style:style>
    <style:style style:name="P126" style:family="paragraph" style:parent-style-name="List_20_Paragraph" style:list-style-name="WWNum2">
      <style:paragraph-properties fo:margin-top="0.071cm" fo:margin-bottom="0.071cm" style:contextual-spacing="false"/>
      <style:text-properties style:font-name="Arial" fo:font-size="11pt" officeooo:paragraph-rsid="00d78a60" style:font-name-asian="Arial3" style:font-size-asian="11pt" style:font-name-complex="Arial3" style:font-size-complex="11pt"/>
    </style:style>
    <style:style style:name="P127" style:family="paragraph" style:parent-style-name="Text_20_body">
      <style:paragraph-properties fo:margin-top="0.141cm" fo:margin-bottom="0.141cm" style:contextual-spacing="false" fo:text-align="justify" style:justify-single-word="false" loext:word-spacing-minimum="75%" loext:word-spacing-maximum="133%"/>
      <style:text-properties officeooo:paragraph-rsid="00d78a60"/>
    </style:style>
    <style:style style:name="P128" style:family="paragraph" style:parent-style-name="Text_20_body">
      <style:paragraph-properties fo:margin-top="0.141cm" fo:margin-bottom="0.141cm" style:contextual-spacing="false" fo:text-align="justify" style:justify-single-word="false" loext:word-spacing-minimum="75%" loext:word-spacing-maximum="133%"/>
    </style:style>
    <style:style style:name="P129" style:family="paragraph" style:parent-style-name="Text_20_body" style:list-style-name="L19">
      <style:paragraph-properties fo:margin-top="0.141cm" fo:margin-bottom="0cm" style:contextual-spacing="false" fo:text-align="justify" style:justify-single-word="false" loext:word-spacing-minimum="75%" loext:word-spacing-maximum="133%"/>
    </style:style>
    <style:style style:name="P130" style:family="paragraph" style:parent-style-name="Text_20_body" style:list-style-name="L19">
      <style:paragraph-properties fo:margin-top="0.141cm" fo:margin-bottom="0.499cm" style:contextual-spacing="false" fo:text-align="justify" style:justify-single-word="false" loext:word-spacing-minimum="75%" loext:word-spacing-maximum="133%"/>
    </style:style>
    <style:style style:name="P131"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size="16pt" fo:font-weight="bold" officeooo:paragraph-rsid="00dafc0f" style:font-name-asian="Arial3" style:font-size-asian="16pt" style:font-weight-asian="bold" style:font-name-complex="Arial3" style:font-size-complex="16pt" style:font-weight-complex="bold"/>
    </style:style>
    <style:style style:name="P132" style:family="paragraph" style:parent-style-name="Standard">
      <style:paragraph-properties fo:margin-top="0.106cm" fo:margin-bottom="0.106cm" style:contextual-spacing="false"/>
      <style:text-properties officeooo:paragraph-rsid="00dafc0f"/>
    </style:style>
    <style:style style:name="P133" style:family="paragraph" style:parent-style-name="Heading_20_2">
      <style:paragraph-properties fo:margin-top="0.529cm" fo:margin-bottom="0.212cm" style:contextual-spacing="false"/>
      <style:text-properties fo:color="#2e75b6" loext:opacity="100%" style:font-name="Arial" fo:font-size="13pt" fo:font-weight="bold" officeooo:paragraph-rsid="00dafc0f" style:font-name-asian="Arial3" style:font-size-asian="13pt" style:font-weight-asian="bold" style:font-name-complex="Arial3" style:font-size-complex="13pt" style:font-weight-complex="bold"/>
    </style:style>
    <style:style style:name="P134"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afc0f" style:font-name-asian="Arial3" style:font-size-asian="11pt" style:font-name-complex="Arial3" style:font-size-complex="11pt"/>
    </style:style>
    <style:style style:name="P135" style:family="paragraph" style:parent-style-name="List_20_Paragraph" style:list-style-name="WWNum2">
      <style:paragraph-properties fo:margin-top="0.071cm" fo:margin-bottom="0.071cm" style:contextual-spacing="false"/>
      <style:text-properties style:font-name="Arial" fo:font-size="11pt" officeooo:paragraph-rsid="00dafc0f" style:font-name-asian="Arial3" style:font-size-asian="11pt" style:font-name-complex="Arial3" style:font-size-complex="11pt"/>
    </style:style>
    <style:style style:name="P136"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rsid="00dafc0f" officeooo:paragraph-rsid="00dafc0f" style:font-name-asian="Arial3" style:font-size-asian="11pt" style:font-name-complex="Arial3" style:font-size-complex="11pt"/>
    </style:style>
    <style:style style:name="P137" style:family="paragraph" style:parent-style-name="Text_20_body">
      <style:paragraph-properties fo:margin-top="0.141cm" fo:margin-bottom="0.141cm" style:contextual-spacing="false" fo:text-align="justify" style:justify-single-word="false" loext:word-spacing-minimum="75%" loext:word-spacing-maximum="133%"/>
      <style:text-properties fo:font-style="italic" officeooo:paragraph-rsid="00dafc0f" style:font-style-asian="italic"/>
    </style:style>
    <style:style style:name="P138" style:family="paragraph" style:parent-style-name="Text_20_body">
      <style:paragraph-properties fo:margin-top="0.141cm" fo:margin-bottom="0.141cm" style:contextual-spacing="false" fo:text-align="justify" style:justify-single-word="false" loext:word-spacing-minimum="75%" loext:word-spacing-maximum="133%"/>
      <style:text-properties fo:font-style="italic" style:font-style-asian="italic"/>
    </style:style>
    <style:style style:name="P139" style:family="paragraph" style:parent-style-name="Standard">
      <style:paragraph-properties fo:margin-top="0.141cm" fo:margin-bottom="0.141cm" style:contextual-spacing="false" fo:text-align="justify" style:justify-single-word="false" loext:word-spacing-minimum="75%" loext:word-spacing-maximum="133%"/>
      <style:text-properties fo:font-style="italic" officeooo:paragraph-rsid="00dafc0f" style:font-style-asian="italic"/>
    </style:style>
    <style:style style:name="P140" style:family="paragraph" style:parent-style-name="Heading_20_1">
      <style:text-properties officeooo:paragraph-rsid="0034ed1a"/>
    </style:style>
    <style:style style:name="P141" style:family="paragraph" style:parent-style-name="Standard">
      <style:text-properties officeooo:paragraph-rsid="0034ed1a"/>
    </style:style>
    <style:style style:name="P142" style:family="paragraph" style:parent-style-name="Standard" style:list-style-name="WWNum5">
      <style:text-properties officeooo:paragraph-rsid="0034ed1a"/>
    </style:style>
    <style:style style:name="P143" style:family="paragraph" style:parent-style-name="Standard" style:list-style-name="WWNum5">
      <style:text-properties fo:font-weight="bold" officeooo:paragraph-rsid="0034ed1a" style:font-weight-asian="bold"/>
    </style:style>
    <style:style style:name="P144" style:family="paragraph" style:parent-style-name="Standard">
      <style:text-properties officeooo:paragraph-rsid="0034f0c0"/>
    </style:style>
    <style:style style:name="P145" style:family="paragraph" style:parent-style-name="Standard">
      <style:paragraph-properties fo:line-height="100%" fo:text-align="center" style:justify-single-word="false" style:punctuation-wrap="hanging"/>
    </style:style>
    <style:style style:name="P146" style:family="paragraph">
      <loext:graphic-properties draw:fill="solid" draw:fill-color="#ffffff"/>
      <style:paragraph-properties fo:text-align="start"/>
    </style:style>
    <style:style style:name="P147" style:family="paragraph">
      <loext:graphic-properties draw:fill="none"/>
      <style:paragraph-properties fo:text-align="start"/>
      <style:text-properties fo:font-size="11pt"/>
    </style:style>
    <style:style style:name="P148" style:family="paragraph" style:parent-style-name="Caption">
      <style:text-properties fo:font-style="italic" fo:font-weight="normal" officeooo:paragraph-rsid="0034f0c0" style:font-style-asian="italic" style:font-weight-asian="normal"/>
    </style:style>
    <style:style style:name="P149" style:family="paragraph" style:parent-style-name="Standard" style:list-style-name="WWNum3">
      <style:text-properties officeooo:paragraph-rsid="0034f0c0"/>
    </style:style>
    <style:style style:name="P150" style:family="paragraph" style:parent-style-name="Standard" style:list-style-name="WWNum4">
      <style:text-properties officeooo:paragraph-rsid="0034f0c0"/>
    </style:style>
    <style:style style:name="P151" style:family="paragraph" style:parent-style-name="Marginalia">
      <style:text-properties officeooo:paragraph-rsid="0034f0c0"/>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fo:font-style="italic" fo:font-weight="bold" style:font-style-asian="italic" style:font-weight-asian="bold"/>
    </style:style>
    <style:style style:name="T4" style:family="text">
      <style:text-properties fo:font-size="6pt" fo:font-weight="bold" style:font-size-asian="6pt" style:font-weight-asian="bold"/>
    </style:style>
    <style:style style:name="T5" style:family="text">
      <style:text-properties fo:font-size="3pt" fo:font-weight="bold" style:font-size-asian="3pt" style:font-weight-asian="bold"/>
    </style:style>
    <style:style style:name="T6" style:family="text">
      <style:text-properties fo:font-size="14pt" fo:font-weight="bold" style:font-size-asian="14pt" style:font-weight-asian="bold"/>
    </style:style>
    <style:style style:name="T7" style:family="text">
      <style:text-properties fo:font-size="18pt" fo:font-weight="bold" style:font-size-asian="18pt" style:font-weight-asian="bold"/>
    </style:style>
    <style:style style:name="T8" style:family="text">
      <style:text-properties fo:font-size="8pt" fo:font-weight="bold" style:font-size-asian="8pt" style:font-weight-asian="bold"/>
    </style:style>
    <style:style style:name="T9" style:family="text">
      <style:text-properties style:font-name="Calibri"/>
    </style:style>
    <style:style style:name="T10" style:family="text">
      <style:text-properties fo:font-style="italic" style:font-style-asian="italic"/>
    </style:style>
    <style:style style:name="T11" style:family="text">
      <style:text-properties fo:font-weight="bold" style:font-weight-asian="bold" style:font-weight-complex="bold"/>
    </style:style>
    <style:style style:name="T12" style:family="text">
      <style:text-properties officeooo:rsid="003f2f71"/>
    </style:style>
    <style:style style:name="T13" style:family="text">
      <style:text-properties officeooo:rsid="0041ba34"/>
    </style:style>
    <style:style style:name="T14" style:family="text">
      <style:text-properties officeooo:rsid="004354e9"/>
    </style:style>
    <style:style style:name="T15" style:family="text">
      <style:text-properties officeooo:rsid="00444c92"/>
    </style:style>
    <style:style style:name="T16" style:family="text">
      <style:text-properties officeooo:rsid="004ff9ab"/>
    </style:style>
    <style:style style:name="T17" style:family="text">
      <style:text-properties officeooo:rsid="0050d6f8"/>
    </style:style>
    <style:style style:name="T18" style:family="text">
      <style:text-properties officeooo:rsid="00569461"/>
    </style:style>
    <style:style style:name="T19" style:family="text">
      <style:text-properties officeooo:rsid="005814ca"/>
    </style:style>
    <style:style style:name="T20" style:family="text">
      <style:text-properties officeooo:rsid="005836eb"/>
    </style:style>
    <style:style style:name="T21" style:family="text">
      <style:text-properties officeooo:rsid="0058b571"/>
    </style:style>
    <style:style style:name="T22" style:family="text">
      <style:text-properties officeooo:rsid="0059b2d7"/>
    </style:style>
    <style:style style:name="T23" style:family="text">
      <style:text-properties fo:font-size="14pt" style:font-size-asian="14pt" style:font-size-complex="14pt"/>
    </style:style>
    <style:style style:name="T24" style:family="text">
      <style:text-properties fo:font-size="14pt" officeooo:rsid="007f8b3a" style:font-size-asian="14pt" style:font-size-complex="14pt"/>
    </style:style>
    <style:style style:name="T25" style:family="text">
      <style:text-properties officeooo:rsid="002dd8f0"/>
    </style:style>
    <style:style style:name="T26" style:family="text">
      <style:text-properties style:font-name="Arial2" fo:font-size="16pt" style:font-size-asian="16pt" style:font-size-complex="16pt"/>
    </style:style>
    <style:style style:name="T27" style:family="text">
      <style:text-properties style:font-name="Arial2" fo:font-size="16pt" officeooo:rsid="016f6061" style:font-size-asian="16pt" style:font-size-complex="16pt"/>
    </style:style>
    <style:style style:name="T28" style:family="text">
      <style:text-properties style:font-name="Arial2" fo:font-size="16pt" officeooo:rsid="00c8cfb8" style:font-size-asian="16pt" style:font-size-complex="16pt"/>
    </style:style>
    <style:style style:name="T29" style:family="text">
      <style:text-properties officeooo:rsid="00cda00f"/>
    </style:style>
    <style:style style:name="T30" style:family="text">
      <style:text-properties officeooo:rsid="0140f176"/>
    </style:style>
    <style:style style:name="T31" style:family="text">
      <style:text-properties officeooo:rsid="015ca01b"/>
    </style:style>
    <style:style style:name="T32" style:family="text">
      <style:text-properties officeooo:rsid="015ccf70"/>
    </style:style>
    <style:style style:name="T33" style:family="text">
      <style:text-properties officeooo:rsid="0145a48d"/>
    </style:style>
    <style:style style:name="T34" style:family="text">
      <style:text-properties officeooo:rsid="01316999"/>
    </style:style>
    <style:style style:name="T35" style:family="text">
      <style:text-properties style:font-name="Arial" fo:font-size="13pt" officeooo:rsid="0140f176" style:font-name-asian="Arial3" style:font-size-asian="13pt" style:font-name-complex="Arial3" style:font-size-complex="13pt"/>
    </style:style>
    <style:style style:name="T36" style:family="text">
      <style:text-properties style:font-name="Arial" fo:font-size="13pt" officeooo:rsid="0158753e" style:font-name-asian="Arial3" style:font-size-asian="13pt" style:font-name-complex="Arial3" style:font-size-complex="13pt"/>
    </style:style>
    <style:style style:name="T37" style:family="text">
      <style:text-properties officeooo:rsid="013c4031"/>
    </style:style>
    <style:style style:name="T38" style:family="text">
      <style:text-properties officeooo:rsid="013daa2e"/>
    </style:style>
    <style:style style:name="T39" style:family="text">
      <style:text-properties style:font-name="Arial" fo:font-size="13pt" fo:font-weight="bold" officeooo:rsid="0140f176" style:font-name-asian="Arial3" style:font-size-asian="13pt" style:font-weight-asian="bold" style:font-name-complex="Arial3" style:font-size-complex="13pt" style:font-weight-complex="bold"/>
    </style:style>
    <style:style style:name="T40" style:family="text">
      <style:text-properties style:font-name="Arial" fo:font-size="13pt" fo:font-weight="bold" officeooo:rsid="0158753e" style:font-name-asian="Arial3" style:font-size-asian="13pt" style:font-weight-asian="bold" style:font-name-complex="Arial3" style:font-size-complex="13pt" style:font-weight-complex="bold"/>
    </style:style>
    <style:style style:name="T41" style:family="text">
      <style:text-properties style:font-name="Arial2" fo:font-size="13pt" fo:font-weight="bold" officeooo:rsid="0140f176" style:font-name-asian="Arial3" style:font-size-asian="13pt" style:font-weight-asian="bold" style:font-name-complex="Arial3" style:font-size-complex="13pt" style:font-weight-complex="bold"/>
    </style:style>
    <style:style style:name="T42" style:family="text">
      <style:text-properties style:font-name="Arial2" fo:font-size="13pt" fo:font-weight="bold" officeooo:rsid="00f569ca" style:font-name-asian="Arial3" style:font-size-asian="13pt" style:font-weight-asian="bold" style:font-name-complex="Arial3" style:font-size-complex="13pt" style:font-weight-complex="bold"/>
    </style:style>
    <style:style style:name="T43" style:family="text">
      <style:text-properties style:font-name="Arial2" fo:font-size="13pt" fo:font-weight="bold" style:font-size-asian="13pt" style:font-weight-asian="bold" style:font-size-complex="13pt" style:font-weight-complex="bold"/>
    </style:style>
    <style:style style:name="T44" style:family="text">
      <style:text-properties style:font-name="Arial2"/>
    </style:style>
    <style:style style:name="T45" style:family="text">
      <style:text-properties style:font-name="Arial2" officeooo:rsid="001cff0b"/>
    </style:style>
    <style:style style:name="T46" style:family="text">
      <style:text-properties style:font-name="Arial2" officeooo:rsid="0167034f"/>
    </style:style>
    <style:style style:name="T47" style:family="text">
      <style:text-properties style:font-name="Arial2" officeooo:rsid="0168182a"/>
    </style:style>
    <style:style style:name="T48" style:family="text">
      <style:text-properties style:font-name="Arial2" officeooo:rsid="01694549"/>
    </style:style>
    <style:style style:name="T49" style:family="text">
      <style:text-properties officeooo:rsid="0172113b"/>
    </style:style>
    <style:style style:name="T50" style:family="text">
      <style:text-properties fo:font-size="11pt" style:font-size-asian="11pt" style:font-size-complex="11pt"/>
    </style:style>
    <style:style style:name="T51" style:family="text">
      <style:text-properties style:font-name="Arial2" fo:font-size="11pt" style:font-size-asian="11pt" style:font-size-complex="11pt"/>
    </style:style>
    <style:style style:name="T52" style:family="text">
      <style:text-properties fo:color="#2b303b" loext:opacity="100%" style:font-name="Arial2" fo:font-size="11pt" fo:background-color="transparent" loext:char-shading-value="0" style:font-size-asian="11pt" style:font-size-complex="11pt"/>
    </style:style>
    <style:style style:name="T53" style:family="text">
      <style:text-properties fo:color="#14181f" loext:opacity="100%" style:font-name="Arial2" fo:font-size="11pt" fo:background-color="transparent" loext:char-shading-value="0" style:font-size-asian="11pt" style:font-size-complex="11pt"/>
    </style:style>
    <style:style style:name="T54" style:family="text">
      <style:text-properties fo:color="#b80a18" loext:opacity="100%" style:font-name="Arial2" fo:font-size="11pt" fo:background-color="transparent" loext:char-shading-value="0" style:font-size-asian="11pt" style:font-size-complex="11pt"/>
    </style:style>
    <style:style style:name="T55" style:family="text">
      <style:text-properties fo:color="#008080" loext:opacity="100%" style:font-name="Arial2" fo:font-size="11pt" fo:background-color="transparent" loext:char-shading-value="0" style:font-size-asian="11pt" style:font-size-complex="11pt"/>
    </style:style>
    <style:style style:name="T56" style:family="text">
      <style:text-properties fo:color="#008000" loext:opacity="100%" style:font-name="Arial2" fo:font-size="11pt" fo:background-color="transparent" loext:char-shading-value="0" style:font-size-asian="11pt" style:font-size-complex="11pt"/>
    </style:style>
    <style:style style:name="T57" style:family="text">
      <style:text-properties officeooo:rsid="00e01508"/>
    </style:style>
    <style:style style:name="T58" style:family="text">
      <style:text-properties style:font-name="Arial" fo:font-size="11pt" style:font-name-asian="Arial3" style:font-size-asian="11pt" style:font-size-complex="11pt"/>
    </style:style>
    <style:style style:name="T59" style:family="text">
      <style:text-properties officeooo:rsid="01025a33"/>
    </style:style>
    <style:style style:name="T60" style:family="text">
      <style:text-properties officeooo:rsid="011143f1"/>
    </style:style>
    <style:style style:name="T61" style:family="text">
      <style:text-properties fo:color="#1f4e79" loext:opacity="100%" style:font-name="Arial" fo:font-size="16pt" fo:font-weight="bold" style:font-name-asian="Arial3" style:font-size-asian="16pt" style:font-weight-asian="bold" style:font-name-complex="Arial3" style:font-size-complex="16pt" style:font-weight-complex="bold"/>
    </style:style>
    <style:style style:name="T62" style:family="text">
      <style:text-properties fo:color="#0051c2" loext:opacity="100%" fo:font-family="'var font-mono'" fo:background-color="transparent" loext:char-shading-value="0"/>
    </style:style>
    <style:style style:name="T63" style:family="text">
      <style:text-properties fo:color="#14181f" loext:opacity="100%" fo:font-family="'var font-mono'" fo:background-color="transparent" loext:char-shading-value="0"/>
    </style:style>
    <style:style style:name="T64" style:family="text">
      <style:text-properties fo:color="#008000" loext:opacity="100%" fo:font-family="'var font-mono'" fo:background-color="transparent" loext:char-shading-value="0"/>
    </style:style>
    <style:style style:name="T65" style:family="text">
      <style:text-properties style:font-name="Arial" fo:font-size="11pt" style:font-name-asian="Arial3" style:font-size-asian="11pt" style:font-name-complex="Arial3" style:font-size-complex="11pt"/>
    </style:style>
    <style:style style:name="T66" style:family="text">
      <style:text-properties style:font-name="Arial" fo:font-size="11pt" officeooo:rsid="00d78a60" style:font-name-asian="Arial3" style:font-size-asian="11pt" style:font-name-complex="Arial3" style:font-size-complex="11pt"/>
    </style:style>
    <style:style style:name="T67" style:family="text">
      <style:text-properties fo:font-weight="bold" style:language-asian="fr" style:country-asian="FR" style:font-weight-asian="bold"/>
    </style:style>
    <style:style style:name="T68" style:family="text">
      <style:text-properties fo:font-style="italic" fo:font-weight="normal" style:font-style-asian="italic" style:font-weight-asian="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style:font-style-asian="italic" style:font-weight-asian="bold" style:font-weight-complex="bold"/>
    </style:style>
    <style:style style:name="T71" style:family="text">
      <style:text-properties fo:font-style="italic" style:text-underline-style="solid" style:text-underline-width="auto" style:text-underline-color="font-color" fo:font-weight="bold" style:font-style-asian="italic" style:font-weight-asian="bold"/>
    </style:style>
    <style:style style:name="fr1" style:family="graphic" style:parent-style-name="Graphics">
      <style:graphic-properties style:vertical-pos="from-top" style:vertical-rel="paragraph" style:horizontal-pos="from-left"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000000" draw:fill="solid" draw:fill-color="#ffffff" draw:textarea-vertical-align="top" draw:auto-grow-height="false" fo:min-height="0.73cm" fo:min-width="1.847cm" fo:padding-top="0cm" fo:padding-bottom="0cm" fo:padding-left="0cm" fo:padding-right="0cm" fo:wrap-option="wrap" loext:decorative="false" style:run-through="background"/>
    </style:style>
    <style:style style:name="gr3" style:family="graphic">
      <style:graphic-properties draw:stroke="solid" svg:stroke-width="0cm" svg:stroke-color="#000000"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gr4" style:family="graphic">
      <style:graphic-properties draw:stroke="solid" svg:stroke-width="0cm" svg:stroke-color="#000000" draw:fill="none" loext:fill-use-slide-background="false" draw:textarea-vertical-align="top" draw:auto-grow-height="false" fo:min-height="0.026cm" fo:min-width="2.805cm" fo:padding-top="0cm" fo:padding-bottom="0cm" fo:padding-left="0cm" fo:padding-right="0cm" fo:wrap-option="wrap" loext:decorative="false" style:run-through="background"/>
    </style:style>
    <style:style style:name="gr5" style:family="graphic" style:parent-style-name="Frame">
      <style:graphic-properties draw:stroke="solid" svg:stroke-width="0cm" svg:stroke-color="#000000" draw:fill="solid" draw:fill-color="#ffffff" draw:textarea-vertical-align="top" draw:auto-grow-height="false" fo:min-height="0.73cm" fo:min-width="1.672cm" fo:padding-top="0cm" fo:padding-bottom="0cm" fo:padding-left="0cm" fo:padding-right="0cm" fo:wrap-option="wrap" loext:decorative="false" style:run-through="background"/>
    </style:style>
    <style:style style:name="gr6" style:family="graphic" style:parent-style-name="Frame">
      <style:graphic-properties draw:stroke="solid" svg:stroke-width="0cm" svg:stroke-color="#000000" draw:fill="solid" draw:fill-color="#ffffff" draw:textarea-vertical-align="top" draw:auto-grow-height="false" fo:min-height="0.73cm" fo:min-width="2.489cm" fo:padding-top="0cm" fo:padding-bottom="0cm" fo:padding-left="0cm" fo:padding-right="0cm" fo:wrap-option="wrap" loext:decorative="false" style:run-through="background"/>
    </style:style>
    <style:style style:name="gr7" style:family="graphic" style:parent-style-name="Frame">
      <style:graphic-properties draw:stroke="solid" svg:stroke-width="0cm" svg:stroke-color="#000000" draw:fill="solid" draw:fill-color="#ffffff" draw:textarea-vertical-align="top" draw:auto-grow-height="false" fo:min-height="0.73cm" fo:min-width="3.189cm" fo:padding-top="0cm" fo:padding-bottom="0cm" fo:padding-left="0cm" fo:padding-right="0cm" fo:wrap-option="wrap" loext:decorative="false" style:run-through="background"/>
    </style:style>
    <style:style style:name="gr8" style:family="graphic" style:parent-style-name="Frame">
      <style:graphic-properties draw:stroke="solid" svg:stroke-width="0cm" svg:stroke-color="#000000" draw:fill="solid" draw:fill-color="#ffffff" draw:textarea-vertical-align="top" draw:auto-grow-height="false" fo:min-height="0.73cm" fo:min-width="1.901cm" fo:padding-top="0cm" fo:padding-bottom="0cm" fo:padding-left="0cm" fo:padding-right="0cm" fo:wrap-option="wrap" loext:decorative="false" style:run-through="background"/>
    </style:style>
    <style:style style:name="gr9" style:family="graphic" style:parent-style-name="Frame">
      <style:graphic-properties draw:stroke="solid" svg:stroke-width="0cm" svg:stroke-color="#000000" draw:fill="solid" draw:fill-color="#ffffff" draw:textarea-vertical-align="top" draw:auto-grow-height="false" fo:min-height="0.73cm" fo:min-width="1.258cm" fo:padding-top="0cm" fo:padding-bottom="0cm" fo:padding-left="0cm" fo:padding-right="0cm" fo:wrap-option="wrap" loext:decorative="false" style:run-through="background"/>
    </style:style>
    <style:style style:name="gr10" style:family="graphic" style:parent-style-name="Frame">
      <style:graphic-properties draw:stroke="solid" svg:stroke-width="0cm" svg:stroke-color="#000000" draw:fill="solid" draw:fill-color="#ffffff" draw:textarea-vertical-align="top" draw:auto-grow-height="false" fo:min-height="0.73cm" fo:min-width="3.129cm" fo:padding-top="0cm" fo:padding-bottom="0cm" fo:padding-left="0cm" fo:padding-right="0cm" fo:wrap-option="wrap" loext:decorative="false" style:run-through="background"/>
    </style:style>
    <style:style style:name="gr11" style:family="graphic" style:parent-style-name="Frame">
      <style:graphic-properties draw:stroke="solid" svg:stroke-width="0cm" svg:stroke-color="#000000" draw:fill="solid" draw:fill-color="#ffffff" draw:textarea-vertical-align="top" draw:auto-grow-height="false" fo:min-height="0.73cm" fo:min-width="1.191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BTS SN option IR<text:line-break/></text:span><text:span text:style-name="T3">Systèmes Numériques option Informatique et Réseaux</text:span></text:p>
      <text:p text:style-name="P2" loext:marker-style-name="T4"/>
      <text:p text:style-name="P1" loext:marker-style-name="T2"><text:span text:style-name="T2">E6.2 – PROJET INFORMATIQUE</text:span></text:p>
      <text:p text:style-name="P3" loext:marker-style-name="T5"/>
      <text:p text:style-name="P1" loext:marker-style-name="T6"><text:span text:style-name="T7">Dossier de réalisation du projet.</text:span></text:p>
      <text:p text:style-name="P4" loext:marker-style-name="T8"/>
      <text:p text:style-name="P4" loext:marker-style-name="T8"/>
      <text:p text:style-name="P4" loext:marker-style-name="T8"/>
      <table:table table:name="Tableau1" table:style-name="Tableau1">
        <table:table-column table:style-name="Tableau1.A"/>
        <table:table-column table:style-name="Tableau1.B"/>
        <table:table-row table:style-name="Tableau1.1">
          <table:table-cell table:style-name="Tableau1.A1" office:value-type="string">
            <text:p text:style-name="P5" loext:marker-style-name="T1"><text:span text:style-name="T1">Académies : Besançon-Dijon</text:span></text:p>
          </table:table-cell>
          <table:table-cell table:style-name="Tableau1.A1" office:value-type="string">
            <text:p text:style-name="P6" loext:marker-style-name="T1"><text:span text:style-name="T1">Session : 2017</text:span></text:p>
          </table:table-cell>
        </table:table-row>
        <table:table-row table:style-name="Tableau1.1">
          <table:table-cell table:style-name="Tableau1.A1" table:number-columns-spanned="2" office:value-type="string">
            <text:p text:style-name="P5" loext:marker-style-name="T1"><text:span text:style-name="T1">Lycée ou Centre de formation :</text:span></text:p>
          </table:table-cell>
          <table:covered-table-cell/>
        </table:table-row>
        <table:table-row table:style-name="Tableau1.1">
          <table:table-cell table:style-name="Tableau1.A1" table:number-columns-spanned="2" office:value-type="string">
            <text:p text:style-name="P5" loext:marker-style-name="T1"><text:span text:style-name="T1">Ville :</text:span></text:p>
          </table:table-cell>
          <table:covered-table-cell/>
        </table:table-row>
        <table:table-row table:style-name="Tableau1.1">
          <table:table-cell table:style-name="Tableau1.A1" table:number-columns-spanned="2" office:value-type="string">
            <text:p text:style-name="P5" loext:marker-style-name="T1"><text:span text:style-name="T1">Nom du projet :</text:span></text:p>
          </table:table-cell>
          <table:covered-table-cell/>
        </table:table-row>
        <table:table-row table:style-name="Tableau1.1">
          <table:table-cell table:style-name="Tableau1.A1" table:number-columns-spanned="2" office:value-type="string">
            <text:p text:style-name="P5" loext:marker-style-name="T1"><text:span text:style-name="T1">Projet industriel : <text:s text:c="10"/>OUI <text:s text:c="31"/>NON</text:span></text:p>
          </table:table-cell>
          <table:covered-table-cell/>
        </table:table-row>
      </table:table>
      <text:p text:style-name="P7" loext:marker-style-name="T9"/>
      <text:p text:style-name="P7" loext:marker-style-name="T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 loext:marker-style-name="T1"><text:span text:style-name="T6">Equipe de développement.</text:span></text:p>
          </table:table-cell>
          <table:covered-table-cell/>
        </table:table-row>
        <table:table-row table:style-name="Tableau2.1">
          <table:table-cell table:style-name="Tableau2.A1" office:value-type="string">
            <text:p text:style-name="P5" loext:marker-style-name="T1"><text:span text:style-name="T1">Professeur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L'entreprise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Interlocuteur(s) de l'entreprise.</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1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2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3 :</text:span></text:p>
          </table:table-cell>
          <table:table-cell table:style-name="Tableau2.A1" office:value-type="string">
            <text:p text:style-name="P8" loext:marker-style-name="T10"/>
          </table:table-cell>
        </table:table-row>
      </table:table>
      <text:p text:style-name="P9" loext:marker-style-name="T10"><text:span text:style-name="T10"/></text:p>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7" loext:marker-style-name="T9"/>
      <text:p text:style-name="P7"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h text:style-name="P11" text:outline-level="1"/>
      <text:h text:style-name="P12" text:outline-level="1"><text:bookmark-start text:name="_Toc470112029"/><text:soft-page-break/>P<text:bookmark-end text:name="_Toc470112029"/>résentation du projet.</text:h>
      <text:p text:style-name="P13"/>
      <text:h text:style-name="P14" text:outline-level="2"><text:span text:style-name="Strong_20_Emphasis"><text:span text:style-name="T11">PROBLÉMATIQUE DU PROJET</text:span></text:span></text:h>
      <text:p text:style-name="P15">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Heading_20_2" text:outline-level="2"><text:span text:style-name="Strong_20_Emphasis">EXPRESSION DU BESOIN</text:span></text:h>
      <text:p text:style-name="P15">Le système doit permettre à l'exploitant de piloter et surveiller à distance, depuis son smartphone, l'intégralité du cycle de séchage du houblon. Il doit automatiser la régulation de la température via le contrôle du brûleur à gaz et du ventilateur, mesurer en continu <text:span text:style-name="T12">la température</text:span>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h text:style-name="Heading_20_2" text:outline-level="2"><text:span text:style-name="Strong_20_Emphasis">RÔLES PAR ÉTUDIANT</text:span></text:h>
      <text:p text:style-name="P15">Étudiant 1 — Interface utilisateur, horloge temps réel et visualisation des données Il est responsable de la mise en œuvre de l'horloge temps réel (RTC), de l'installation du service web (Apache), <text:span text:style-name="T13">de l’instalattion et la configuration d’un service de base de donnée (BDD</text:span><text:span text:style-name="T14">),</text:span> de la conception de l'interface de saisie des paramètres utilisateur (variété, températures min/max, durée de séchage <text:span text:style-name="T15">d’un lot</text:span>) ainsi que de la visualisation des données historiques sous forme de tableaux et graphiques. Il développe également la fonctionnalité d'export CSV vers clé USB.</text:p>
      <text:p text:style-name="P16">Étudiant 2 — Acquisition des données et régulation thermique Il prend en charge le choix et la mise en œuvre de 6 capteurs de température, l'interfaçage électronique avec le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 </text:p>
      <text:p text:style-name="P16"/>
      <text:p text:style-name="P17">Étudiant 3 — Interface de contrôle du séchage, alerte visuelle et connectivité WiFi 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p>
      <text:p text:style-name="P17"/>
      <text:h text:style-name="P18" text:outline-level="2"><text:span text:style-name="Strong_20_Emphasis"/></text:h>
      <text:h text:style-name="P18" text:outline-level="2"><text:span text:style-name="Strong_20_Emphasis">STRUCTURE MATÉRIELLE ET LOGICIELLE DU SYSTÈME</text:span></text:h>
      <text:p text:style-name="P19">Matériel :</text:p>
      <text:list text:style-name="L1">
        <text:list-item>
          <text:p text:style-name="P20">Contrôleur central : Raspberry Pi <text:span text:style-name="T16">5</text:span> </text:p>
        </text:list-item>
        <text:list-item>
          <text:p text:style-name="P20">6 capteurs de température étanches, connectés en série au Raspberry <text:span text:style-name="T16">Pi</text:span></text:p>
        </text:list-item>
        <text:list-item>
          <text:p text:style-name="P20">Horloge temps réel (RTC) connectée en I2C </text:p>
        </text:list-item>
        <text:list-item>
          <text:p text:style-name="P20">Brûleur à gaz (tout ou rien) et ventilateur triphasé, commandés via des interfaces de puissance TOR (Tout Ou Rien) </text:p>
        </text:list-item>
        <text:list-item>
          <text:p text:style-name="P20">Sirène (alerte sonore) et voyant lumineux, pilotés via interfaces de puissance </text:p>
        </text:list-item>
        <text:list-item>
          <text:p text:style-name="P20"><text:soft-page-break/>Armoire électrique pré-câblée avec boutons Marche/Arrêt pour la ventilation </text:p>
        </text:list-item>
        <text:list-item>
          <text:p text:style-name="P20">Point d'accès WiFi pour la communication avec le smartphone </text:p>
        </text:list-item>
        <text:list-item>
          <text:p text:style-name="P20">Clé USB pour l'export des données CSV </text:p>
        </text:list-item>
        <text:list-item>
          <text:p text:style-name="P20">Smartphone comme terminal de supervision et de contrôle </text:p>
        </text:list-item>
      </text:list>
      <text:p text:style-name="P19">Logiciel :</text:p>
      <text:list text:style-name="L2">
        <text:list-item>
          <text:p text:style-name="P21">Système d'exploitation : Raspbian <text:span text:style-name="T17">OS 5</text:span></text:p>
        </text:list-item>
        <text:list-item>
          <text:p text:style-name="P21">Serveur web : Apache </text:p>
        </text:list-item>
        <text:list-item>
          <text:p text:style-name="P22">Serveur <text:span text:style-name="T18">php</text:span> : <text:span text:style-name="T18">php8.</text:span><text:span text:style-name="T19">3</text:span> </text:p>
        </text:list-item>
        <text:list-item>
          <text:p text:style-name="P23">Serveur <text:span text:style-name="T20">bdd</text:span> : <text:span text:style-name="T20">MariaD</text:span><text:span text:style-name="T21">B</text:span> </text:p>
        </text:list-item>
        <text:list-item>
          <text:p text:style-name="P21">Langages de développement : HTML, CSS, JavaScript, PHP, <text:span text:style-name="T22">C</text:span></text:p>
        </text:list-item>
        <text:list-item>
          <text:p text:style-name="P21">Interface utilisateur : site web responsive accessible depuis un navigateur mobile </text:p>
        </text:list-item>
        <text:list-item>
          <text:p text:style-name="P24">Fonctionnalités logicielles : régulation thermique automatique, gestion des alertes, visualisation graphique des données, export CSV</text:p>
        </text:list-item>
        <text:list-item>
          <text:p text:style-name="P24"/>
        </text:list-item>
      </text:list>
      <text:h text:style-name="P25" text:outline-level="1"><text:bookmark-start text:name="_Toc470112030"/>Analyse et spécifications<text:bookmark-end text:name="_Toc470112030"/></text:h>
      <text:h text:style-name="P26" text:outline-level="2">Diagramme de déploiement</text:h>
      <text:p text:style-name="P27">Le système s'articule autour du Raspberry Pi 5, qui constitue le nœud central de l'architecture. Côté matériel, il reçoit les données des 6 capteurs de température via une liaison série, synchronise l'heure grâce à la RTC en I2C, et pilote les trois interfaces de puissance TOR commandant respectivement le brûleur de séchage, la sirène sonore et le voyant lumineux. Côté logiciel, ce même Raspberry Pi héberge l'ensemble de la pile applicative : le service web Apache, le moteur PHP 8.3 et le serveur de base de données MariaDB. Le smartphone de l'utilisateur se connecte en WiFi et accède au site web pour superviser et contrôler le séchage en temps réel.</text:p>
      <text:p text:style-name="P27"/>
      <text:p text:style-name="P27"><draw:frame draw:style-name="fr1" draw:name="Image1" text:anchor-type="char" svg:x="-0.079cm" svg:y="0.28cm" svg:width="17.951cm" svg:height="8.022cm" draw:z-index="0"><draw:image xlink:href="Pictures/1000000000000683000002E9481009D0.png" xlink:type="simple" xlink:show="embed" xlink:actuate="onLoad" draw:mime-type="image/png"/></draw:frame></text:p>
      <text:h text:style-name="P28" text:outline-level="2"/>
      <text:h text:style-name="P28" text:outline-level="2"/>
      <text:h text:style-name="P28" text:outline-level="2"/>
      <text:h text:style-name="P28" text:outline-level="2"><text:soft-page-break/>Diagramme de cas d’utilisation générale</text:h>
      <text:p text:style-name="P29">Le système de séchage automatisé a été conçu pour répondre à un besoin concret : permettre au propriétaire de piloter et surveiller son séchoir à houblon à distance, sans nécessiter sa présence permanente sur les lieux. Pour atteindre cet objectif, le système offre un ensemble de fonctionnalités couvrant l'intégralité du cycle de séchage, depuis le paramétrage initial jusqu'à l'archivage des données de production. Le propriétaire peut ainsi configurer les paramètres de séchage, superviser en temps réel l'état du système, être alerté en cas d'anomalie ou de fin de cycle, et consulter l'historique des sessions passées.</text:p>
      <text:p text:style-name="Standard"/>
      <text:p text:style-name="Standard"><draw:frame draw:style-name="fr2" draw:name="Image2" text:anchor-type="char" svg:x="0.106cm" svg:y="0.266cm" svg:width="15.166cm" svg:height="10.903cm" draw:z-index="1"><draw:image xlink:href="Pictures/10000000000003F6000002D99E63D3C3.png" xlink:type="simple" xlink:show="embed" xlink:actuate="onLoad" draw:mime-type="image/png"/></draw:frame></text:p>
      <text:h text:style-name="Heading_20_2" text:outline-level="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1" text:outline-level="2"/>
      <text:h text:style-name="P32" text:outline-level="2"/>
      <text:h text:style-name="P32" text:outline-level="2"/>
      <text:h text:style-name="P32" text:outline-level="2"/>
      <text:h text:style-name="P32" text:outline-level="2"/>
      <text:p text:style-name="P33"/>
      <text:h text:style-name="Heading_20_2" text:outline-level="2">Diagramme d'exigences — RTC et Base de données</text:h>
      <text:p text:style-name="P33">Deux composants sont au cœur de la fiabilité du système : l'horloge temps réel (RTC) et la base de données. La RTC est indispensable pour garantir un horodatage précis de toutes les actions et mesures enregistrées tout au long du cycle de séchage. Elle doit maintenir l'heure même en cas de coupure de courant et communique avec le Raspberry Pi via le protocole I2C. Le fuseau horaire est configuré en UTC+1 en hiver et UTC+2 en été afin d'assurer une cohérence temporelle des données. La base de données, quant à elle, est hébergée directement sur le Raspberry Pi et repose sur le moteur MariaDB. Elle a pour rôle de centraliser et conserver l'ensemble des données du système, qu'il s'agisse des mesures de température, des événements de chauffage, des alertes ou encore des informations liées aux variétés de houblon produites. Une convention de nommage claire a été définie pour garantir la lisibilité et la maintenabilité de la base.</text:p>
      <text:p text:style-name="P34"><draw:frame draw:style-name="fr2" draw:name="Image4" text:anchor-type="char" svg:x="-0.951cm" svg:y="0.385cm" svg:width="20.519cm" svg:height="8.698cm" draw:z-index="2"><draw:image xlink:href="Pictures/10000000000006BA000002DA5F23AAF7.png" xlink:type="simple" xlink:show="embed" xlink:actuate="onLoad" draw:mime-type="image/png"/></draw:frame><text:soft-page-break/><text:span text:style-name="Strong_20_Emphasis"/></text:p>
      <text:p text:style-name="P35"><text:span text:style-name="Strong_20_Emphasis">Diagramme d'exigences — Service web</text:span></text:p>
      <text:p text:style-name="P35">L'interface utilisateur du système repose entièrement sur un service web hébergé directement sur le Raspberry Pi, accessible depuis le smartphone du propriétaire via le point d'accès WiFi dédié. Ce service web est composé d'un serveur Apache 2 qui héberge les pages du site, et d'un serveur PHP 8.4 qui se charge d'exécuter la logique applicative côté serveur. Le site respecte une charte graphique définie en accord avec le client afin de garantir une expérience utilisateur cohérente et agréable. Le service web communique à la fois avec le Raspberry Pi pour récupérer l'état du système en temps réel, et avec la base de données pour lire et écrire les informations liées aux cycles de séchage. C'est donc par ce biais que l'utilisateur interagit avec l'ensemble du système, sans avoir besoin d'installer la moindre application sur son <draw:frame draw:style-name="fr2" draw:name="Image5" text:anchor-type="char" svg:x="-0.132cm" svg:y="6.697cm" svg:width="18.602cm" svg:height="9.054cm" draw:z-index="3"><draw:image xlink:href="Pictures/100000000000060B000002F10462C7B1.png" xlink:type="simple" xlink:show="embed" xlink:actuate="onLoad" draw:mime-type="image/png"/></draw:frame>téléphone.</text:p>
      <text:p text:style-name="P33"/>
      <text:section text:style-name="Sect1" text:name="proteger" text:protected="true">
        <text:h text:style-name="P32" text:outline-level="2"><text:soft-page-break/></text:h>
        <text:h text:style-name="P36" text:outline-level="2"><text:span text:style-name="T23">Diagramme de </text:span><text:span text:style-name="T24">séquence</text:span></text:h>
        <text:p text:style-name="P30"/>
        <text:p text:style-name="P30">Le cycle de séchage débute par la saisie des paramètres par l'utilisateur, tels que la variété de houblon, les températures minimale et maximale ainsi que la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du smartphone. Si la température moyenne descend en dessous du seuil minimal configuré, le brûleur est automatiquement allumé pour réchauffer l'air. À l'inverse, si elle dépasse le seuil maximal, le brûleur est immédiatement coupé pour éviter tout endommagement du houblon. En parallèle, le temps restant avant la fin du cycle est calculé et affiché en permanence. Lorsque la durée de séchage est écoulée, le système arrête le chauffage et en informe l'utilisateur via une alerte visuelle. </text:p>
        <text:p text:style-name="P30"><draw:frame draw:style-name="fr2" draw:name="Image3" text:anchor-type="char" svg:x="0.007cm" svg:y="0.462cm" svg:width="18.053cm" svg:height="19.032cm" draw:z-index="4"><draw:image xlink:href="Pictures/100000000000032A00000356EFECBA0E.png" xlink:type="simple" xlink:show="embed" xlink:actuate="onLoad" draw:mime-type="image/png"/></draw:frame></text:p>
        <text:p text:style-name="P30"/>
      </text:section>
      <text:p text:style-name="P30"><text:soft-page-break/></text:p>
      <text:p text:style-name="P30">Et <text:span text:style-name="T25">c</text:span>hangement fait pendant le developpement</text:p>
      <text:p text:style-name="P37" loext:marker-style-name="T9">Et les test fait sur le système</text:p>
      <text:p text:style-name="P10" loext:marker-style-name="T9"/>
      <text:h text:style-name="P38" text:outline-level="1"><text:bookmark-start text:name="_Toc470112034"/>Méthodologie de prise en compte des contraintes du cahier des charges.<text:bookmark-end text:name="_Toc470112034"/></text:h>
      <text:p text:style-name="P39">???? </text:p>
      <text:p text:style-name="P40" loext:marker-style-name="T9"/>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text:bookmark-start text:name="_Toc470112040"/><text:soft-page-break/><text:span text:style-name="T26">Présentation du travail du candidat N°</text:span><text:bookmark-end text:name="_Toc470112040"/><text:span text:style-name="T27">1</text:span><text:span text:style-name="T28"> – Lénny Sauvage</text:span></text:h>
      <text:p text:style-name="P42"/>
      <text:p text:style-name="P43">Mon projet ce basé en grande partie sur la configuration de la Raspberry Pi <text:span text:style-name="T29">et sur le dévellopement d’IHM.</text:span></text:p>
      <text:p text:style-name="P44"/>
      <text:h text:style-name="P45" text:outline-level="1">1. Configuration du service Web (Apache 2 + PHP)</text:h>
      <text:h text:style-name="P46" text:outline-level="2"><text:span text:style-name="T30">1.1 - </text:span>Contexte et objectif</text:h>
      <text:p text:style-name="P47">Dans le cadre du projet Séchoir à Houblon, 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48">Le serveur web est hébergé sur <text:span text:style-name="T31">la Raspbery Pi </text:span><text:span text:style-name="T32">5 </text:span>et constitue le point d’entrée unique pour :</text:p>
      <text:list text:style-name="L3">
        <text:list-item>
          <text:p text:style-name="P49">la consultation des températures </text:p>
        </text:list-item>
        <text:list-item>
          <text:p text:style-name="P49">le paramétrage du séchage </text:p>
        </text:list-item>
        <text:list-item>
          <text:p text:style-name="P49">le pilotage du cycle (démarrage / arrêt) </text:p>
        </text:list-item>
        <text:list-item>
          <text:p text:style-name="P50">la visualisation et l’export des données </text:p>
        </text:list-item>
      </text:list>
      <text:h text:style-name="P51" text:outline-level="2"><text:span text:style-name="T30">1.</text:span><text:span text:style-name="T33">2</text:span><text:span text:style-name="T30"> - </text:span>Choix techniques</text:h>
      <text:p text:style-name="P52"><text:span text:style-name="T34">Environnement technique</text:span> retenue repose sur les technologies imposées par le cahier des charges :</text:p>
      <text:list xml:id="list3128492063" text:style-name="WWNum2">
        <text:list-item text:start-value="1">
          <text:p text:style-name="P53">Apache 2 : serveur HTTP, choisi pour sa robustesse, sa disponibilité sur Raspberry Pi OS et sa large documentation.</text:p>
        </text:list-item>
        <text:list-item>
          <text:p text:style-name="P53">PHP 8.4 : langage serveur permettant l'exécution de scripts et l'accès à la base de données MySQL.</text:p>
        </text:list-item>
        <text:list-item>
          <text:p text:style-name="P54">HTML5 / CSS3 / JavaScript : couche présentation côté navigateur, avec appels asynchrones (fetch) vers les scripts PHP.</text:p>
        </text:list-item>
      </text:list>
      <text:p text:style-name="P55"/>
      <text:h text:style-name="P56" text:outline-level="2"><text:span text:style-name="T30">1.</text:span><text:span text:style-name="T33">3</text:span><text:span text:style-name="T30"> - </text:span>Périmètre de ma réalisation</text:h>
      <text:p text:style-name="P57"/>
      <text:p text:style-name="P52">Ma contribution sur ce volet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p text:style-name="P58"/>
      <text:h text:style-name="P59" text:outline-level="2"><text:span text:style-name="T35">1.</text:span><text:span text:style-name="T36">4</text:span><text:span text:style-name="T35"> - </text:span>Installation et configuration d’Apache</text:h>
      <text:p text:style-name="P60"/>
      <text:p text:style-name="P61">L’installation du serveur web a été réalisée sur une Raspberry Pi <text:span text:style-name="T37">5</text:span> sous Raspberry Pi OS via le gestionnaire de paquets AP<text:span text:style-name="T38">T. </text:span>Une vérification du bon fonctionnement a été effectuée en accédant à la page par défaut du serveur depuis un navigateur web sur le réseau local. </text:p>
      <text:p text:style-name="P61">Le service Apache a ensuite été configuré pour démarrer automatiquement au démarrage du système, garantissant la disponibilité permanente de l’interface utilisateur.</text:p>
      <text:p text:style-name="P61"/>
      <text:p text:style-name="P62"/>
      <text:p text:style-name="P62"/>
      <text:p text:style-name="P63"><text:soft-page-break/><text:span text:style-name="T39">1.</text:span><text:span text:style-name="T40">5</text:span><text:span text:style-name="T39"> - </text:span><text:span text:style-name="T41">Installation et configuration</text:span><text:span text:style-name="T42"> de</text:span><text:span text:style-name="T43"> </text:span><text:span text:style-name="T42">PHP</text:span></text:p>
      <text:p text:style-name="P64">Le module PHP a été installé et intégré à Apache afin de permettre l’exécution de scripts côté serveur.</text:p>
      <text:p text:style-name="P65">Cette étape est essentielle car l’ensemble de la logique métier (traitement des données, interaction avec la base) repose sur PHP.</text:p>
      <text:p text:style-name="P64"/>
      <text:h text:style-name="P66" text:outline-level="2">Organisation du site</text:h>
      <text:p text:style-name="Standard"><text:span text:style-name="T44">Le site est déployé dans : </text:span><text:span text:style-name="Source_20_Text"><text:span text:style-name="T45">/var/www/htm</text:span></text:span><text:span text:style-name="Source_20_Text"><text:span text:style-name="T46">l</text:span></text:span></text:p>
      <text:p text:style-name="P42">Structure mise en place :</text:p>
      <text:list text:style-name="L4">
        <text:list-item>
          <text:p text:style-name="P67"><text:span text:style-name="Source_20_Text"><text:span text:style-name="T44">api/</text:span></text:span><text:span text:style-name="T44"> : scripts PHP (traitement, accès BDD) <text:s/></text:span></text:p>
        </text:list-item>
        <text:list-item>
          <text:p text:style-name="P67"><text:span text:style-name="Source_20_Text"><text:span text:style-name="T47">site</text:span></text:span><text:span text:style-name="Source_20_Text"><text:span text:style-name="T44">/</text:span></text:span><text:span text:style-name="T44"> : pages HTML </text:span></text:p>
        </text:list-item>
        <text:list-item>
          <text:p text:style-name="P67"><text:span text:style-name="Source_20_Text"><text:span text:style-name="T48">csv</text:span></text:span><text:span text:style-name="Source_20_Text"><text:span text:style-name="T44">/</text:span></text:span><text:span text:style-name="T44"> : fichiers CSV générés </text:span></text:p>
        </text:list-item>
      </text:list>
      <text:p text:style-name="P42">Cette organisation permet une séparation claire entre front-end et back-end.</text:p>
      <text:p text:style-name="P42"/>
      <text:p text:style-name="P42"/>
      <text:p text:style-name="P42"/>
      <text:p text:style-name="P42"/>
      <text:p text:style-name="P68"><text:span text:style-name="Strong_20_Emphasis">1.</text:span><text:span text:style-name="Strong_20_Emphasis"><text:span text:style-name="T49">7</text:span></text:span><text:span text:style-name="Strong_20_Emphasis"> - Droits d'accès et sécurité (principe de moindre privilège)</text:span></text:p>
      <text:p text:style-name="P69">La politique de sécurité appliquée repose sur le principe de moindre privilège : le processus Apache s'exécute sous l'utilisateur système <text:span text:style-name="Source_20_Text"><text:span text:style-name="T44">www-data</text:span></text:span>, qui ne dispose que des droits strictement nécessaires à son fonctionnement.</text:p>
      <text:p text:style-name="P69">Les droits ont été configurés comme suit :</text:p>
      <text:list text:style-name="L5">
        <text:list-item>
          <text:p text:style-name="P70"><text:span text:style-name="Source_20_Text"><text:span text:style-name="T44">/var/www/html</text:span></text:span> et ses sous-dossiers : propriétaire <text:span text:style-name="Source_20_Text"><text:span text:style-name="T44">www-data:www-data</text:span></text:span>, droits <text:span text:style-name="Source_20_Text"><text:span text:style-name="T44">500</text:span></text:span> (<text:span text:style-name="Source_20_Text"><text:span text:style-name="T44">dr-x------</text:span></text:span>). L'utilisateur peut parcourir l'arborescence et entrer dans les dossiers, sans pouvoir écrire. </text:p>
        </text:list-item>
        <text:list-item>
          <text:p text:style-name="P70">Les fichiers du site : propriétaire <text:span text:style-name="Source_20_Text"><text:span text:style-name="T44">www-data:www-data</text:span></text:span>, droits <text:span text:style-name="Source_20_Text"><text:span text:style-name="T44">400</text:span></text:span> (<text:span text:style-name="Source_20_Text"><text:span text:style-name="T44">-r--------</text:span></text:span>). Lecture seule. </text:p>
        </text:list-item>
        <text:list-item>
          <text:p text:style-name="P70"><text:span text:style-name="Source_20_Text"><text:span text:style-name="T44">/var/log/apache2/access.log</text:span></text:span> et <text:span text:style-name="Source_20_Text"><text:span text:style-name="T44">error.log</text:span></text:span> : droits <text:span text:style-name="Source_20_Text"><text:span text:style-name="T44">600</text:span></text:span> (<text:span text:style-name="Source_20_Text"><text:span text:style-name="T44">-rw-------</text:span></text:span>), permettant à Apache d'écrire les journaux. </text:p>
        </text:list-item>
        <text:list-item>
          <text:p text:style-name="P71">Le répertoire de configuration <text:span text:style-name="Source_20_Text"><text:span text:style-name="T44">/etc/apache2/</text:span></text:span> est réservé à <text:span text:style-name="Source_20_Text"><text:span text:style-name="T44">root:root</text:span></text:span> avec droits <text:span text:style-name="Source_20_Text"><text:span text:style-name="T44">700</text:span></text:span>, appliqués récursivement. </text:p>
        </text:list-item>
      </text:list>
      <text:p text:style-name="P69">Cette configuration garantit qu'une éventuelle faille dans le site web ne permettrait pas à un attaquant d'écrire ou de modifier des fichiers système.</text:p>
      <text:p text:style-name="P72"/>
      <text:p text:style-name="P69"><text:span text:style-name="Strong_20_Emphasis">1.</text:span><text:span text:style-name="Strong_20_Emphasis"><text:span text:style-name="T49">8</text:span></text:span><text:span text:style-name="Strong_20_Emphasis"> - Configuration du VirtualHost</text:span></text:p>
      <text:p text:style-name="P69">Le serveur Apache est configuré via un fichier VirtualHost situé dans <text:span text:style-name="Source_20_Text"><text:span text:style-name="T44">/etc/apache2/sites-available/</text:span></text:span>. Ce fichier définit les paramètres de service du site :</text:p>
      <text:list text:style-name="L6">
        <text:list-item>
          <text:p text:style-name="P73"><text:span text:style-name="Strong_20_Emphasis">Port d'écoute</text:span> : 80 (HTTP) </text:p>
        </text:list-item>
        <text:list-item>
          <text:p text:style-name="P73"><text:span text:style-name="Strong_20_Emphasis">Répertoire racine</text:span> : <text:span text:style-name="Source_20_Text"><text:span text:style-name="T44">/var/www/html</text:span></text:span> </text:p>
        </text:list-item>
        <text:list-item>
          <text:p text:style-name="P73"><text:span text:style-name="Strong_20_Emphasis">Journaux d'accès</text:span> : <text:span text:style-name="Source_20_Text"><text:span text:style-name="T44">/var/log/apache2/access.log</text:span></text:span> </text:p>
        </text:list-item>
        <text:list-item>
          <text:p text:style-name="P74"><text:soft-page-break/><text:span text:style-name="Strong_20_Emphasis">Journaux d'erreurs</text:span> : <text:span text:style-name="Source_20_Text"><text:span text:style-name="T44">/var/log/apache2/error.log</text:span></text:span> </text:p>
        </text:list-item>
      </text:list>
      <text:p text:style-name="P69">Le fichier actif dans <text:span text:style-name="Source_20_Text"><text:span text:style-name="T44">sites-enabled/</text:span></text:span> est un lien symbolique vers ce fichier disponible. Toute modification doit donc être effectuée dans <text:span text:style-name="Source_20_Text"><text:span text:style-name="T44">sites-available/</text:span></text:span> pour être prise en compte.</text:p>
      <text:p text:style-name="P75"/>
      <text:p text:style-name="P68"><text:span text:style-name="Strong_20_Emphasis">1.</text:span><text:span text:style-name="Strong_20_Emphasis"><text:span text:style-name="T49">10</text:span></text:span><text:span text:style-name="Strong_20_Emphasis"> - Fonctionnement des échanges front-end / back-end</text:span></text:p>
      <text:p text:style-name="P76"><text:span text:style-name="T50">Les pages du site ne se rechargent pas lors des interactions de l'utilisateur. La communication entre le navigateur et le serveur s'effectue de manière asynchrone via l'API </text:span><text:span text:style-name="Source_20_Text"><text:span text:style-name="T51">fetch</text:span></text:span><text:span text:style-name="T50"> de JavaScript.</text:span></text:p>
      <text:p text:style-name="P77">Schéma de fonctionnement :</text:p>
      <text:list text:style-name="L7">
        <text:list-item>
          <text:p text:style-name="P78">L'utilisateur interagit avec l'interface (bouton, formulaire). </text:p>
        </text:list-item>
        <text:list-item>
          <text:p text:style-name="P78">Le JavaScript effectue une requête HTTP vers un script PHP de l'API. </text:p>
        </text:list-item>
        <text:list-item>
          <text:p text:style-name="P78">Le script PHP traite la demande, interroge ou met à jour la base de données MySQL, puis retourne une réponse au format JSON. </text:p>
        </text:list-item>
        <text:list-item>
          <text:p text:style-name="P78">Le JavaScript interprète la réponse JSON et met à jour dynamiquement l'affichage sans rechargement de page. </text:p>
        </text:list-item>
      </text:list>
      <text:p text:style-name="P79"><text:span text:style-name="T50">Exemple de retour JSON du script </text:span><text:span text:style-name="Source_20_Text"><text:span text:style-name="T51">get_temperature.php</text:span></text:span><text:span text:style-name="T50"> :</text:span></text:p>
      <text:p text:style-name="P80">json</text:p>
      <text:p text:style-name="P81"><text:span text:style-name="Source_20_Text"><text:span text:style-name="T52">[</text:span></text:span></text:p>
      <text:p text:style-name="P81"><text:span text:style-name="Source_20_Text"><text:span text:style-name="T53"><text:s text:c="2"/></text:span></text:span><text:span text:style-name="Source_20_Text"><text:span text:style-name="T52">{</text:span></text:span><text:span text:style-name="Source_20_Text"><text:span text:style-name="T54">"id_capt"</text:span></text:span><text:span text:style-name="Source_20_Text"><text:span text:style-name="T53">: </text:span></text:span><text:span text:style-name="Source_20_Text"><text:span text:style-name="T55">1</text:span></text:span><text:span text:style-name="Source_20_Text"><text:span text:style-name="T52">,</text:span></text:span><text:span text:style-name="Source_20_Text"><text:span text:style-name="T53"> </text:span></text:span><text:span text:style-name="Source_20_Text"><text:span text:style-name="T54">"temp_valeur"</text:span></text:span><text:span text:style-name="Source_20_Text"><text:span text:style-name="T53">: </text:span></text:span><text:span text:style-name="Source_20_Text"><text:span text:style-name="T55">52.3</text:span></text:span><text:span text:style-name="Source_20_Text"><text:span text:style-name="T52">,</text:span></text:span><text:span text:style-name="Source_20_Text"><text:span text:style-name="T53"> </text:span></text:span><text:span text:style-name="Source_20_Text"><text:span text:style-name="T54">"temp_date_mesure"</text:span></text:span><text:span text:style-name="Source_20_Text"><text:span text:style-name="T53">: </text:span></text:span><text:span text:style-name="Source_20_Text"><text:span text:style-name="T56">"2026-03-05 10:12:00"</text:span></text:span><text:span text:style-name="Source_20_Text"><text:span text:style-name="T52">},</text:span></text:span></text:p>
      <text:p text:style-name="P81"><text:span text:style-name="Source_20_Text"><text:span text:style-name="T53"><text:s text:c="2"/></text:span></text:span><text:span text:style-name="Source_20_Text"><text:span text:style-name="T52">{</text:span></text:span><text:span text:style-name="Source_20_Text"><text:span text:style-name="T54">"id_capt"</text:span></text:span><text:span text:style-name="Source_20_Text"><text:span text:style-name="T53">: </text:span></text:span><text:span text:style-name="Source_20_Text"><text:span text:style-name="T55">2</text:span></text:span><text:span text:style-name="Source_20_Text"><text:span text:style-name="T52">,</text:span></text:span><text:span text:style-name="Source_20_Text"><text:span text:style-name="T53"> </text:span></text:span><text:span text:style-name="Source_20_Text"><text:span text:style-name="T54">"temp_valeur"</text:span></text:span><text:span text:style-name="Source_20_Text"><text:span text:style-name="T53">: </text:span></text:span><text:span text:style-name="Source_20_Text"><text:span text:style-name="T55">53.1</text:span></text:span><text:span text:style-name="Source_20_Text"><text:span text:style-name="T52">,</text:span></text:span><text:span text:style-name="Source_20_Text"><text:span text:style-name="T53"> </text:span></text:span><text:span text:style-name="Source_20_Text"><text:span text:style-name="T54">"temp_date_mesure"</text:span></text:span><text:span text:style-name="Source_20_Text"><text:span text:style-name="T53">: </text:span></text:span><text:span text:style-name="Source_20_Text"><text:span text:style-name="T56">"2026-03-05 10:12:00"</text:span></text:span><text:span text:style-name="Source_20_Text"><text:span text:style-name="T52">},</text:span></text:span></text:p>
      <text:p text:style-name="P81"><text:span text:style-name="Source_20_Text"><text:span text:style-name="T53"><text:s text:c="2"/></text:span></text:span><text:span text:style-name="Source_20_Text"><text:span text:style-name="T52">{</text:span></text:span><text:span text:style-name="Source_20_Text"><text:span text:style-name="T54">"id_capt"</text:span></text:span><text:span text:style-name="Source_20_Text"><text:span text:style-name="T53">: </text:span></text:span><text:span text:style-name="Source_20_Text"><text:span text:style-name="T55">3</text:span></text:span><text:span text:style-name="Source_20_Text"><text:span text:style-name="T52">,</text:span></text:span><text:span text:style-name="Source_20_Text"><text:span text:style-name="T53"> </text:span></text:span><text:span text:style-name="Source_20_Text"><text:span text:style-name="T54">"temp_valeur"</text:span></text:span><text:span text:style-name="Source_20_Text"><text:span text:style-name="T53">: </text:span></text:span><text:span text:style-name="Source_20_Text"><text:span text:style-name="T55">51.8</text:span></text:span><text:span text:style-name="Source_20_Text"><text:span text:style-name="T52">,</text:span></text:span><text:span text:style-name="Source_20_Text"><text:span text:style-name="T53"> </text:span></text:span><text:span text:style-name="Source_20_Text"><text:span text:style-name="T54">"temp_date_mesure"</text:span></text:span><text:span text:style-name="Source_20_Text"><text:span text:style-name="T53">: </text:span></text:span><text:span text:style-name="Source_20_Text"><text:span text:style-name="T56">"2026-03-05 10:12:00"</text:span></text:span><text:span text:style-name="Source_20_Text"><text:span text:style-name="T52">}</text:span></text:span></text:p>
      <text:p text:style-name="P81"><text:span text:style-name="Source_20_Text"><text:span text:style-name="T52">]</text:span></text:span></text:p>
      <text:p text:style-name="P77">Cette approche permet une interface fluide et réactive, adaptée à une utilisation depuis un smartphone, sans nécessiter de framework JavaScript lourd.</text:p>
      <text:p text:style-name="P82"/>
      <text:p text:style-name="P75"/>
      <text:p text:style-name="P75"/>
      <text:p text:style-name="P83"/>
      <text:p text:style-name="P83"/>
      <text:p text:style-name="P83"/>
      <text:p text:style-name="P83"/>
      <text:p text:style-name="P83"/>
      <text:p text:style-name="P83"/>
      <text:p text:style-name="P83"/>
      <text:h text:style-name="P84" text:outline-level="1"/>
      <text:h text:style-name="P84" text:outline-level="1"/>
      <text:h text:style-name="P84" text:outline-level="1"/>
      <text:h text:style-name="P84" text:outline-level="1"><text:soft-page-break/>2. Configuration du service Base de Données (MySQL)</text:h>
      <text:h text:style-name="P85" text:outline-level="2">Contexte et objectif</text:h>
      <text:p text:style-name="P86">L'enregistrement fiable des données est une exigence centrale du projet : températures relevées toutes les 30 minutes, événements système, cycles de séchage, lots et variétés de houblon, masses produites. Une base de données relationnelle MySQL a été retenue pour structurer, stocker et restituer ces informations.</text:p>
      <text:p text:style-name="P86">L'objectif est de permettre à l'agriculteur de disposer d'un historique complet et cohérent, utilisable à la fois pour le suivi en temps réel via l'interface web et pour l'analyse rétrospective des campagnes de séchage.</text:p>
      <text:h text:style-name="P85" text:outline-level="2">Architecture de la base</text:h>
      <text:p text:style-name="P87">La base de données, utilisée par le compte www-data, est organisée autour de neuf tables couvrant l'ensemble du cycle de vie d'un lot de houblon :</text:p>
      <text:list text:style-name="L8">
        <text:list-item>
          <text:p text:style-name="P88"><text:span text:style-name="Strong_20_Emphasis">pause</text:span> : enregistre les pauses horodatées survenant durant le fonctionnement du séchoir.</text:p>
        </text:list-item>
      </text:list>
      <text:list xml:id="list154142528758198" text:continue-list="list3128492063" text:style-name="L9">
        <text:list-item>
          <text:p text:style-name="P89"><text:span text:style-name="Strong_20_Emphasis">variete</text:span> : référentiel des variétés de houblon disponibles et désactivées. </text:p>
        </text:list-item>
        <text:list-item text:style-override="L10">
          <text:p text:style-name="P90"><text:span text:style-name="Strong_20_Emphasis">masse</text:span> : enregistre la masse de houblon produite à l'issue du séchage. </text:p>
        </text:list-item>
        <text:list-item text:style-override="L11">
          <text:p text:style-name="P91"><text:span text:style-name="Strong_20_Emphasis">etage</text:span> : données statiques représentant les étages physiques du séchoir. </text:p>
        </text:list-item>
        <text:list-item text:style-override="L12">
          <text:p text:style-name="P92"><text:span text:style-name="Strong_20_Emphasis">etatSechoir</text:span> : table d'état courant du séchoir, <text:span text:style-name="T57">utile pour avoir des « variables globale ».</text:span></text:p>
        </text:list-item>
        <text:list-item text:style-override="L13">
          <text:p text:style-name="P93"><text:span text:style-name="Strong_20_Emphasis">capteur</text:span> : référence les capteurs de température actifs et inactifs du système. </text:p>
        </text:list-item>
        <text:list-item text:style-override="L14">
          <text:p text:style-name="P94"><text:span text:style-name="Strong_20_Emphasis">lot</text:span> : table centrale, suit un cycle complet de production pour une variété donnée. </text:p>
        </text:list-item>
        <text:list-item text:style-override="L15">
          <text:p text:style-name="P95"><text:span text:style-name="Strong_20_Emphasis">temperature</text:span> : stocke les mesures de température relevées par les capteurs. </text:p>
        </text:list-item>
        <text:list-item text:style-override="L16">
          <text:p text:style-name="P96"><text:span text:style-name="Strong_20_Emphasis"><text:span text:style-name="T58">lotEtage</text:span></text:span><text:span text:style-name="T58"> : table d'association reliant un lot à son étage courant et traçant ses changements d'étage. </text:span></text:p>
        </text:list-item>
      </text:list>
      <text:h text:style-name="P97" text:outline-level="2">Périmètre de ma réalisation</text:h>
      <text:p text:style-name="P86">Mon travail sur ce volet a couvert la conception du schéma relationnel, la création des tables avec leurs contraintes d'intégrité (clés primaires, clés étrangères, valeurs nullables), ainsi que la définition des stratégies d'enregistrement pour chaque table.</text:p>
      <text:p text:style-name="P98"><text:s/></text:p>
      <text:h text:style-name="P99" text:outline-level="2">Le MCD</text:h>
      <text:p text:style-name="P100"/>
      <text:p text:style-name="P101">Un Modèle Conceptuel de Données (MCD) est structuré autour de trois éléments principaux : les entités, les associations et les attributs.<text:line-break/>Une <text:span text:style-name="T11">entité</text:span> représente un objet du système (par exemple un lot de houblon), tandis que les <text:span text:style-name="T11">attributs</text:span> décrivent ses propriétés (variété, taux de remplissage, temps de séchage).<text:line-break/>Les <text:span text:style-name="T11">associations</text:span> permettent de modéliser les liens entre différentes entités.</text:p>
      <text:p text:style-name="P102">La lecture des associations entre entités consiste à interpréter les cardinalités.<text:line-break/>L’exemple ci-dessous associe un « lot » à une « variété ».<text:line-break/>Un lot appartient à une et une seule variété.<text:line-break/>Une variété peut être associée à zéro à plusieurs lots.</text:p>
      <text:p text:style-name="P102">Les cardinalités se lisent de la manière suivante :</text:p>
      <text:p text:style-name="P103">(1,1) → 1 et 1 seul<text:tab/><text:tab/>(0,1) → 0 ou 1<text:tab/><text:tab/><text:span text:style-name="T59">(1,n) → entre 1 et n<text:tab/><text:tab/>(0,n) → entre 0 et n</text:span></text:p>
      <text:p text:style-name="P103"/>
      <text:p text:style-name="P104">Lire un MCD consiste a formuler des phrases décrivant le système, et ceci ce fait via les association et ses cardinalité qu’on vient de décrire.</text:p>
      <text:p text:style-name="P103"/>
      <text:p text:style-name="P105"/>
      <text:p text:style-name="P105"><draw:frame draw:style-name="fr3" draw:name="Image6" text:anchor-type="char" svg:x="-0.55cm" svg:y="0.284cm" svg:width="19.741cm" svg:height="8.67cm" draw:z-index="5"><draw:image xlink:href="Pictures/10000000000006DA0000031B031F7B74.png" xlink:type="simple" xlink:show="embed" xlink:actuate="onLoad" draw:mime-type="image/png"/></draw:frame><text:soft-page-break/></text:p>
      <text:p text:style-name="P105"/>
      <text:h text:style-name="P106" text:outline-level="2">Le M<text:span text:style-name="T60">L</text:span>D</text:h>
      <text:p text:style-name="P107"/>
      <text:p text:style-name="P108">Le Modèle Logique de Données (MLD) est une traduction du MCD dans un format adapté à une implémentation en base de données relationnelle. Il conserve la structure du MCD tout en introduisant des notions techniques comme les tables, les clés primaires et les clés étrangères.</text:p>
      <text:p text:style-name="P109">Dans le MLD, chaque entité du MCD devient une table. Les attributs de l’entité deviennent les colonnes de cette table. Chaque table possède une clé primaire, qui permet d’identifier de manière unique chaque enregistrement.</text:p>
      <text:p text:style-name="P110">Le passage du MCD au MLD dépend des cardinalités, une relation :</text:p>
      <text:list text:style-name="L17">
        <text:list-item>
          <text:p text:style-name="P111">(1,1) se traduit par une clé étrangère dans l’une des deux tables.</text:p>
        </text:list-item>
        <text:list-item>
          <text:p text:style-name="P112">(1,n) se traduit par une clé étrangère du côté “n”.</text:p>
        </text:list-item>
        <text:list-item>
          <text:p text:style-name="P112">(n,n) nécessite la création d’une table intermédiaire.</text:p>
        </text:list-item>
      </text:list>
      <text:p text:style-name="P108"><draw:frame draw:style-name="fr3" draw:name="Image7" text:anchor-type="char" svg:x="-0.337cm" svg:y="0.321cm" svg:width="18.96cm" svg:height="8.855cm" draw:z-index="6"><draw:image xlink:href="Pictures/10000000000006CF0000032E52F48D71.png" xlink:type="simple" xlink:show="embed" xlink:actuate="onLoad" draw:mime-type="image/png"/></draw:frame></text:p>
      <text:h text:style-name="P113" text:outline-level="1"><text:soft-page-break/><text:span text:style-name="T61">3. Configuration de l'horloge temps réel (RTC)</text:span></text:h>
      <text:p text:style-name="P114"/>
      <text:h text:style-name="P115" text:outline-level="2">Contexte et objectif</text:h>
      <text:p text:style-name="P116">Le séchoir est déployé dans une zone blanche, sans accès à Internet. La Raspberry Pi ne peut donc pas synchroniser son horloge via un serveur NTP. Or, l'horodatage correct de toutes les mesures et événements est une condition sine-qua-non de fiabilité du système : des timestamps erronés rendraient l'historique inexploitable.</text:p>
      <text:p text:style-name="P116">L'ajout d'une horloge temps réel (RTC) permet de conserver l'heure exacte même après une coupure d'alimentation, garantissant ainsi la cohérence des logs à chaque redémarrage.</text:p>
      <text:p text:style-name="P114"/>
      <text:h text:style-name="P115" text:outline-level="2">Solution retenue</text:h>
      <text:p text:style-name="P116">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p text:style-name="P114"/>
      <text:h text:style-name="P115" text:outline-level="2">Périmètre de ma réalisation</text:h>
      <text:p text:style-name="P116">J'ai réalisé une étude comparative des modules RTC externes courants (DS1307, DS3231, PCF8523) afin d'argumenter le choix technique. J'ai ensuite procédé à la configuration système : désactivation du faux RTC logiciel (fake-hwclock), réglage manuel de l'heure et écriture dans la RTC (hwclock -w), puis vérification du bon fonctionnement après coupure d'alimentation. La procédure complète est documentée pour la Raspberry Pi 3 (avec module I2C) et pour la Raspberry Pi 5 (RTC interne).</text:p>
      <text:p text:style-name="P116"/>
      <text:p text:style-name="P116"/>
      <text:p text:style-name="P117"><text:span text:style-name="Strong_20_Emphasis">Étude comparative des modules RTC externes</text:span></text:p>
      <text:p text:style-name="P118">Avant la mise à disposition de la Raspberry Pi 5, une analyse des modules RTC disponibles sur le marché a été conduite afin de sélectionner le composant le plus adapté aux contraintes du projet : déploiement en zone blanche, environnement agricole potentiellement soumis à des variations de température, et besoin de fiabilité sur une longue période sans maintenance.</text:p>
      <text:p text:style-name="P118">Trois critères principaux ont guidé la comparaison : la précision de l'oscillateur (exprimée en ppm — parts per million), l'interface de communication avec la Raspberry Pi, et la durée de rétention sur pile.</text:p>
      <text:p text:style-name="P118">Le <text:span text:style-name="Strong_20_Emphasis">DS1307</text:span> est le module RTC le plus répandu. Il communique en I2C et fonctionne sous 5V. Sa précision est qualifiée de moyenne, sa dérive pouvant atteindre plusieurs minutes par mois selon les conditions thermiques. La durée de rétention dépend entièrement de la pile choisie. Son principal avantage est son faible coût, mais il présente une incompatibilité de tension avec les GPIO de la Raspberry Pi (3,3V), nécessitant un adaptateur ou un diviseur de tension.</text:p>
      <text:p text:style-name="P118">Le <text:span text:style-name="Strong_20_Emphasis">DS3231</text:span> est le module le plus performant de la sélection. Il intègre un oscillateur compensé en température (TCXO), ce qui lui confère une précision de l'ordre de ±2 ppm, soit environ ±1 minute par an quelle que soit la température ambiante. Il communique en I2C, fonctionne en 3,3V (compatible directement avec la Raspberry Pi) et sa pile de sauvegarde assure une rétention de l'heure pendant approximativement 6 ans. Son coût est légèrement supérieur aux autres modèles mais reste faible en valeur absolue.</text:p>
      <text:p text:style-name="P118"><text:soft-page-break/>Le <text:span text:style-name="Strong_20_Emphasis">PCF8523</text:span> représente un compromis intermédiaire. Il communique en I2C, fonctionne en 3,3V, offre une précision correcte pour des usages courants, et sa pile assure une rétention comparable au DS3231. Son coût est comparable au DS1307.</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Critère</text:p>
            </table:table-cell>
            <table:table-cell table:style-name="Tableau3.A1" office:value-type="string">
              <text:p text:style-name="Table_20_Heading">DS1307</text:p>
            </table:table-cell>
            <table:table-cell table:style-name="Tableau3.A1" office:value-type="string">
              <text:p text:style-name="Table_20_Heading">DS3231</text:p>
            </table:table-cell>
            <table:table-cell table:style-name="Tableau3.A1" office:value-type="string">
              <text:p text:style-name="Table_20_Heading">PCF8523</text:p>
            </table:table-cell>
          </table:table-row>
        </table:table-header-rows>
        <table:table-row>
          <table:table-cell table:style-name="Tableau3.A1" office:value-type="string">
            <text:p text:style-name="Table_20_Contents">Interface</text:p>
          </table:table-cell>
          <table:table-cell table:style-name="Tableau3.A1" office:value-type="string">
            <text:p text:style-name="Table_20_Contents">I2C</text:p>
          </table:table-cell>
          <table:table-cell table:style-name="Tableau3.A1" office:value-type="string">
            <text:p text:style-name="Table_20_Contents">I2C</text:p>
          </table:table-cell>
          <table:table-cell table:style-name="Tableau3.A1" office:value-type="string">
            <text:p text:style-name="Table_20_Contents">I2C</text:p>
          </table:table-cell>
        </table:table-row>
        <table:table-row>
          <table:table-cell table:style-name="Tableau3.A1" office:value-type="string">
            <text:p text:style-name="Table_20_Contents">Tension</text:p>
          </table:table-cell>
          <table:table-cell table:style-name="Tableau3.A1" office:value-type="string">
            <text:p text:style-name="Table_20_Contents">5V</text:p>
          </table:table-cell>
          <table:table-cell table:style-name="Tableau3.A1" office:value-type="string">
            <text:p text:style-name="Table_20_Contents">3,3V</text:p>
          </table:table-cell>
          <table:table-cell table:style-name="Tableau3.A1" office:value-type="string">
            <text:p text:style-name="Table_20_Contents">3,3V</text:p>
          </table:table-cell>
        </table:table-row>
        <table:table-row>
          <table:table-cell table:style-name="Tableau3.A1" office:value-type="string">
            <text:p text:style-name="Table_20_Contents">Précision</text:p>
          </table:table-cell>
          <table:table-cell table:style-name="Tableau3.A1" office:value-type="string">
            <text:p text:style-name="Table_20_Contents">Moyenne</text:p>
          </table:table-cell>
          <table:table-cell table:style-name="Tableau3.A1" office:value-type="string">
            <text:p text:style-name="Table_20_Contents">Haute (±2 ppm)</text:p>
          </table:table-cell>
          <table:table-cell table:style-name="Tableau3.A1" office:value-type="string">
            <text:p text:style-name="Table_20_Contents">Moyenne</text:p>
          </table:table-cell>
        </table:table-row>
        <table:table-row>
          <table:table-cell table:style-name="Tableau3.A1" office:value-type="string">
            <text:p text:style-name="Table_20_Contents">Rétention pile</text:p>
          </table:table-cell>
          <table:table-cell table:style-name="Tableau3.A1" office:value-type="string">
            <text:p text:style-name="Table_20_Contents">Variable</text:p>
          </table:table-cell>
          <table:table-cell table:style-name="Tableau3.A1" office:value-type="string">
            <text:p text:style-name="Table_20_Contents">~6 ans</text:p>
          </table:table-cell>
          <table:table-cell table:style-name="Tableau3.A1" office:value-type="string">
            <text:p text:style-name="Table_20_Contents">~6 ans</text:p>
          </table:table-cell>
        </table:table-row>
        <table:table-row>
          <table:table-cell table:style-name="Tableau3.A1" office:value-type="string">
            <text:p text:style-name="Table_20_Contents">Coût</text:p>
          </table:table-cell>
          <table:table-cell table:style-name="Tableau3.A1" office:value-type="string">
            <text:p text:style-name="Table_20_Contents">Faible</text:p>
          </table:table-cell>
          <table:table-cell table:style-name="Tableau3.A1" office:value-type="string">
            <text:p text:style-name="Table_20_Contents">Moyen</text:p>
          </table:table-cell>
          <table:table-cell table:style-name="Tableau3.A1" office:value-type="string">
            <text:p text:style-name="Table_20_Contents">Faible</text:p>
          </table:table-cell>
        </table:table-row>
        <table:table-row>
          <table:table-cell table:style-name="Tableau3.A1" office:value-type="string">
            <text:p text:style-name="Table_20_Contents">Compatible Raspberry Pi (3,3V)</text:p>
          </table:table-cell>
          <table:table-cell table:style-name="Tableau3.A1" office:value-type="string">
            <text:p text:style-name="Table_20_Contents">Non (adaptateur nécessaire)</text:p>
          </table:table-cell>
          <table:table-cell table:style-name="Tableau3.A1" office:value-type="string">
            <text:p text:style-name="Table_20_Contents">Oui</text:p>
          </table:table-cell>
          <table:table-cell table:style-name="Tableau3.A1" office:value-type="string">
            <text:p text:style-name="Table_20_Contents">Oui</text:p>
          </table:table-cell>
        </table:table-row>
      </table:table>
      <text:p text:style-name="P118"><text:span text:style-name="Strong_20_Emphasis">Conclusion de l'étude</text:span> : pour un usage critique en zone blanche où l'horodatage doit rester fiable sur toute une saison agricole sans intervention, le DS3231 aurait été le choix retenu. Sa tolérance aux variations thermiques et sa haute précision en font le module le plus adapté au contexte du projet. Cependant, la mise à disposition d'une Raspberry Pi 5 a rendu cette sélection caduque, la Pi 5 embarquant sa propre RTC interne.</text:p>
      <text:p text:style-name="P116"/>
      <text:p text:style-name="P117"><text:span text:style-name="Strong_20_Emphasis">Analyse des risques liés à l'absence de RTC</text:span></text:p>
      <text:p text:style-name="P118">Afin de justifier techniquement l'importance de cette brique, il est utile de détailler les conséquences concrètes d'un horodatage défaillant dans le contexte du séchoir.</text:p>
      <text:p text:style-name="P118">Sans RTC fonctionnelle, à chaque coupure d'alimentation (arrêt volontaire en fin de journée, coupure secteur, orage), la Raspberry Pi redémarre avec une heure incorrecte — généralement le 1er janvier 1970 ou la date du dernier arrêt système. Plusieurs problèmes en découlent directement.</text:p>
      <text:p text:style-name="P118">Les mesures de température enregistrées en base de données seraient horodatées incorrectement, rendant tout graphique d'évolution thermique inexploitable. L'agriculteur ne pourrait pas corréler un pic de température avec un moment précis du cycle de séchage.</text:p>
      <text:p text:style-name="P118">Les tâches planifiées via <text:span text:style-name="Source_20_Text">cron</text:span> — notamment le script de mesure de température toutes les 30 minutes — pourraient se déclencher à des moments incorrects ou s'exécuter en rafale au démarrage si le système pense que beaucoup de temps s'est écoulé.</text:p>
      <text:p text:style-name="P118">Enfin, les événements enregistrés en base (démarrage de cycle, alerte de dépassement, arrêt) perdraient leur valeur chronologique, rendant impossible tout audit ou analyse rétrospective des sessions de séchage.</text:p>
      <text:p text:style-name="P118">La RTC est donc un composant critique, au même titre que les capteurs de température, pour garantir l'intégrité des données produites par le système.</text:p>
      <text:p text:style-name="P119"/>
      <text:p text:style-name="P118"><text:span text:style-name="Strong_20_Emphasis">Procédure de configuration — Raspberry Pi 5 (RTC interne)</text:span></text:p>
      <text:p text:style-name="P118">La Raspberry Pi 5 intègre nativement un circuit RTC raccordé à un connecteur d'alimentation de secours noté <text:span text:style-name="Source_20_Text">BAT</text:span> sur la carte. Aucune configuration logicielle supplémentaire n'est requise pour activer la RTC, contrairement à une Raspberry Pi 3 qui nécessite l'activation de l'I2C et l'ajout d'un overlay dans <text:span text:style-name="Source_20_Text">/boot/firmware/config.txt</text:span>.</text:p>
      <text:p text:style-name="P118"><text:span text:style-name="Strong_20_Emphasis">Étape 1 — Connexion de la pile</text:span></text:p>
      <text:p text:style-name="P118">Brancher une pile bouton compatible (format CR2032 recommandé) sur le connecteur <text:span text:style-name="Source_20_Text">BAT</text:span> de la Raspberry Pi 5. Cette pile alimentera exclusivement le circuit RTC lorsque la carte sera hors tension, conservant ainsi l'heure courante.</text:p>
      <text:p text:style-name="P118"><text:span text:style-name="Strong_20_Emphasis">Étape 2 — Désactivation du faux RTC logiciel</text:span></text:p>
      <text:p text:style-name="P118"><text:soft-page-break/>Raspberry Pi OS inclut par défaut un service <text:span text:style-name="Source_20_Text">fake-hwclock</text:span> qui simule une RTC en sauvegardant l'heure système dans un fichier à l'arrêt, et en la restaurant au démarrage. Ce mécanisme est une rustine logicielle incompatible avec une vraie RTC matérielle. Il doit être supprimé :</text:p>
      <text:p text:style-name="P120">bash</text:p>
      <text:p text:style-name="P121"><text:span text:style-name="Source_20_Text"><text:span text:style-name="T62">sudo</text:span></text:span><text:span text:style-name="Source_20_Text"><text:span text:style-name="T63"> </text:span></text:span><text:span text:style-name="Source_20_Text"><text:span text:style-name="T62">apt</text:span></text:span><text:span text:style-name="Source_20_Text"><text:span text:style-name="T63"> purge fake-hwclock</text:span></text:span></text:p>
      <text:p text:style-name="P121"><text:span text:style-name="Source_20_Text"><text:span text:style-name="T62">sudo</text:span></text:span><text:span text:style-name="Source_20_Text"><text:span text:style-name="T63"> systemctl disable fake-hwclock</text:span></text:span></text:p>
      <text:p text:style-name="P118"><text:span text:style-name="Strong_20_Emphasis">Étape 3 — Réglage initial de l'heure</text:span></text:p>
      <text:p text:style-name="P118">Lors de la première mise en service, l'heure doit être renseignée manuellement puisque le système est hors réseau :</text:p>
      <text:p text:style-name="P120">bash</text:p>
      <text:p text:style-name="P121"><text:span text:style-name="Source_20_Text"><text:span text:style-name="T62">sudo</text:span></text:span><text:span text:style-name="Source_20_Text"><text:span text:style-name="T63"> timedatectl set-timezone Europe/Paris</text:span></text:span></text:p>
      <text:p text:style-name="P121"><text:span text:style-name="Source_20_Text"><text:span text:style-name="T62">sudo</text:span></text:span><text:span text:style-name="Source_20_Text"><text:span text:style-name="T63"> </text:span></text:span><text:span text:style-name="Source_20_Text"><text:span text:style-name="T62">date</text:span></text:span><text:span text:style-name="Source_20_Text"><text:span text:style-name="T63"> -s </text:span></text:span><text:span text:style-name="Source_20_Text"><text:span text:style-name="T64">"2026-02-25 14:30:00"</text:span></text:span></text:p>
      <text:p text:style-name="P118">Vérifier que l'heure système est correcte :</text:p>
      <text:p text:style-name="P120">bash</text:p>
      <text:p text:style-name="P121"><text:span text:style-name="Source_20_Text"><text:span text:style-name="T62">date</text:span></text:span></text:p>
      <text:p text:style-name="P118"><text:span text:style-name="Strong_20_Emphasis">Étape 4 — Écriture de l'heure dans la RTC</text:span></text:p>
      <text:p text:style-name="P118">Une fois l'heure système correctement réglée, elle est écrite dans la RTC matérielle :</text:p>
      <text:p text:style-name="P120">bash</text:p>
      <text:p text:style-name="P121"><text:span text:style-name="Source_20_Text"><text:span text:style-name="T62">sudo</text:span></text:span><text:span text:style-name="Source_20_Text"><text:span text:style-name="T63"> hwclock -w</text:span></text:span></text:p>
      <text:p text:style-name="P118">Si la commande <text:span text:style-name="Source_20_Text">hwclock</text:span> n'est pas disponible sur le système, elle est fournie par le paquet <text:span text:style-name="Source_20_Text">util-linux-extra</text:span> :</text:p>
      <text:p text:style-name="P120">bash</text:p>
      <text:p text:style-name="P121"><text:span text:style-name="Source_20_Text"><text:span text:style-name="T62">sudo</text:span></text:span><text:span text:style-name="Source_20_Text"><text:span text:style-name="T63"> </text:span></text:span><text:span text:style-name="Source_20_Text"><text:span text:style-name="T62">apt</text:span></text:span><text:span text:style-name="Source_20_Text"><text:span text:style-name="T63"> </text:span></text:span><text:span text:style-name="Source_20_Text"><text:span text:style-name="T62">install</text:span></text:span><text:span text:style-name="Source_20_Text"><text:span text:style-name="T63"> util-linux-extra</text:span></text:span></text:p>
      <text:p text:style-name="P118"><text:span text:style-name="Strong_20_Emphasis">Étape 5 — Vérification du fonctionnement</text:span></text:p>
      <text:p text:style-name="P118">Après un redémarrage :</text:p>
      <text:p text:style-name="P120">bash</text:p>
      <text:p text:style-name="P121"><text:span text:style-name="Source_20_Text"><text:span text:style-name="T62">sudo</text:span></text:span><text:span text:style-name="Source_20_Text"><text:span text:style-name="T63"> hwclock -r</text:span></text:span></text:p>
      <text:p text:style-name="P118">Si l'heure affichée correspond à l'heure réelle, la RTC est correctement configurée.</text:p>
      <text:p text:style-name="P118"><text:span text:style-name="Strong_20_Emphasis">Étape 6 — Vérification finale après coupure</text:span></text:p>
      <text:p text:style-name="P118">Pour valider le comportement lors d'une vraie coupure d'alimentation :</text:p>
      <text:list text:style-name="L18">
        <text:list-item>
          <text:p text:style-name="P122">Couper l'alimentation de la Raspberry Pi. </text:p>
        </text:list-item>
        <text:list-item>
          <text:p text:style-name="P122">Patienter quelques minutes. </text:p>
        </text:list-item>
        <text:list-item>
          <text:p text:style-name="P122">Remettre sous tension. </text:p>
        </text:list-item>
        <text:list-item>
          <text:p text:style-name="P123"><text:soft-page-break/>Exécuter <text:span text:style-name="Source_20_Text">date</text:span> et <text:span text:style-name="Source_20_Text">sudo hwclock -r</text:span> pour confirmer que l'heure est restée correcte. </text:p>
        </text:list-item>
      </text:list>
      <text:p text:style-name="P118">Si l'heure système au démarrage correspond bien à l'heure réelle, la configuration est validée. La Raspberry Pi récupère automatiquement l'heure depuis la RTC interne lors du boot, sans intervention.</text:p>
      <text:p text:style-name="P116"/>
      <text:p text:style-name="P116"/>
      <text:p text:style-name="P117"><text:span text:style-name="Strong_20_Emphasis">Bilan</text:span></text:p>
      <text:p text:style-name="P118">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 garantissant ainsi l'intégrité de l'horodatage de l'ensemble des données enregistrées par le séchoir.</text:p>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124" text:outline-level="1">4. Développement de l'IHM de configuration du houblon</text:h>
      <text:p text:style-name="P114"/>
      <text:h text:style-name="P115" text:outline-level="2">Contexte et objectif</text:h>
      <text:p text:style-name="P125"><text:span text:style-name="T65">Avant de démarrer un cycle de séchage, l'agriculteur doit renseigner un ensemble de paramètres : la variété de houblon chargée à chaque étage, la température cible (min/max) et la durée prévue du cycle </text:span><text:span text:style-name="T66">pour chaque lot d’houblon</text:span><text:span text:style-name="T65">. Cette saisie doit être possible depuis un smartphone, sans compétence informatique particulière.</text:span></text:p>
      <text:p text:style-name="P116">Ces paramètres sont ensuite sauvegardés en base de données dès le lancement du cycle, constituant ainsi la référence pour le contrôle automatique du chauffage et pour l'historique de production.</text:p>
      <text:p text:style-name="P114"/>
      <text:h text:style-name="P115" text:outline-level="2">Fonctionnalités développées</text:h>
      <text:list xml:id="list154143334084953" text:continue-list="list154142528758198" text:style-name="WWNum2">
        <text:list-item>
          <text:p text:style-name="P126">Sélection de la variété de houblon par étage (liste déroulante alimentée depuis la table houbVar).</text:p>
        </text:list-item>
        <text:list-item>
          <text:p text:style-name="P126">Saisie des températures de séchage min et max, avec valeurs par défaut (50°C / 55°C).</text:p>
        </text:list-item>
        <text:list-item>
          <text:p text:style-name="P126">Saisie de la durée du cycle de séchage.</text:p>
        </text:list-item>
        <text:list-item>
          <text:p text:style-name="P126"><text:soft-page-break/>Affichage récapitulatif de tous les paramètres.</text:p>
        </text:list-item>
        <text:list-item>
          <text:p text:style-name="P126">Enregistrement en base de données via un script PHP.</text:p>
        </text:list-item>
      </text:list>
      <text:p text:style-name="P114"/>
      <text:h text:style-name="P115" text:outline-level="2">Périmètre de ma réalisation</text:h>
      <text:p text:style-name="P125">J'ai conçu et développé la page HTML/CSS/JavaScript correspondante, ainsi que le script PHP côté serveur chargé de valider les données saisies et de les persister en base. L'interface a été pensée pour une utilisation mobile (responsive), avec un retour visuel immédiat à l'utilisateur après chaque action.</text:p>
      <text:p text:style-name="P125"/>
      <text:p text:style-name="P127"><text:span text:style-name="Strong_20_Emphasis">Architecture technique de l'IHM</text:span></text:p>
      <text:p text:style-name="P128">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128">Le code de cette interface est découpé en deux fichiers PHP distincts : <text:span text:style-name="Source_20_Text">gestion_sechoir.php</text:span> qui affiche la vue principale des quatre étages avec les informations de chaque lot (variété, heure de début, fin prévue), et <text:span text:style-name="Source_20_Text">gestion_sechoir_overlay.php</text:span> qui contient la fenêtre modale de configuration. </text:p>
      <text:p text:style-name="P128">Côté JavaScript, j'ai adopté une architecture modulaire en séparant les responsabilités en plusieurs fichiers distincts, chargés de manière différée (<text:span text:style-name="Source_20_Text">defer</text:span>) :</text:p>
      <text:list text:style-name="L19">
        <text:list-item>
          <text:p text:style-name="P129"><text:span text:style-name="Source_20_Text">GestionAPI.js</text:span> : gestion des appels vers l'API REST du Raspberry (<text:span text:style-name="Source_20_Text">get_status.php</text:span>, création/suppression de lot) ; </text:p>
        </text:list-item>
        <text:list-item>
          <text:p text:style-name="P129"><text:span text:style-name="Source_20_Text">GestionUI.js</text:span> : manipulation du DOM, affichage et masquage de l'overlay, mise à jour des champs ; </text:p>
        </text:list-item>
        <text:list-item>
          <text:p text:style-name="P129"><text:span text:style-name="Source_20_Text">GestionUTILS.js</text:span> : fonctions utilitaires (validation du format hh:mm, calcul du pourcentage de remplissage) ; </text:p>
        </text:list-item>
        <text:list-item>
          <text:p text:style-name="P129"><text:span text:style-name="Source_20_Text">GestionSTATE.js</text:span> : gestion de l'état courant de l'overlay (étage sélectionné, lot existant ou nouveau) ; </text:p>
        </text:list-item>
        <text:list-item>
          <text:p text:style-name="P130"><text:span text:style-name="Source_20_Text">index.js</text:span> : point d'entrée, initialisation et liaison des événements. </text:p>
        </text:list-item>
      </text:list>
      <text:p text:style-name="P128">Ce découpage facilite la maintenance et la lecture du code, conformément aux exigences qualité du cahier des charges.</text:p>
      <text:p text:style-name="P128"><text:span text:style-name="Strong_20_Emphasis">Détail des champs de saisie</text:span></text:p>
      <text:p text:style-name="P128">Le formulaire de configuration d'un lot comporte trois champs principaux :</text:p>
      <text:p text:style-name="P128">La <text:span text:style-name="Strong_20_Emphasis">sélection de la variété</text:span> se fait via une liste déroulante (<text:span text:style-name="Source_20_Text">&lt;select&gt;</text:span>) dont les options sont chargées dynamiquement depuis la base de données au moment de l'ouverture de l'overlay. Cela garantit que les variétés disponibles sont toujours à jour, sans nécessiter de modification du code source.</text:p>
      <text:p text:style-name="P128">Le <text:span text:style-name="Strong_20_Emphasis">taux de remplissage</text:span> de l'étage est saisi à l'aide de deux boutons <text:span text:style-name="Source_20_Text">−</text:span> et <text:span text:style-name="Source_20_Text">+</text:span> qui incrémentent ou décrémentent la valeur par pas de 10 %, entre 0 et 100 %. Ce choix d'interface, sans saisie clavier, est volontaire : il réduit les risques d'erreur de frappe dans un contexte d'utilisation sur smartphone, potentiellement en extérieur.</text:p>
      <text:p text:style-name="P128"><text:soft-page-break/>La <text:span text:style-name="Strong_20_Emphasis">durée de séchage souhaitée</text:span> est saisie au format <text:span text:style-name="Source_20_Text">hh:mm</text:span> dans un champ texte, avec des boutons d'ajustement par pas de 10 minutes pour faciliter la saisie tactile. Un message d'erreur s'affiche si le format saisi est invalide, avant tout envoi vers le serveur.</text:p>
      <text:p text:style-name="P128"><text:span text:style-name="Strong_20_Emphasis">Comportement de l'overlay selon le contexte</text:span></text:p>
      <text:p text:style-name="P128">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 Le bouton « Supprimer ce lot » n'est visible que si un lot existe déjà, évitant ainsi toute action accidentelle.</text:p>
      <text:p text:style-name="P128"><text:span text:style-name="Strong_20_Emphasis">Communication avec l'API</text:span></text:p>
      <text:p text:style-name="P128">La sauvegarde des paramètres s'effectue via une requête <text:span text:style-name="Source_20_Text">fetch</text:span> vers un endpoint PHP côté serveur. Les données sont envoyées au format JSON et le script PHP se charge de les valider puis de les insérer ou mettre à jour en base de données MySQL. En cas de succès, l'overlay se ferme automatiquement et les informations affichées sur la page principale (variété, début, fin prévue) sont rafraîchies immédiatement, sans rechargement de page.</text:p>
      <text:p text:style-name="P128"><text:span text:style-name="Strong_20_Emphasis">Mise à jour automatique de l'affichage</text:span></text:p>
      <text:p text:style-name="P128">La page de gestion du séchoir interroge régulièrement l'API <text:span text:style-name="Source_20_Text">get_status.php</text:span> pour récupérer l'état en temps réel de chaque étage et des six capteurs de température. La fonction <text:span text:style-name="Source_20_Text">rafraichirStatus()</text:span> est appelée au chargement de la page et peut être relancée périodiquement. Les données reçues (variété, dates, températures) alimentent directement les éléments du DOM correspondants via les fonctions <text:span text:style-name="Source_20_Text">updateEtatCycle()</text:span>, <text:span text:style-name="Source_20_Text">updateEtage()</text:span> et <text:span text:style-name="Source_20_Text">updateTemperature()</text:span>. La température moyenne des six capteurs est calculée côté client en JavaScript et affichée dans un bloc dédié à l'étage 1, conformément aux spécifications du cahier des charges.</text:p>
      <text:p text:style-name="P128"><text:span text:style-name="Strong_20_Emphasis">Difficultés rencontrées et solutions apportées</text:span></text:p>
      <text:p text:style-name="P128">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 ce qui garantit que l'interface reflète toujours l'état réel du système.</text:p>
      <text:p text:style-name="P128">Un autre point d'attention a été la validation du format de saisie de la durée (<text:span text:style-name="Source_20_Text">hh:mm</text:span>), qui devait être robuste sans être bloquante pour l'utilisateur. La validation est effectuée en JavaScript avant l'envoi, avec un retour visuel immédiat sous le champ concerné.</text:p>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83"/>
      <text:p text:style-name="P83"/>
      <text:p text:style-name="P83"/>
      <text:h text:style-name="P131" text:outline-level="1">5. Développement de l'IHM d'export de données</text:h>
      <text:p text:style-name="P132"/>
      <text:h text:style-name="P133" text:outline-level="2">Contexte et objectif</text:h>
      <text:p text:style-name="P134">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 sur clé USB, pour une exploitation ultérieure (tableur, archivage).</text:p>
      <text:p text:style-name="P132"/>
      <text:h text:style-name="P133" text:outline-level="2">Fonctionnalités développées</text:h>
      <text:list text:continue-list="list154143334084953" text:style-name="WWNum2">
        <text:list-item>
          <text:p text:style-name="P135">Affichage des données de production historiques (variété, dates, masse en kg) sous forme de tableau.</text:p>
        </text:list-item>
        <text:list-item>
          <text:p text:style-name="P135">Visualisation graphique de l'évolution des températures par cycle de séchage.</text:p>
        </text:list-item>
        <text:list-item>
          <text:p text:style-name="P135">Filtrage des données par variété ou par période.</text:p>
        </text:list-item>
        <text:list-item>
          <text:p text:style-name="P135">Export des données sélectionnées au format CSV, transféré sur clé USB connectée à la Raspberry Pi.</text:p>
        </text:list-item>
      </text:list>
      <text:p text:style-name="P132"/>
      <text:h text:style-name="P133" text:outline-level="2">Périmètre de ma réalisation</text:h>
      <text:p text:style-name="P134">J'ai développé la page d'export : interface HTML/CSS/JavaScript pour l'affichage et le filtrage, scripts PHP pour l'interrogation de la base MySQL et la génération du fichier CSV, ainsi que la logique de transfert vers la clé USB. Cette page constitue la restitution finale du travail de collecte de données effectué tout au long de la saison.</text:p>
      <text:p text:style-name="P136"/>
      <text:p text:style-name="P137"><text:span text:style-name="Strong_20_Emphasis">Architecture technique de la page</text:span></text:p>
      <text:p text:style-name="P138">La page d'export est structurée selon un parcours utilisateur en trois étapes successives, matérialisées par trois sections (<text:span text:style-name="Source_20_Text">compartiment</text:span>) qui s'affichent progressivement : le choix du type d'export, puis les filtres, puis les résultats. Cette progression guidée évite de surcharger l'écran et reste lisible sur smartphone, conformément aux contraintes du cahier des charges.</text:p>
      <text:p text:style-name="P138">Deux modes d'export ont été prévus dans l'architecture : l'export <text:span text:style-name="Strong_20_Emphasis">par lot</text:span>, qui permet d'obtenir le détail complet d'un cycle de séchage précis, et l'export <text:span text:style-name="Strong_20_Emphasis">par production</text:span>, destiné à regrouper tous les lots d'une saison. Ce second mode est structuré dans le code mais marqué comme <text:span text:style-name="Emphasis">work in progress</text:span>, sa mise en œuvre complète ayant été différée pour se concentrer sur le mode par lot, pleinement fonctionnel.</text:p>
      <text:p text:style-name="P138"><text:span text:style-name="Strong_20_Emphasis">Chargement dynamique des données de filtrage</text:span></text:p>
      <text:p text:style-name="P138"><text:soft-page-break/>Dès le chargement de la page, la liste des variétés de houblon disponibles est récupérée automatiquement depuis la base de données via un appel à l'API <text:span text:style-name="Source_20_Text">query_get_variete.php</text:span>. Les options du filtre « Variété » sont ainsi générées dynamiquement, sans aucune valeur codée en dur, ce qui garantit que la liste reste cohérente avec les données réelles saisies au fil de la saison.</text:p>
      <text:p text:style-name="P138">Un mécanisme de garde (<text:span text:style-name="Source_20_Text">dataset.loaded</text:span>) empêche ce chargement de se répéter inutilement si la fonction est appelée plusieurs fois, ce qui peut arriver lors de navigations répétées sur la page.</text:p>
      <text:p text:style-name="P138"><text:span text:style-name="Strong_20_Emphasis">Filtrage et prévisualisation des résultats</text:span></text:p>
      <text:p text:style-name="P138">Lorsque l'utilisateur clique sur « Rechercher », la fonction <text:span text:style-name="Source_20_Text">loadTable()</text:span> collecte les valeurs des champs de filtre actifs (variété, numéro de lot) et les envoie au script PHP <text:span text:style-name="Source_20_Text">query_get_lots_preview.php</text:span> via une requête <text:span text:style-name="Source_20_Text">POST</text:span>. Les filtres sont collectés par une fonction générique <text:span text:style-name="Source_20_Text">getFiltersRender()</text:span> qui parcourt un dictionnaire de correspondances entre les noms de champs logiques et les identifiants HTML, rendant le code extensible sans modification de la logique de collecte.</text:p>
      <text:p text:style-name="P138">Les résultats sont ensuite affichés sous deux formes simultanées, générées par la même fonction <text:span text:style-name="Source_20_Text">renderTable()</text:span> : un tableau classique pour les écrans larges, et un affichage en cartes empilées pour mobile. La fonction de formatage <text:span text:style-name="Source_20_Text">formatCell()</text:span> est partagée entre les deux représentations, garantissant une cohérence d'affichage. Les statuts des lots (Terminé, En cours, Erreur) sont mis en valeur par des badges colorés définis dans le dictionnaire <text:span text:style-name="Source_20_Text">BADGE</text:span>.</text:p>
      <text:p text:style-name="P138"><text:span text:style-name="Strong_20_Emphasis">Génération et téléchargement du fichier CSV</text:span></text:p>
      <text:p text:style-name="P138">L'export d'un lot individuel est déclenché par le bouton CSV présent sur chaque ligne du tableau. La fonction <text:span text:style-name="Source_20_Text">exportRow()</text:span> envoie les filtres actifs ainsi que le numéro du lot ciblé à l'API <text:span text:style-name="Source_20_Text">query_export_csv.php</text:span>, qui retourne un objet JSON structuré contenant quatre blocs de données : les informations du lot, le passage par étage (avec dates de début et de fin de séjour à chaque niveau), les relevés de température, et les événements (pauses, arrêts).</text:p>
      <text:p text:style-name="P138">La construction du fichier CSV est réalisée entièrement côté JavaScript, sans rechargement de page. Chaque bloc de données est précédé d'un en-tête de section (par exemple <text:span text:style-name="Source_20_Text">=== TEMPERATURES ===</text:span>) pour faciliter la lecture du fichier dans un tableur. Les blocs températures et événements sont optionnels et ne sont inclus que si les cases correspondantes sont cochées dans les filtres, permettant à l'utilisateur de maîtriser la taille et le contenu de l'export.</text:p>
      <text:p text:style-name="P138">Le fichier est ensuite proposé au téléchargement via la création d'un lien <text:span text:style-name="Source_20_Text">&lt;a&gt;</text:span> temporaire pointant vers une URL objet générée à partir d'un <text:span text:style-name="Source_20_Text">Blob</text:span>, sans aucun rechargement de page. Ce lien est aussitôt retiré du DOM après le déclenchement du téléchargement, et l'URL objet est libérée pour éviter toute fuite mémoire.</text:p>
      <text:p text:style-name="P138">L'export global de tous les résultats filtrés est géré par la fonction <text:span text:style-name="Source_20_Text">exportAll()</text:span>, qui soumet un formulaire HTML enrichi dynamiquement avec les filtres courants, déléguant la génération du fichier final au serveur PHP.</text:p>
      <text:p text:style-name="P138"><text:span text:style-name="Strong_20_Emphasis">Difficultés rencontrées et solutions apportées</text:span></text:p>
      <text:p text:style-name="P138">La principale difficulté a été la structuration du fichier CSV de sortie pour qu'il soit à la fois exploitable dans un tableur et lisible en texte brut. L'ajout de séparateurs de sections textuels (<text:span text:style-name="Source_20_Text">=== LOT ===</text:span>, <text:span text:style-name="Source_20_Text">=== ETAGES ===</text:span>, etc.) est un compromis qui facilite la compréhension du fichier sans pour autant perturber une importation automatisée, les en-têtes de colonnes étant systématiquement présents immédiatement après chaque séparateur.</text:p>
      <text:p text:style-name="P138"><text:soft-page-break/>Une autre difficulté a été la gestion de l'état courant de l'interface (quel type d'export est actif, quels filtres sont cochés) de façon cohérente entre la prévisualisation du tableau et le déclenchement de l'export, notamment pour les cases à cocher. Deux fonctions distinctes ont été créées à cet effet : <text:span text:style-name="Source_20_Text">getFiltersRender()</text:span>, qui ignore les cases à cocher pour la prévisualisation, et <text:span text:style-name="Source_20_Text">getFilters()</text:span>, qui les inclut pour la génération du CSV, chacune servant un objectif précis sans interférer avec l'autr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P140" text:outline-level="1"><text:bookmark-start text:name="_Toc470112077"/>Le CDROM.<text:bookmark-end text:name="_Toc470112077"/></text:h>
      <text:p text:style-name="P141" loext:marker-style-name="T1"><text:span text:style-name="T1">Le CDROM doit contenir :</text:span></text:p>
      <text:list text:style-name="WWNum5">
        <text:list-item>
          <text:p text:style-name="P142" loext:marker-style-name="T1"><text:span text:style-name="T1">ce rapport mentionné ci-dessus ;</text:span></text:p>
        </text:list-item>
        <text:list-item>
          <text:p text:style-name="P142" loext:marker-style-name="T1"><text:span text:style-name="T1">les codes sources ;</text:span></text:p>
        </text:list-item>
        <text:list-item>
          <text:p text:style-name="P143" loext:marker-style-name="T1">les manuels d’utilisation et d’installation du système.</text:p>
        </text:list-item>
      </text:list>
      <text:p text:style-name="P141" loext:marker-style-name="T1"/>
      <text:p text:style-name="P144" loext:marker-style-name="T10"><text:span text:style-name="T10">Si le projet est composé de N sous-systèmes, la hiérarchie du CDROM pourra être la suivante :</text:span></text:p>
      <text:p text:style-name="P144"><draw:g text:anchor-type="char" draw:z-index="7" draw:name="Forme1" draw:style-name="gr1"><draw:custom-shape draw:style-name="gr2" draw:text-style-name="P146" svg:width="1.846cm" svg:height="0.729cm" svg:x="7.784cm" svg:y="0.363cm"><text:p text:style-name="P145"><text:span text:style-name="T67">Unité : \</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7" svg:x1="3.858cm" svg:y1="1.268cm" svg:x2="8.282cm" svg:y2="2.827cm"><text:p/></draw:line><draw:line draw:style-name="gr3" draw:text-style-name="P147" svg:x1="9.121cm" svg:y1="1.24cm" svg:x2="9.122cm" svg:y2="2.849cm"><text:p/></draw:line><draw:line draw:style-name="gr3" draw:text-style-name="P147" svg:x1="9.677cm" svg:y1="1.268cm" svg:x2="13.064cm" svg:y2="2.827cm"><text:p/></draw:line><draw:custom-shape draw:style-name="gr4" draw:text-style-name="P147" svg:width="2.804cm" svg:height="0.025cm" svg:x="4.818cm" svg:y="3.1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146" svg:width="1.671cm" svg:height="0.729cm" svg:x="12.369cm" svg:y="2.852cm"><text:p text:style-name="P145"><text:span text:style-name="T67">\text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6" draw:text-style-name="P146" svg:width="2.488cm" svg:height="0.729cm" svg:x="14.831cm" svg:y="2.852cm"><text:p text:style-name="P145"><text:span text:style-name="T67">\installatio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7" svg:x1="10.418cm" svg:y1="1.268cm" svg:x2="16.142cm" svg:y2="2.852cm"><text:p/></draw:line><draw:custom-shape draw:style-name="gr7" draw:text-style-name="P146" svg:width="3.188cm" svg:height="0.729cm" svg:x="7.818cm" svg:y="2.827cm"><text:p text:style-name="P145"><text:span text:style-name="T67">\sous_systeme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7" svg:x1="7.622cm" svg:y1="3.732cm" svg:x2="8.772cm" svg:y2="4.963cm"><text:p/></draw:line><draw:line draw:style-name="gr3" draw:text-style-name="P147" svg:x1="10.989cm" svg:y1="3.732cm" svg:x2="12.044cm" svg:y2="4.914cm"><text:p/></draw:line><draw:custom-shape draw:style-name="gr8" draw:text-style-name="P146" svg:width="1.9cm" svg:height="0.729cm" svg:x="6.428cm" svg:y="4.84cm"><text:p text:style-name="P145"><text:span text:style-name="T67">\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146" svg:width="1.257cm" svg:height="0.729cm" svg:x="11.37cm" svg:y="4.838cm"><text:p text:style-name="P145"><text:span text:style-name="T67">\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0" draw:text-style-name="P146" svg:width="3.128cm" svg:height="0.729cm" svg:x="0.852cm" svg:y="2.827cm"><text:p text:style-name="P145"><text:span text:style-name="T67">\sous_systeme1</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7" svg:x1="0.473cm" svg:y1="3.732cm" svg:x2="1.438cm" svg:y2="4.939cm"><text:p/></draw:line><draw:line draw:style-name="gr3" draw:text-style-name="P147" svg:x1="2.831cm" svg:y1="3.732cm" svg:x2="2.832cm" svg:y2="4.939cm"><text:p/></draw:line><draw:line draw:style-name="gr3" draw:text-style-name="P147" svg:x1="4.117cm" svg:y1="3.732cm" svg:x2="5.082cm" svg:y2="4.838cm"><text:p/></draw:line><draw:line draw:style-name="gr3" draw:text-style-name="P147" svg:x1="2.831cm" svg:y1="3.757cm" svg:x2="2.832cm" svg:y2="4.964cm"><text:p/></draw:line><draw:custom-shape draw:style-name="gr8" draw:text-style-name="P146" svg:width="1.9cm" svg:height="0.729cm" svg:x="-0.781cm" svg:y="4.838cm"><text:p text:style-name="P145"><text:span text:style-name="T67">\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1" draw:text-style-name="P146" svg:width="1.19cm" svg:height="0.729cm" svg:x="2.144cm" svg:y="4.838cm"><text:p text:style-name="P145"><text:span text:style-name="T67">\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146" svg:width="1.257cm" svg:height="0.729cm" svg:x="4.412cm" svg:y="4.84cm"><text:p text:style-name="P145"><text:span text:style-name="T67">\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7" svg:x1="9.816cm" svg:y1="3.732cm" svg:x2="9.817cm" svg:y2="5.088cm"><text:p/></draw:line><draw:custom-shape draw:style-name="gr11" draw:text-style-name="P146" svg:width="1.19cm" svg:height="0.729cm" svg:x="8.97cm" svg:y="4.838cm"><text:p text:style-name="P145"><text:span text:style-name="T67">\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g></text:p>
      <text:p text:style-name="P148" loext:marker-style-name="T68"/>
      <text:p text:style-name="P148" loext:marker-style-name="T68"/>
      <text:p text:style-name="P148" loext:marker-style-name="T68"/>
      <text:p text:style-name="P148" loext:marker-style-name="T68"/>
      <text:p text:style-name="P148" loext:marker-style-name="T68"/>
      <text:p text:style-name="P144"/>
      <text:p text:style-name="P144"/>
      <text:p text:style-name="P144"/>
      <text:p text:style-name="P144"/>
      <text:list text:style-name="WWNum3">
        <text:list-item>
          <text:p text:style-name="P149" loext:marker-style-name="T10"><text:span text:style-name="T10">Répertoire </text:span><text:span text:style-name="T69">source</text:span><text:span text:style-name="T10"> : contiendra les sources de vos différents programmes. </text:span><text:span text:style-name="T70">Dernière version</text:span><text:span text:style-name="T10">.</text:span></text:p>
        </text:list-item>
        <text:list-item>
          <text:p text:style-name="P149" loext:marker-style-name="T10"><text:soft-page-break/><text:span text:style-name="T10">Répertoire </text:span><text:span text:style-name="T69">bin</text:span><text:span text:style-name="T10"> : contiendra les exécutables de vos différents programmes et les fichiers Makefiles s'ils existent. </text:span><text:span text:style-name="T70">Dernières versions</text:span><text:span text:style-name="T10">.</text:span></text:p>
        </text:list-item>
        <text:list-item>
          <text:p text:style-name="P149" loext:marker-style-name="T10"><text:span text:style-name="T10">Répertoire </text:span><text:span text:style-name="T69">doc</text:span><text:span text:style-name="T10"> : contiendra toutes les documentations au format pdf des constructeurs qui ont été nécessaires pour pouvoir réaliser l'application.</text:span></text:p>
        </text:list-item>
        <text:list-item>
          <text:p text:style-name="P149" loext:marker-style-name="T10"><text:span text:style-name="T10">Répertoire </text:span><text:span text:style-name="T69">textes</text:span><text:span text:style-name="T10"> : contiendra les fichiers textes du rapport, des notices d'installation et d'utilisation et du carnet de bord. </text:span><text:span text:style-name="T70">Dernières versions</text:span><text:span text:style-name="T10">.</text:span></text:p>
        </text:list-item>
        <text:list-item>
          <text:p text:style-name="P149" loext:marker-style-name="T3"><text:span text:style-name="T10">Répertoire </text:span><text:span text:style-name="T3">installation</text:span><text:span text:style-name="T10"> : contiendra le ou les fichiers d'installation de l'application. Celle-ci devra pouvoir se faire en automatique (les exécutables, les DLL si nécessaires, etc.). </text:span></text:p>
        </text:list-item>
      </text:list>
      <text:p text:style-name="P144" loext:marker-style-name="T10"><text:span text:style-name="T71">Le CD devra avoir une étiquette contenant</text:span><text:span text:style-name="T10"> :</text:span></text:p>
      <text:list text:style-name="WWNum4">
        <text:list-item>
          <text:p text:style-name="P150" loext:marker-style-name="T3"><text:span text:style-name="T10">Le nom du projet.</text:span></text:p>
        </text:list-item>
        <text:list-item>
          <text:p text:style-name="P150" loext:marker-style-name="T3"><text:span text:style-name="T10">Les noms des étudiants.</text:span></text:p>
        </text:list-item>
        <text:list-item>
          <text:p text:style-name="P150" loext:marker-style-name="T3"><text:span text:style-name="T10">L'académie et le nom du lycée.</text:span></text:p>
        </text:list-item>
        <text:list-item>
          <text:p text:style-name="P150" loext:marker-style-name="T10"><text:span text:style-name="T10">L'année de la session. </text:span></text:p>
        </text:list-item>
      </text:list>
      <text:p text:style-name="P151"/>
      <text:p text:style-name="P1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cff0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e1" style:family="paragraph" style:parent-style-name="Standard">
      <style:paragraph-properties fo:margin-left="4.001cm" fo:margin-right="1cm" fo:margin-top="0.212cm" fo:margin-bottom="0cm" style:contextual-spacing="false" fo:text-indent="0cm" style:auto-text-indent="false"/>
      <style:text-properties style:font-name="Swiss 721 SWA" fo:font-family="'Swiss 721 SW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3cm" style:type="center"/>
          <style:tab-stop style:position="16.907cm" style:type="right"/>
        </style:tab-stops>
      </style:paragraph-properties>
    </style:style>
    <style:style style:name="Heading_20_1" style:display-name="Heading 1" style:family="paragraph" style:parent-style-name="Standard" style:next-style-name="Standard" style:default-outline-level="1" style:list-style-name="" style:class="chapter">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chapter">
      <style:paragraph-properties fo:margin-top="0.353cm" fo:margin-bottom="0.212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Standard" style:next-style-name="Standard" style:default-outline-level="3" style:list-style-name="" style:class="chapter">
      <style:paragraph-properties fo:margin-top="0.212cm" fo:margin-bottom="0.212cm" style:contextual-spacing="false" fo:line-height="113%"/>
      <style:text-properties style:font-name="Cambria" fo:font-family="Cambria" style:font-family-generic="roman" style:font-pitch="variable" fo:font-weight="bold" style:font-weight-asian="bold" style:font-weight-complex="bold"/>
    </style:style>
    <style:style style:name="Text_20_body_20_indent" style:display-name="Text body indent" style:family="paragraph" style:parent-style-name="Standard" style:class="text">
      <style:text-properties fo:color="#ff0000" loext:opacity="100%" fo:font-style="italic" style:text-underline-style="solid" style:text-underline-width="auto" style:text-underline-color="font-color" fo:font-weight="bold" style:font-style-asian="italic" style:font-weight-asian="bold"/>
    </style:style>
    <style:style style:name="Marginalia" style:family="paragraph" style:parent-style-name="Standard" style:class="text"/>
    <style:style style:name="Frame_20_contents" style:display-name="Frame contents" style:family="paragraph" style:parent-style-name="Standard" style:class="extra"/>
    <style:style style:name="List_20_Paragraph" style:display-name="List Paragraph" style:family="paragraph"/>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69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09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79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19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2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5" style:family="table">
      <style:table-properties style:width="17.383cm" fo:margin-left="-0.397cm" fo:margin-top="0cm" fo:margin-bottom="0cm" table:align="left" style:writing-mode="page"/>
    </style:style>
    <style:style style:name="Tableau5.A" style:family="table-column">
      <style:table-column-properties style:column-width="5.741cm"/>
    </style:style>
    <style:style style:name="Tableau5.C" style:family="table-column">
      <style:table-column-properties style:column-width="5.9cm"/>
    </style:style>
    <style:style style:name="Tableau5.1" style:family="table-row">
      <style:table-row-properties style:min-row-height="0.397cm" fo:keep-together="auto"/>
    </style:style>
    <style:style style:name="Tableau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13" style:family="table">
      <style:table-properties style:width="17.002cm" fo:margin-top="0cm" fo:margin-bottom="0cm" table:align="center" style:writing-mode="page"/>
    </style:style>
    <style:style style:name="Tableau13.A" style:family="table-column">
      <style:table-column-properties style:column-width="6.615cm"/>
    </style:style>
    <style:style style:name="Tableau13.B" style:family="table-column">
      <style:table-column-properties style:column-width="3.794cm"/>
    </style:style>
    <style:style style:name="Tableau13.C" style:family="table-column">
      <style:table-column-properties style:column-width="6.593cm"/>
    </style:style>
    <style:style style:name="Tableau13.1" style:family="table-row">
      <style:table-row-properties style:min-row-height="0.501cm" fo:keep-together="auto"/>
    </style:style>
    <style:style style:name="Tableau13.A1" style:family="table-cell">
      <style:table-cell-properties style:vertical-align="middle" fo:background-color="transparent" fo:padding-left="0.191cm" fo:padding-right="0.191cm" fo:padding-top="0cm" fo:padding-bottom="0cm" fo:border-left="none" fo:border-right="none" fo:border-top="0.5pt solid #000000" fo:border-bottom="none">
        <style:background-image/>
      </style:table-cell-properties>
    </style:style>
    <style:style style:name="MP1" style:family="paragraph" style:parent-style-name="Standard">
      <style:text-properties style:font-name="Calibri1" fo:font-size="11pt" officeooo:paragraph-rsid="000e3876" style:font-size-asian="11pt" style:font-size-complex="11pt"/>
    </style:style>
    <style:style style:name="MP2" style:family="paragraph" style:parent-style-name="Standard">
      <style:paragraph-properties fo:text-align="center" style:justify-single-word="false"/>
      <style:text-properties style:font-name="Calibri1" fo:font-size="11pt" officeooo:paragraph-rsid="000e3876" style:font-size-asian="11pt" style:font-size-complex="11pt"/>
    </style:style>
    <style:style style:name="MP3" style:family="paragraph" style:parent-style-name="Standard">
      <style:paragraph-properties fo:text-align="end" style:justify-single-word="false"/>
      <style:text-properties style:font-name="Calibri1" fo:font-size="11pt" officeooo:paragraph-rsid="000e3876" style:font-size-asian="11pt" style:font-size-complex="11pt"/>
    </style:style>
    <style:style style:name="MP4" style:family="paragraph" style:parent-style-name="Standard">
      <style:text-properties officeooo:paragraph-rsid="000e3876"/>
    </style:style>
    <style:style style:name="MP5" style:family="paragraph" style:parent-style-name="Standard">
      <style:text-properties officeooo:paragraph-rsid="00197fa4"/>
    </style:style>
    <style:style style:name="MP6" style:family="paragraph" style:parent-style-name="Standard">
      <style:paragraph-properties fo:text-align="center" style:justify-single-word="false"/>
      <style:text-properties officeooo:paragraph-rsid="00197fa4"/>
    </style:style>
    <style:style style:name="MP7" style:family="paragraph" style:parent-style-name="Standard">
      <style:paragraph-properties fo:text-align="end" style:justify-single-word="false"/>
      <style:text-properties officeooo:rsid="00fc8690" officeooo:paragraph-rsid="00fc8690"/>
    </style:style>
    <style:style style:name="MT1" style:family="text">
      <style:text-properties officeooo:rsid="01251208"/>
    </style:style>
    <style:style style:name="MT2" style:family="text">
      <style:text-properties officeooo:rsid="00fc69b6"/>
    </style:style>
    <style:style style:name="MT3" style:family="text">
      <style:text-properties fo:font-weight="bold" style:font-weight-asian="bold"/>
    </style:style>
    <style:page-layout style:name="Mpm1">
      <style:page-layout-properties fo:page-width="21.001cm" fo:page-height="29.7cm" style:num-format="1" style:print-orientation="portrait" fo:margin-top="1cm" fo:margin-bottom="0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MP1">Académies de Besançon et Dijon</text:p>
            </table:table-cell>
            <table:table-cell table:style-name="Tableau5.A1" office:value-type="string">
              <text:p text:style-name="MP2">BTS <text:span text:style-name="MT1">CIEL option A</text:span></text:p>
            </table:table-cell>
            <table:table-cell table:style-name="Tableau5.A1" office:value-type="string">
              <text:p text:style-name="MP3">Session <text:span text:style-name="MT2">2026</text:span></text:p>
            </table:table-cell>
          </table:table-row>
        </table:table>
        <text:p text:style-name="MP4"/>
      </style:header>
      <style:foot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Lycée Eiffel</text:p>
            </table:table-cell>
            <table:table-cell table:style-name="Tableau13.A1" office:value-type="string">
              <text:p text:style-name="MP6">Page <text:span text:style-name="MT3"><text:page-number text:select-page="current">22</text:page-number></text:span><text:s/>sur <text:span text:style-name="MT3"><text:page-count>22</text:page-count></text:span></text:p>
            </table:table-cell>
            <table:table-cell table:style-name="Tableau13.A1" office:value-type="string">
              <text:p text:style-name="MP7">Sechoir a houblo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09:15:43.445109200</meta:creation-date>
    <dc:date>2026-05-04T15:25:43.766587500</dc:date>
    <meta:editing-duration>PT4H50M53S</meta:editing-duration>
    <meta:editing-cycles>312</meta:editing-cycles>
    <meta:generator>LibreOffice/25.8.5.2$Windows_X86_64 LibreOffice_project/9c8b85f387cc00a89945a79c9e6239f32e450ac2</meta:generator>
    <meta:document-statistic meta:table-count="5" meta:image-count="7" meta:object-count="0" meta:page-count="22" meta:paragraph-count="335" meta:word-count="6098" meta:character-count="39113" meta:non-whitespace-character-count="33308"/>
  </office:meta>
</office:document-meta>
</file>