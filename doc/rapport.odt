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440000025EA3949FCE.png" manifest:media-type="image/png"/>
  <manifest:file-entry manifest:full-path="Pictures/100000000000041A0000025314C81E1D.png" manifest:media-type="image/png"/>
  <manifest:file-entry manifest:full-path="Pictures/100000000000038D00000269F37B78F4.png" manifest:media-type="image/png"/>
  <manifest:file-entry manifest:full-path="Pictures/10000001000003840000039809F19A7B.png" manifest:media-type="image/png"/>
  <manifest:file-entry manifest:full-path="Pictures/10000000000005050000033D6EA72F92.png" manifest:media-type="image/png"/>
  <manifest:file-entry manifest:full-path="Pictures/10000000000003ED000002CE163AEF35.png" manifest:media-type="image/png"/>
  <manifest:file-entry manifest:full-path="Pictures/10000000000006760000032414C0F39F.png" manifest:media-type="image/png"/>
  <manifest:file-entry manifest:full-path="Pictures/10000000000003DC000003064C4CC0AA.png" manifest:media-type="image/png"/>
  <manifest:file-entry manifest:full-path="Pictures/10000000000002B1000002E6F7E1A5C0.png" manifest:media-type="image/png"/>
  <manifest:file-entry manifest:full-path="Pictures/10000000000006DA0000031B031F7B74.png" manifest:media-type="image/png"/>
  <manifest:file-entry manifest:full-path="Pictures/10000000000006CF0000032E52F48D71.png" manifest:media-type="image/png"/>
  <manifest:file-entry manifest:full-path="Pictures/100000000000036500000322D62AD20A.png" manifest:media-type="image/png"/>
  <manifest:file-entry manifest:full-path="Pictures/100000000000036300000317B56B81F0.png" manifest:media-type="image/png"/>
  <manifest:file-entry manifest:full-path="Pictures/1000000000000392000000E80DB519C7.png" manifest:media-type="image/png"/>
  <manifest:file-entry manifest:full-path="Pictures/1000000000000365000001FF7B255FAA.png" manifest:media-type="image/png"/>
  <manifest:file-entry manifest:full-path="Pictures/10000001000009EF000004F883E8219C.png" manifest:media-type="image/png"/>
  <manifest:file-entry manifest:full-path="Pictures/10000001000004AD0000010B23CBCC8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modern" style:font-pitch="fixed"/>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wiss 721 SWA" svg:font-family="'Swiss 721 SWA'"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3" style:family="table">
      <style:table-properties style:width="17.002cm" table:align="center"/>
    </style:style>
    <style:style style:name="Tableau3.A" style:family="table-column">
      <style:table-column-properties style:column-width="11.896cm"/>
    </style:style>
    <style:style style:name="Tableau3.B" style:family="table-column">
      <style:table-column-properties style:column-width="5.106cm"/>
    </style:style>
    <style:style style:name="Tableau3.A1" style:family="table-cell">
      <style:table-cell-properties fo:padding-left="0.123cm" fo:padding-right="0.123cm" fo:padding-top="0cm" fo:padding-bottom="0cm" fo:border="0.5pt solid #000000" style:writing-mode="lr-tb"/>
    </style:style>
    <style:style style:name="Tableau4" style:family="table">
      <style:table-properties style:width="17.002cm" table:align="center"/>
    </style:style>
    <style:style style:name="Tableau4.A" style:family="table-column">
      <style:table-column-properties style:column-width="4.133cm"/>
    </style:style>
    <style:style style:name="Tableau4.B" style:family="table-column">
      <style:table-column-properties style:column-width="12.869cm"/>
    </style:style>
    <style:style style:name="Tableau4.A1" style:family="table-cell">
      <style:table-cell-properties fo:padding-left="0.123cm" fo:padding-right="0.123cm" fo:padding-top="0cm" fo:padding-bottom="0cm" fo:border="0.5pt solid #000000" style:writing-mode="lr-tb"/>
    </style:style>
    <style:style style:name="Tableau5" style:family="table">
      <style:table-properties style:width="17.59cm" table:align="center"/>
    </style:style>
    <style:style style:name="Tableau5.A" style:family="table-column">
      <style:table-column-properties style:column-width="5.863cm"/>
    </style:style>
    <style:style style:name="Tableau5.A1" style:family="table-cell">
      <style:table-cell-properties style:vertical-align="middle" fo:background-color="#d9eaf7" fo:padding-left="0.191cm" fo:padding-right="0.191cm" fo:padding-top="0cm" fo:padding-bottom="0cm" fo:border="0.5pt solid #000000" style:writing-mode="lr-tb">
        <style:background-image/>
      </style:table-cell-properties>
    </style:style>
    <style:style style:name="Tableau5.A2" style:family="table-cell">
      <style:table-cell-properties style:vertical-align="middle" fo:padding-left="0.191cm" fo:padding-right="0.191cm" fo:padding-top="0cm" fo:padding-bottom="0cm" fo:border="0.5pt solid #000000" style:writing-mode="lr-tb"/>
    </style:style>
    <style:style style:name="Tableau5.B2" style:family="table-cell">
      <style:table-cell-properties style:vertical-align="middle" fo:padding-left="0.191cm" fo:padding-right="0.191cm" fo:padding-top="0cm" fo:padding-bottom="0cm" fo:border="0.5pt solid #000000" style:writing-mode="lr-tb"/>
    </style:style>
    <style:style style:name="Tableau5.C2" style:family="table-cell">
      <style:table-cell-properties style:vertical-align="middle" fo:padding-left="0.191cm" fo:padding-right="0.191cm" fo:padding-top="0cm" fo:padding-bottom="0cm" fo:border="0.5pt solid #000000" style:writing-mode="lr-tb"/>
    </style:style>
    <style:style style:name="Tableau5.A3" style:family="table-cell">
      <style:table-cell-properties style:vertical-align="middle" fo:padding-left="0.191cm" fo:padding-right="0.191cm" fo:padding-top="0cm" fo:padding-bottom="0cm" fo:border="0.5pt solid #000000" style:writing-mode="lr-tb"/>
    </style:style>
    <style:style style:name="Tableau5.B3" style:family="table-cell">
      <style:table-cell-properties style:vertical-align="middle" fo:padding-left="0.191cm" fo:padding-right="0.191cm" fo:padding-top="0cm" fo:padding-bottom="0cm" fo:border="0.5pt solid #000000" style:writing-mode="lr-tb"/>
    </style:style>
    <style:style style:name="Tableau5.C3" style:family="table-cell">
      <style:table-cell-properties style:vertical-align="middle" fo:padding-left="0.191cm" fo:padding-right="0.191cm" fo:padding-top="0cm" fo:padding-bottom="0cm" fo:border="0.5pt solid #000000" style:writing-mode="lr-tb"/>
    </style:style>
    <style:style style:name="Tableau5.A4" style:family="table-cell">
      <style:table-cell-properties style:vertical-align="middle" fo:padding-left="0.191cm" fo:padding-right="0.191cm" fo:padding-top="0cm" fo:padding-bottom="0cm" fo:border="0.5pt solid #000000" style:writing-mode="lr-tb"/>
    </style:style>
    <style:style style:name="Tableau5.B4" style:family="table-cell">
      <style:table-cell-properties style:vertical-align="middle" fo:padding-left="0.191cm" fo:padding-right="0.191cm" fo:padding-top="0cm" fo:padding-bottom="0cm" fo:border="0.5pt solid #000000" style:writing-mode="lr-tb"/>
    </style:style>
    <style:style style:name="Tableau5.C4" style:family="table-cell">
      <style:table-cell-properties style:vertical-align="middle" fo:padding-left="0.191cm" fo:padding-right="0.191cm" fo:padding-top="0cm" fo:padding-bottom="0cm" fo:border="0.5pt solid #000000" style:writing-mode="lr-tb"/>
    </style:style>
    <style:style style:name="Tableau5.A5" style:family="table-cell">
      <style:table-cell-properties style:vertical-align="middle" fo:padding-left="0.191cm" fo:padding-right="0.191cm" fo:padding-top="0cm" fo:padding-bottom="0cm" fo:border="0.5pt solid #000000" style:writing-mode="lr-tb"/>
    </style:style>
    <style:style style:name="Tableau5.B5" style:family="table-cell">
      <style:table-cell-properties style:vertical-align="middle" fo:padding-left="0.191cm" fo:padding-right="0.191cm" fo:padding-top="0cm" fo:padding-bottom="0cm" fo:border="0.5pt solid #000000" style:writing-mode="lr-tb"/>
    </style:style>
    <style:style style:name="Tableau5.C5" style:family="table-cell">
      <style:table-cell-properties style:vertical-align="middle" fo:padding-left="0.191cm" fo:padding-right="0.191cm" fo:padding-top="0cm" fo:padding-bottom="0cm" fo:border="0.5pt solid #000000" style:writing-mode="lr-tb"/>
    </style:style>
    <style:style style:name="Tableau5.A6" style:family="table-cell">
      <style:table-cell-properties style:vertical-align="middle" fo:padding-left="0.191cm" fo:padding-right="0.191cm" fo:padding-top="0cm" fo:padding-bottom="0cm" fo:border="0.5pt solid #000000" style:writing-mode="lr-tb"/>
    </style:style>
    <style:style style:name="Tableau5.B6" style:family="table-cell">
      <style:table-cell-properties style:vertical-align="middle" fo:padding-left="0.191cm" fo:padding-right="0.191cm" fo:padding-top="0cm" fo:padding-bottom="0cm" fo:border="0.5pt solid #000000" style:writing-mode="lr-tb"/>
    </style:style>
    <style:style style:name="Tableau5.C6" style:family="table-cell">
      <style:table-cell-properties style:vertical-align="middle" fo:padding-left="0.191cm" fo:padding-right="0.191cm" fo:padding-top="0cm" fo:padding-bottom="0cm" fo:border="0.5pt solid #000000" style:writing-mode="lr-tb"/>
    </style:style>
    <style:style style:name="Tableau5.A7" style:family="table-cell">
      <style:table-cell-properties style:vertical-align="middle" fo:padding-left="0.191cm" fo:padding-right="0.191cm" fo:padding-top="0cm" fo:padding-bottom="0cm" fo:border="0.5pt solid #000000" style:writing-mode="lr-tb"/>
    </style:style>
    <style:style style:name="Tableau5.B7" style:family="table-cell">
      <style:table-cell-properties style:vertical-align="middle" fo:padding-left="0.191cm" fo:padding-right="0.191cm" fo:padding-top="0cm" fo:padding-bottom="0cm" fo:border="0.5pt solid #000000" style:writing-mode="lr-tb"/>
    </style:style>
    <style:style style:name="Tableau5.C7" style:family="table-cell">
      <style:table-cell-properties style:vertical-align="middle" fo:padding-left="0.191cm" fo:padding-right="0.191cm" fo:padding-top="0cm" fo:padding-bottom="0cm" fo:border="0.5pt solid #000000" style:writing-mode="lr-tb"/>
    </style:style>
    <style:style style:name="Tableau5.A8" style:family="table-cell">
      <style:table-cell-properties style:vertical-align="middle" fo:padding-left="0.191cm" fo:padding-right="0.191cm" fo:padding-top="0cm" fo:padding-bottom="0cm" fo:border="0.5pt solid #000000" style:writing-mode="lr-tb"/>
    </style:style>
    <style:style style:name="Tableau5.B8" style:family="table-cell">
      <style:table-cell-properties style:vertical-align="middle" fo:padding-left="0.191cm" fo:padding-right="0.191cm" fo:padding-top="0cm" fo:padding-bottom="0cm" fo:border="0.5pt solid #000000" style:writing-mode="lr-tb"/>
    </style:style>
    <style:style style:name="Tableau5.C8" style:family="table-cell">
      <style:table-cell-properties style:vertical-align="middle" fo:padding-left="0.191cm" fo:padding-right="0.191cm" fo:padding-top="0cm" fo:padding-bottom="0cm" fo:border="0.5pt solid #000000" style:writing-mode="lr-tb"/>
    </style:style>
    <style:style style:name="Tableau6" style:family="table">
      <style:table-properties style:width="16.051cm" fo:margin-left="0.002cm" table:align="left"/>
    </style:style>
    <style:style style:name="Tableau6.A" style:family="table-column">
      <style:table-column-properties style:column-width="3.881cm"/>
    </style:style>
    <style:style style:name="Tableau6.B" style:family="table-column">
      <style:table-column-properties style:column-width="12.171cm"/>
    </style:style>
    <style:style style:name="Tableau6.A1" style:family="table-cell">
      <style:table-cell-properties fo:background-color="#d5e8f0" fo:padding-left="0.212cm" fo:padding-right="0.212cm" fo:padding-top="0.176cm" fo:padding-bottom="0.176cm" fo:border="0.25pt solid #cccccc" style:writing-mode="lr-tb">
        <style:background-image/>
      </style:table-cell-properties>
    </style:style>
    <style:style style:name="Tableau6.A2" style:family="table-cell">
      <style:table-cell-properties fo:background-color="#ffffff" fo:padding-left="0.212cm" fo:padding-right="0.212cm" fo:padding-top="0.176cm" fo:padding-bottom="0.176cm" fo:border="0.25pt solid #cccccc" style:writing-mode="lr-tb">
        <style:background-image/>
      </style:table-cell-properties>
    </style:style>
    <style:style style:name="Tableau7" style:family="table">
      <style:table-properties style:width="14.288cm" fo:margin-left="0.002cm" table:align="left"/>
    </style:style>
    <style:style style:name="Tableau7.A" style:family="table-column">
      <style:table-column-properties style:column-width="4.939cm"/>
    </style:style>
    <style:style style:name="Tableau7.B" style:family="table-column">
      <style:table-column-properties style:column-width="3.35cm"/>
    </style:style>
    <style:style style:name="Tableau7.C" style:family="table-column">
      <style:table-column-properties style:column-width="3.351cm"/>
    </style:style>
    <style:style style:name="Tableau7.D" style:family="table-column">
      <style:table-column-properties style:column-width="2.648cm"/>
    </style:style>
    <style:style style:name="Tableau7.A1" style:family="table-cell">
      <style:table-cell-properties fo:background-color="#d5e8f0" fo:padding-left="0.212cm" fo:padding-right="0.212cm" fo:padding-top="0.176cm" fo:padding-bottom="0.176cm" fo:border="0.25pt solid #cccccc" style:writing-mode="lr-tb">
        <style:background-image/>
      </style:table-cell-properties>
    </style:style>
    <style:style style:name="Tableau7.A2" style:family="table-cell">
      <style:table-cell-properties fo:background-color="#ffffff" fo:padding-left="0.212cm" fo:padding-right="0.212cm" fo:padding-top="0.176cm" fo:padding-bottom="0.176cm" fo:border="0.25pt solid #cccccc" style:writing-mode="lr-tb">
        <style:background-image/>
      </style:table-cell-properties>
    </style:style>
    <style:style style:name="Tableau7.7" style:family="table-row">
      <style:table-row-properties style:min-row-height="1.873cm" style:use-optimal-row-height="false"/>
    </style:style>
    <style:style style:name="Tableau8" style:family="table">
      <style:table-properties style:width="18.602cm" table:align="margins"/>
    </style:style>
    <style:style style:name="Tableau8.A" style:family="table-column">
      <style:table-column-properties style:column-width="4.65cm" style:rel-column-width="16383*"/>
    </style:style>
    <style:style style:name="Tableau8.D" style:family="table-column">
      <style:table-column-properties style:column-width="4.651cm" style:rel-column-width="16386*"/>
    </style:style>
    <style:style style:name="Tableau8.A1" style:family="table-cell">
      <style:table-cell-properties fo:padding="0.097cm" fo:border-left="0.5pt solid #000000" fo:border-right="none" fo:border-top="0.5pt solid #000000" fo:border-bottom="0.5pt solid #000000"/>
    </style:style>
    <style:style style:name="Tableau8.D1" style:family="table-cell">
      <style:table-cell-properties fo:padding="0.097cm" fo:border="0.5pt solid #000000"/>
    </style:style>
    <style:style style:name="Tableau8.A2" style:family="table-cell">
      <style:table-cell-properties fo:padding="0.097cm" fo:border-left="0.5pt solid #000000" fo:border-right="none" fo:border-top="none" fo:border-bottom="0.5pt solid #000000"/>
    </style:style>
    <style:style style:name="Tableau8.D2" style:family="table-cell">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text-align="center" style:justify-single-word="false" fo:text-indent="1.251cm" style:auto-text-indent="false" style:page-number="auto" fo:break-before="page" fo:padding-left="0.141cm" fo:padding-right="0.141cm" fo:padding-top="0.035cm" fo:padding-bottom="0.035cm" fo:border="0.51pt solid #000000" style:shadow="none"/>
    </style:style>
    <style:style style:name="P2" style:family="paragraph" style:parent-style-name="Standard">
      <style:paragraph-properties fo:text-align="center" style:justify-single-word="false" fo:padding-left="0.141cm" fo:padding-right="0.141cm" fo:padding-top="0.035cm" fo:padding-bottom="0.035cm" fo:border="0.51pt solid #000000" style:shadow="none"/>
      <style:text-properties fo:font-size="6pt" fo:font-weight="bold" style:font-size-asian="6pt" style:font-weight-asian="bold"/>
    </style:style>
    <style:style style:name="P3" style:family="paragraph" style:parent-style-name="Standard">
      <style:paragraph-properties fo:text-align="center" style:justify-single-word="false" fo:padding-left="0.141cm" fo:padding-right="0.141cm" fo:padding-top="0.035cm" fo:padding-bottom="0.035cm" fo:border="0.51pt solid #000000" style:shadow="none"/>
    </style:style>
    <style:style style:name="P4" style:family="paragraph" style:parent-style-name="Standard">
      <style:paragraph-properties fo:text-align="center" style:justify-single-word="false" fo:padding-left="0.141cm" fo:padding-right="0.141cm" fo:padding-top="0.035cm" fo:padding-bottom="0.035cm" fo:border="0.51pt solid #000000" style:shadow="none"/>
      <style:text-properties fo:font-size="3pt" fo:font-weight="bold" style:font-size-asian="3pt" style:font-weight-asian="bold"/>
    </style:style>
    <style:style style:name="P5" style:family="paragraph" style:parent-style-name="Standard">
      <style:paragraph-properties fo:text-align="center" style:justify-single-word="false"/>
      <style:text-properties fo:font-size="8pt" fo:font-weight="bold" style:font-size-asian="8pt" style:font-weight-asian="bold"/>
    </style:style>
    <style:style style:name="P6" style:family="paragraph" style:parent-style-name="Standard">
      <style:paragraph-properties fo:margin-top="0.106cm" fo:margin-bottom="0.106cm" style:contextual-spacing="false"/>
    </style:style>
    <style:style style:name="P7" style:family="paragraph" style:parent-style-name="Standard">
      <style:paragraph-properties fo:margin-top="0.106cm" fo:margin-bottom="0.106cm" style:contextual-spacing="false" fo:text-align="center" style:justify-single-word="false"/>
    </style:style>
    <style:style style:name="P8" style:family="paragraph" style:parent-style-name="texte1">
      <style:paragraph-properties fo:margin-top="0cm" fo:margin-bottom="0cm" style:contextual-spacing="false"/>
      <style:text-properties style:font-name="Calibri"/>
    </style:style>
    <style:style style:name="P9" style:family="paragraph" style:parent-style-name="Standard">
      <style:paragraph-properties fo:margin-top="0.106cm" fo:margin-bottom="0.106cm" style:contextual-spacing="false"/>
      <style:text-properties fo:font-style="italic" style:font-style-asian="italic"/>
    </style:style>
    <style:style style:name="P10" style:family="paragraph" style:parent-style-name="texte1">
      <style:text-properties style:font-name="Calibri"/>
    </style:style>
    <style:style style:name="P11" style:family="paragraph" style:parent-style-name="Titre_20_1">
      <style:paragraph-properties fo:margin-top="0cm" fo:margin-bottom="0cm" style:contextual-spacing="false"/>
    </style:style>
    <style:style style:name="P12" style:family="paragraph" style:parent-style-name="Standard">
      <style:paragraph-properties fo:margin-top="0.141cm" fo:margin-bottom="0.141cm" style:contextual-spacing="false" fo:text-align="justify" style:justify-single-word="false"/>
      <style:text-properties style:font-name="Arial" style:font-name-asian="Arial"/>
    </style:style>
    <style:style style:name="P13" style:family="paragraph" style:parent-style-name="Titre_20_2">
      <style:paragraph-properties fo:margin-top="0.051cm" fo:margin-bottom="0cm" style:contextual-spacing="false"/>
    </style:style>
    <style:style style:name="P14" style:family="paragraph" style:parent-style-name="Standard">
      <style:paragraph-properties fo:margin-top="0.051cm" fo:margin-bottom="0cm" style:contextual-spacing="false"/>
    </style:style>
    <style:style style:name="P15" style:family="paragraph" style:parent-style-name="Standard">
      <style:paragraph-properties fo:margin-top="0.141cm" fo:margin-bottom="0.141cm" style:contextual-spacing="false" fo:text-align="justify" style:justify-single-word="false"/>
    </style:style>
    <style:style style:name="P16" style:family="paragraph">
      <style:paragraph-properties fo:margin-top="0.141cm" fo:margin-bottom="0.141cm" fo:text-align="center"/>
      <style:text-properties style:font-name="Arial" fo:font-size="12pt" style:font-name-asian="Arial"/>
    </style:style>
    <style:style style:name="P17" style:family="paragraph">
      <loext:graphic-properties draw:fill-color="#ff8000"/>
      <style:paragraph-properties fo:margin-top="0.141cm" fo:margin-bottom="0.141cm" fo:text-align="center" style:writing-mode="lr-tb"/>
      <style:text-properties style:font-name="Arial" fo:font-size="12pt" style:font-name-asian="Arial"/>
    </style:style>
    <style:style style:name="P18" style:family="paragraph">
      <loext:graphic-properties draw:fill-color="#00a933"/>
      <style:paragraph-properties fo:margin-top="0.141cm" fo:margin-bottom="0.141cm" fo:text-align="center" style:writing-mode="lr-tb"/>
      <style:text-properties style:font-name="Arial" fo:font-size="12pt" style:font-name-asian="Arial"/>
    </style:style>
    <style:style style:name="P19" style:family="paragraph">
      <loext:graphic-properties draw:fill-color="#2a6099"/>
      <style:paragraph-properties fo:margin-top="0.141cm" fo:margin-bottom="0.141cm" fo:text-align="center" style:writing-mode="lr-tb"/>
      <style:text-properties style:font-name="Arial" fo:font-size="12pt" style:font-name-asian="Arial"/>
    </style:style>
    <style:style style:name="P20" style:family="paragraph" style:parent-style-name="Titre_20_1">
      <style:paragraph-properties fo:margin-top="0.333cm" fo:margin-bottom="0.051cm" style:contextual-spacing="false"/>
    </style:style>
    <style:style style:name="P21" style:family="paragraph" style:parent-style-name="Titre_20_2">
      <style:paragraph-properties fo:margin-top="0.494cm" fo:margin-bottom="0.302cm" style:contextual-spacing="false"/>
    </style:style>
    <style:style style:name="P22" style:family="paragraph" style:parent-style-name="Standard">
      <style:paragraph-properties fo:margin-top="0.141cm" fo:margin-bottom="0.141cm" style:contextual-spacing="false" fo:text-align="justify" style:justify-single-word="false"/>
      <style:text-properties fo:font-weight="bold" style:font-weight-asian="bold" style:font-weight-complex="bold"/>
    </style:style>
    <style:style style:name="P23" style:family="paragraph" style:parent-style-name="Normal">
      <style:paragraph-properties fo:margin-top="0cm" fo:margin-bottom="0.282cm" style:contextual-spacing="false" fo:line-height="112%"/>
    </style:style>
    <style:style style:name="P24" style:family="paragraph" style:parent-style-name="Normal">
      <style:paragraph-properties fo:hyphenation-ladder-count="no-limit" fo:hyphenation-keep="auto" loext:hyphenation-keep-type="column" loext:hyphenation-keep-line="false" style:vertical-align="auto"/>
      <style:text-properties style:font-name="Aptos" fo:font-size="11pt" fo:language="en" fo:country="US"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loext:hyphenation-no-caps="false" loext:hyphenation-no-last-word="false" loext:hyphenation-word-char-count="no-limit" loext:hyphenation-zone="no-limit"/>
    </style:style>
    <style:style style:name="P25" style:family="paragraph" style:parent-style-name="Normal">
      <style:paragraph-properties fo:hyphenation-ladder-count="no-limit" fo:hyphenation-keep="auto" loext:hyphenation-keep-type="column" loext:hyphenation-keep-line="false" style:vertical-align="auto"/>
      <style:text-properties style:font-name="Aptos" fo:font-size="11pt" fo:language="en" fo:country="US" style:letter-kerning="false" style:font-name-asian="Times New Roman" style:font-size-asian="11pt" style:language-asian="en" style:country-asian="US"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26" style:family="paragraph" style:parent-style-name="Normal">
      <style:paragraph-properties fo:hyphenation-ladder-count="no-limit" fo:hyphenation-keep="auto" loext:hyphenation-keep-type="column" loext:hyphenation-keep-line="false" style:vertical-align="auto"/>
      <style:text-properties style:font-name="Aptos" fo:font-size="11pt" style:letter-kerning="false" style:font-name-asian="Times New Roman" style:font-size-asian="11pt" style:language-asian="en" style:country-asian="US"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27" style:family="paragraph" style:parent-style-name="Normal">
      <style:paragraph-properties fo:margin-top="0cm" fo:margin-bottom="0.282cm" style:contextual-spacing="false" fo:line-height="112%"/>
      <style:text-properties officeooo:paragraph-rsid="003c69d5"/>
    </style:style>
    <style:style style:name="P28" style:family="paragraph" style:parent-style-name="Titre_20_2">
      <style:text-properties officeooo:paragraph-rsid="003c69d5"/>
    </style:style>
    <style:style style:name="P29" style:family="paragraph" style:parent-style-name="Titre_20_2">
      <style:paragraph-properties fo:margin-top="0.393cm" fo:margin-bottom="0.182cm" style:contextual-spacing="false"/>
    </style:style>
    <style:style style:name="P30" style:family="paragraph" style:parent-style-name="Titre_20_2">
      <style:paragraph-properties fo:margin-top="0.393cm" fo:margin-bottom="0.182cm" style:contextual-spacing="false"/>
      <style:text-properties officeooo:paragraph-rsid="001545e4"/>
    </style:style>
    <style:style style:name="P31" style:family="paragraph">
      <style:paragraph-properties fo:text-align="center"/>
    </style:style>
    <style:style style:name="P32" style:family="paragraph" style:parent-style-name="Paragraphe_20_de_20_liste" style:list-style-name="WWNum2">
      <style:paragraph-properties fo:margin-top="0.106cm" fo:margin-bottom="0.106cm" style:contextual-spacing="false"/>
      <style:text-properties style:font-name="Arial" style:font-name-asian="Arial"/>
    </style:style>
    <style:style style:name="P33" style:family="paragraph" style:parent-style-name="Paragraphe_20_de_20_liste">
      <style:paragraph-properties fo:margin-top="0.106cm" fo:margin-bottom="0.106cm" style:contextual-spacing="false"/>
      <style:text-properties style:font-name="Arial" style:font-name-asian="Arial"/>
    </style:style>
    <style:style style:name="P34" style:family="paragraph" style:parent-style-name="Standard">
      <style:text-properties style:font-name="Arial" officeooo:paragraph-rsid="004632fc"/>
    </style:style>
    <style:style style:name="P35" style:family="paragraph" style:parent-style-name="Standard">
      <style:text-properties officeooo:paragraph-rsid="004632fc"/>
    </style:style>
    <style:style style:name="P36" style:family="paragraph" style:parent-style-name="Standard">
      <style:text-properties style:font-name="Arial"/>
    </style:style>
    <style:style style:name="P37" style:family="paragraph" style:parent-style-name="Titre_20_1">
      <style:text-properties fo:font-size="18pt" style:font-size-asian="18pt" style:font-size-complex="18pt"/>
    </style:style>
    <style:style style:name="P38" style:family="paragraph" style:parent-style-name="Standard">
      <style:text-properties style:font-name="Arial" fo:font-size="16pt" style:font-size-asian="16pt" style:font-size-complex="16pt"/>
    </style:style>
    <style:style style:name="P39" style:family="paragraph" style:parent-style-name="Standard">
      <style:paragraph-properties fo:margin-top="0.106cm" fo:margin-bottom="0.106cm" style:contextual-spacing="false" fo:text-align="justify" style:justify-single-word="false"/>
      <style:text-properties style:font-name="Arial"/>
    </style:style>
    <style:style style:name="P40" style:family="paragraph" style:parent-style-name="Paragraphe_20_de_20_liste" style:list-style-name="WWNum2">
      <style:paragraph-properties fo:margin-top="0.106cm" fo:margin-bottom="0.106cm" style:contextual-spacing="false"/>
    </style:style>
    <style:style style:name="P41" style:family="paragraph" style:parent-style-name="Paragraphe_20_de_20_liste" style:list-style-name="WWNum3">
      <style:paragraph-properties fo:margin-top="0.106cm" fo:margin-bottom="0.106cm" style:contextual-spacing="false"/>
      <style:text-properties style:font-name="Arial" style:font-name-asian="Arial"/>
    </style:style>
    <style:style style:name="P42" style:family="paragraph" style:parent-style-name="Paragraphe_20_de_20_liste" style:list-style-name="WWNum3">
      <style:paragraph-properties fo:margin-top="0.106cm" fo:margin-bottom="0.106cm" style:contextual-spacing="false"/>
    </style:style>
    <style:style style:name="P43" style:family="paragraph" style:parent-style-name="Standard">
      <style:text-properties style:font-name="Arial" fo:font-weight="bold" style:font-name-asian="Arial" style:font-weight-asian="bold" style:font-weight-complex="bold"/>
    </style:style>
    <style:style style:name="P44" style:family="paragraph" style:parent-style-name="Standard">
      <style:text-properties style:font-name="Arial" style:font-name-asian="Arial"/>
    </style:style>
    <style:style style:name="P45" style:family="paragraph" style:parent-style-name="Standard">
      <style:text-properties style:font-name="Arial" fo:language="en" fo:country="US" style:font-name-asian="Arial"/>
    </style:style>
    <style:style style:name="P46" style:family="paragraph" style:parent-style-name="Standard">
      <style:paragraph-properties fo:margin-left="1.27cm" fo:margin-top="0.106cm" fo:margin-bottom="0.106cm" style:contextual-spacing="false">
        <style:tab-stops/>
      </style:paragraph-properties>
      <style:text-properties style:font-name="Courier New" fo:font-size="11pt" fo:language="en" fo:country="US" style:font-name-asian="Courier New" style:font-size-asian="11pt" style:font-name-complex="Courier New" style:font-size-complex="11pt"/>
    </style:style>
    <style:style style:name="P47" style:family="paragraph" style:parent-style-name="Standard">
      <style:paragraph-properties fo:margin-left="1.27cm" fo:margin-top="0.106cm" fo:margin-bottom="0.106cm" style:contextual-spacing="false">
        <style:tab-stops/>
      </style:paragraph-properties>
    </style:style>
    <style:style style:name="P48" style:family="paragraph" style:parent-style-name="Titre_20_2">
      <style:text-properties officeooo:paragraph-rsid="0047e465"/>
    </style:style>
    <style:style style:name="P49" style:family="paragraph" style:parent-style-name="Standard">
      <style:paragraph-properties fo:margin-top="0cm" fo:margin-bottom="0cm" style:contextual-spacing="false" fo:text-align="justify" style:justify-single-word="false"/>
    </style:style>
    <style:style style:name="P50"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name-asian="Arial" style:font-weight-asian="bold" style:font-weight-complex="bold"/>
    </style:style>
    <style:style style:name="P51" style:family="paragraph" style:parent-style-name="Standard">
      <style:paragraph-properties fo:margin-top="0.141cm" fo:margin-bottom="0.141cm" style:contextual-spacing="false"/>
      <style:text-properties style:font-name="Arial" style:font-name-asian="Arial"/>
    </style:style>
    <style:style style:name="P52" style:family="paragraph" style:parent-style-name="Standard">
      <style:paragraph-properties fo:margin-top="0.141cm" fo:margin-bottom="0.141cm" style:contextual-spacing="false"/>
    </style:style>
    <style:style style:name="P53" style:family="paragraph" style:parent-style-name="Standard">
      <style:paragraph-properties fo:margin-top="0.141cm" fo:margin-bottom="0.141cm" style:contextual-spacing="false"/>
      <style:text-properties style:font-name="Arial" style:text-underline-style="solid" style:text-underline-width="auto" style:text-underline-color="font-color" fo:font-weight="bold" style:text-underline-mode="continuous" style:text-overline-mode="continuous" style:text-line-through-mode="continuous" style:font-name-asian="Arial" style:font-weight-asian="bold" style:font-weight-complex="bold"/>
    </style:style>
    <style:style style:name="P54" style:family="paragraph" style:parent-style-name="Text_20_body">
      <style:text-properties style:font-name="Arial"/>
    </style:style>
    <style:style style:name="P55" style:family="paragraph" style:parent-style-name="Text_20_body">
      <style:paragraph-properties fo:margin-top="0.141cm" fo:margin-bottom="0.141cm" style:contextual-spacing="false" fo:text-align="justify" style:justify-single-word="false"/>
    </style:style>
    <style:style style:name="P56" style:family="paragraph" style:parent-style-name="Text_20_body" style:list-style-name="L1">
      <style:paragraph-properties fo:margin-top="0.141cm" fo:margin-bottom="0.141cm" style:contextual-spacing="false" fo:text-align="justify" style:justify-single-word="false"/>
    </style:style>
    <style:style style:name="P57" style:family="paragraph" style:parent-style-name="Titre_20_1">
      <style:paragraph-properties fo:break-before="page"/>
      <style:text-properties officeooo:rsid="004d9d98" officeooo:paragraph-rsid="004d9d98"/>
    </style:style>
    <style:style style:name="P58" style:family="paragraph" style:parent-style-name="Standard">
      <style:text-properties officeooo:paragraph-rsid="004d9d98"/>
    </style:style>
    <style:style style:name="P59" style:family="paragraph" style:parent-style-name="Standard">
      <style:text-properties officeooo:rsid="004d9d98" officeooo:paragraph-rsid="004d9d98"/>
    </style:style>
    <style:style style:name="P60" style:family="paragraph" style:parent-style-name="Titre_20_1">
      <style:text-properties officeooo:rsid="004d9d98" officeooo:paragraph-rsid="004d9d98"/>
    </style:style>
    <style:style style:name="P61" style:family="paragraph" style:parent-style-name="Titre_20_1">
      <style:text-properties officeooo:rsid="004ee6fa" officeooo:paragraph-rsid="004ee6fa"/>
    </style:style>
    <style:style style:name="P62" style:family="paragraph" style:parent-style-name="Standard">
      <style:text-properties officeooo:paragraph-rsid="004ee6fa"/>
    </style:style>
    <style:style style:name="P63" style:family="paragraph" style:parent-style-name="Standard">
      <style:text-properties officeooo:rsid="004ee6fa" officeooo:paragraph-rsid="004ee6fa"/>
    </style:style>
    <style:style style:name="P64" style:family="paragraph" style:parent-style-name="Standard">
      <style:paragraph-properties fo:break-before="page"/>
      <style:text-properties officeooo:rsid="004ee6fa" officeooo:paragraph-rsid="004ee6fa"/>
    </style:style>
    <style:style style:name="P65" style:family="paragraph" style:parent-style-name="Titre_20_2">
      <style:text-properties officeooo:rsid="004ee6fa" officeooo:paragraph-rsid="004ee6fa"/>
    </style:style>
    <style:style style:name="P66" style:family="paragraph" style:parent-style-name="Standard">
      <style:text-properties officeooo:paragraph-rsid="0050cd32"/>
    </style:style>
    <style:style style:name="P67" style:family="paragraph" style:parent-style-name="Standard">
      <style:text-properties fo:color="#d7ba7d" loext:opacity="100%" style:font-name="Consolas" fo:font-size="10.5pt" fo:font-weight="normal" officeooo:paragraph-rsid="0050cd32" fo:background-color="#1f1f1f"/>
    </style:style>
    <style:style style:name="P68" style:family="paragraph" style:parent-style-name="Standard">
      <loext:graphic-properties draw:fill="solid" draw:fill-color="#1f1f1f"/>
      <style:paragraph-properties fo:background-color="#1f1f1f" fo:padding="0.049cm" fo:border="0.06pt solid #000000"/>
      <style:text-properties officeooo:paragraph-rsid="0050cd32"/>
    </style:style>
    <style:style style:name="P69" style:family="paragraph" style:parent-style-name="Standard">
      <loext:graphic-properties draw:fill="solid" draw:fill-color="#1f1f1f"/>
      <style:paragraph-properties fo:margin-left="0cm" fo:margin-right="0cm" style:line-height-at-least="0.503cm" fo:text-indent="0cm" style:auto-text-indent="false" fo:background-color="#1f1f1f" fo:padding="0.049cm" fo:border="0.06pt solid #000000"/>
      <style:text-properties fo:color="#cccccc" loext:opacity="100%" fo:background-color="#1f1f1f"/>
    </style:style>
    <style:style style:name="P70" style:family="paragraph" style:parent-style-name="Standard">
      <loext:graphic-properties draw:fill="solid" draw:fill-color="#1f1f1f"/>
      <style:paragraph-properties fo:margin-left="0cm" fo:margin-right="0cm" style:line-height-at-least="0.503cm" fo:text-indent="0cm" style:auto-text-indent="false" fo:background-color="#1f1f1f" fo:padding="0.049cm" fo:border="0.06pt solid #000000"/>
      <style:text-properties fo:color="#cccccc" loext:opacity="100%" style:font-name="Consolas" fo:font-size="10.5pt" fo:font-weight="normal" fo:background-color="#1f1f1f"/>
    </style:style>
    <style:style style:name="P71"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72" style:family="paragraph" style:parent-style-name="Titre_20_2">
      <style:text-properties officeooo:rsid="00516c72" officeooo:paragraph-rsid="00516c72"/>
    </style:style>
    <style:style style:name="P73" style:family="paragraph" style:parent-style-name="Standard">
      <style:paragraph-properties fo:margin-left="0cm" fo:margin-right="0cm" fo:line-height="115%" fo:text-indent="0cm" style:auto-text-indent="false" style:writing-mode="lr-tb"/>
    </style:style>
    <style:style style:name="P74" style:family="paragraph" style:parent-style-name="No_20_Spacing">
      <style:paragraph-properties fo:margin-left="0cm" fo:margin-right="0cm" fo:text-indent="0cm" style:auto-text-indent="false" fo:padding="0.049cm" fo:border="0.06pt solid #000000" style:writing-mode="lr-tb"/>
    </style:style>
    <style:style style:name="P75" style:family="paragraph" style:parent-style-name="No_20_Spacing">
      <style:paragraph-properties fo:margin-left="0cm" fo:margin-right="0cm" fo:text-indent="0cm" style:auto-text-indent="false" style:writing-mode="lr-tb"/>
    </style:style>
    <style:style style:name="P76" style:family="paragraph" style:parent-style-name="No_20_Spacing">
      <style:paragraph-properties fo:margin-left="0cm" fo:margin-right="0cm" fo:text-indent="0cm" style:auto-text-indent="false" style:writing-mode="lr-tb"/>
      <style:text-properties fo:language="fr" fo:country="FR"/>
    </style:style>
    <style:style style:name="P77" style:family="paragraph" style:parent-style-name="No_20_Spacing">
      <style:paragraph-properties fo:margin-left="0cm" fo:margin-right="0cm" fo:text-indent="0cm" style:auto-text-indent="false" style:writing-mode="lr-tb"/>
      <style:text-properties fo:color="#0d0d0d" loext:opacity="100%" fo:language="fr" fo:country="FR"/>
    </style:style>
    <style:style style:name="P78" style:family="paragraph" style:parent-style-name="Standard">
      <style:paragraph-properties fo:padding="0.049cm" fo:border="0.06pt solid #000000"/>
      <style:text-properties fo:color="#0d0d0d" loext:opacity="100%" officeooo:paragraph-rsid="00516c72"/>
    </style:style>
    <style:style style:name="P79" style:family="paragraph" style:parent-style-name="Standard">
      <style:paragraph-properties fo:padding="0.049cm" fo:border="none"/>
      <style:text-properties fo:color="#0d0d0d" loext:opacity="100%" officeooo:rsid="00709fbd" officeooo:paragraph-rsid="00516c72"/>
    </style:style>
    <style:style style:name="P80" style:family="paragraph" style:parent-style-name="Titre_20_2">
      <style:text-properties officeooo:rsid="0071884a" officeooo:paragraph-rsid="0071884a"/>
    </style:style>
    <style:style style:name="P81" style:family="paragraph" style:parent-style-name="Standard">
      <style:text-properties officeooo:rsid="0071884a" officeooo:paragraph-rsid="0071884a"/>
    </style:style>
    <style:style style:name="P82" style:family="paragraph" style:parent-style-name="Standard">
      <style:paragraph-properties fo:break-before="page"/>
      <style:text-properties officeooo:rsid="0071884a" officeooo:paragraph-rsid="0071884a"/>
    </style:style>
    <style:style style:name="P83" style:family="paragraph" style:parent-style-name="Standard">
      <style:text-properties officeooo:rsid="0072e9a1" officeooo:paragraph-rsid="0072e9a1"/>
    </style:style>
    <style:style style:name="P84" style:family="paragraph" style:parent-style-name="Standard">
      <loext:graphic-properties draw:fill="solid" draw:fill-color="#1f1f1f"/>
      <style:paragraph-properties fo:background-color="#1f1f1f"/>
      <style:text-properties fo:color="#cccccc" loext:opacity="100%" style:font-name="Consolas" fo:font-size="10.5pt" fo:font-weight="normal" officeooo:rsid="0072e9a1" officeooo:paragraph-rsid="0072e9a1" fo:background-color="#1f1f1f"/>
    </style:style>
    <style:style style:name="P85" style:family="paragraph" style:parent-style-name="Standard">
      <loext:graphic-properties draw:fill="solid" draw:fill-color="#1f1f1f"/>
      <style:paragraph-properties fo:margin-left="0cm" fo:margin-right="0cm" style:line-height-at-least="0.503cm" fo:text-indent="0cm" style:auto-text-indent="false" fo:background-color="#1f1f1f"/>
      <style:text-properties fo:color="#cccccc" loext:opacity="100%" fo:background-color="#1f1f1f"/>
    </style:style>
    <style:style style:name="P86" style:family="paragraph" style:parent-style-name="Standard">
      <loext:graphic-properties draw:fill="solid" draw:fill-color="#1f1f1f"/>
      <style:paragraph-properties style:line-height-at-least="0.503cm" fo:background-color="#1f1f1f"/>
    </style:style>
    <style:style style:name="P87" style:family="paragraph" style:parent-style-name="Standard">
      <loext:graphic-properties draw:fill="solid" draw:fill-color="#1f1f1f"/>
      <style:paragraph-properties fo:margin-left="0cm" fo:margin-right="0cm" style:line-height-at-least="0.503cm" fo:text-indent="0cm" style:auto-text-indent="false" fo:background-color="#1f1f1f"/>
      <style:text-properties fo:color="#cccccc" loext:opacity="100%" style:font-name="Consolas" fo:font-size="10.5pt" fo:font-weight="normal" fo:background-color="#1f1f1f"/>
    </style:style>
    <style:style style:name="P88" style:family="paragraph" style:parent-style-name="Standard">
      <style:paragraph-properties style:line-height-at-least="0.503cm"/>
      <style:text-properties fo:color="#cccccc" loext:opacity="100%" style:font-name="Consolas" fo:font-size="10.5pt" fo:font-weight="normal" fo:background-color="#1f1f1f"/>
    </style:style>
    <style:style style:name="P89" style:family="paragraph" style:parent-style-name="Standard">
      <style:paragraph-properties fo:padding="0.049cm" fo:border="0.06pt solid #000000"/>
      <style:text-properties officeooo:rsid="0072e9a1" officeooo:paragraph-rsid="0072e9a1"/>
    </style:style>
    <style:style style:name="P90" style:family="paragraph" style:parent-style-name="Standard">
      <style:paragraph-properties fo:padding="0.049cm" fo:border="0.06pt solid #000000"/>
      <style:text-properties fo:color="#0070c0" loext:opacity="100%"/>
    </style:style>
    <style:style style:name="P91" style:family="paragraph" style:parent-style-name="Standard">
      <style:paragraph-properties fo:padding="0.049cm" fo:border="0.06pt solid #000000"/>
    </style:style>
    <style:style style:name="P92" style:family="paragraph" style:parent-style-name="Standard">
      <style:paragraph-properties fo:padding="0.049cm" fo:border="0.06pt solid #000000"/>
      <style:text-properties officeooo:paragraph-rsid="0073a497"/>
    </style:style>
    <style:style style:name="P93" style:family="paragraph" style:parent-style-name="Standard">
      <style:text-properties officeooo:paragraph-rsid="0073a497"/>
    </style:style>
    <style:style style:name="P94" style:family="paragraph" style:parent-style-name="Standard">
      <style:text-properties officeooo:rsid="0073a497" officeooo:paragraph-rsid="0073a497"/>
    </style:style>
    <style:style style:name="P95" style:family="paragraph" style:parent-style-name="Standard">
      <style:paragraph-properties fo:padding="0.049cm" fo:border="0.06pt solid #000000"/>
      <style:text-properties officeooo:rsid="0073a497" officeooo:paragraph-rsid="0073a497"/>
    </style:style>
    <style:style style:name="P96" style:family="paragraph" style:parent-style-name="Standard">
      <style:paragraph-properties fo:break-before="page"/>
      <style:text-properties officeooo:rsid="0073a497" officeooo:paragraph-rsid="0073a497"/>
    </style:style>
    <style:style style:name="P97" style:family="paragraph" style:parent-style-name="Standard">
      <style:text-properties officeooo:rsid="00751dea" officeooo:paragraph-rsid="00751dea"/>
    </style:style>
    <style:style style:name="P98" style:family="paragraph" style:parent-style-name="Standard">
      <style:text-properties officeooo:rsid="00782f1a" officeooo:paragraph-rsid="00782f1a"/>
    </style:style>
    <style:style style:name="P99" style:family="paragraph" style:parent-style-name="Titre_20_1">
      <style:paragraph-properties fo:break-before="page"/>
      <style:text-properties officeooo:rsid="00517e49" officeooo:paragraph-rsid="00517e49"/>
    </style:style>
    <style:style style:name="P100" style:family="paragraph" style:parent-style-name="Titre_20_2">
      <style:text-properties officeooo:rsid="005335e3" officeooo:paragraph-rsid="005335e3"/>
    </style:style>
    <style:style style:name="P101" style:family="paragraph" style:parent-style-name="Standard">
      <style:text-properties officeooo:paragraph-rsid="005335e3"/>
    </style:style>
    <style:style style:name="P102" style:family="paragraph" style:parent-style-name="Standard">
      <style:paragraph-properties fo:margin-left="0cm" fo:margin-right="0cm" fo:line-height="115%" fo:text-indent="0cm" style:auto-text-indent="false" style:writing-mode="lr-tb"/>
      <style:text-properties fo:language="en" fo:country="US"/>
    </style:style>
    <style:style style:name="P103" style:family="paragraph" style:parent-style-name="Titre_20_3">
      <style:text-properties officeooo:rsid="005335e3" officeooo:paragraph-rsid="005335e3"/>
    </style:style>
    <style:style style:name="P104" style:family="paragraph" style:parent-style-name="Titre_20_3">
      <style:text-properties officeooo:rsid="0054620b" officeooo:paragraph-rsid="0054620b"/>
    </style:style>
    <style:style style:name="P105" style:family="paragraph" style:parent-style-name="No_20_Spacing">
      <style:paragraph-properties fo:margin-left="0cm" fo:margin-right="0cm" fo:text-indent="0cm" style:auto-text-indent="false" style:writing-mode="lr-tb"/>
      <style:text-properties fo:color="#a66500" loext:opacity="100%" fo:language="fr" fo:country="FR"/>
    </style:style>
    <style:style style:name="P106" style:family="paragraph" style:parent-style-name="Standard">
      <style:text-properties officeooo:paragraph-rsid="0054620b"/>
    </style:style>
    <style:style style:name="P107" style:family="paragraph" style:parent-style-name="Titre_20_2">
      <style:text-properties officeooo:rsid="0054620b" officeooo:paragraph-rsid="0054620b"/>
    </style:style>
    <style:style style:name="P108" style:family="paragraph" style:parent-style-name="No_20_Spacing">
      <style:paragraph-properties fo:margin-left="0cm" fo:margin-right="0cm" fo:text-indent="0cm" style:auto-text-indent="false" fo:padding="0.049cm" fo:border="0.06pt solid #000000" style:writing-mode="lr-tb"/>
      <style:text-properties fo:language="fr" fo:country="FR"/>
    </style:style>
    <style:style style:name="P109" style:family="paragraph" style:parent-style-name="Titre_20_2">
      <style:text-properties officeooo:rsid="00557b0a" officeooo:paragraph-rsid="00557b0a"/>
    </style:style>
    <style:style style:name="P110" style:family="paragraph" style:parent-style-name="Standard">
      <style:text-properties officeooo:paragraph-rsid="00557b0a"/>
    </style:style>
    <style:style style:name="P111" style:family="paragraph" style:parent-style-name="Titre_20_1">
      <style:text-properties officeooo:rsid="00557b0a" officeooo:paragraph-rsid="00557b0a"/>
    </style:style>
    <style:style style:name="P112" style:family="paragraph" style:parent-style-name="Standard">
      <style:text-properties officeooo:rsid="00557b0a" officeooo:paragraph-rsid="006080f1"/>
    </style:style>
    <style:style style:name="P113" style:family="paragraph" style:parent-style-name="Titre_20_2">
      <style:text-properties officeooo:rsid="0056d7e6" officeooo:paragraph-rsid="0056d7e6"/>
    </style:style>
    <style:style style:name="P114" style:family="paragraph" style:parent-style-name="Standard">
      <style:text-properties officeooo:rsid="0056d7e6" officeooo:paragraph-rsid="0056d7e6"/>
    </style:style>
    <style:style style:name="P115" style:family="paragraph" style:parent-style-name="Titre_20_3">
      <style:text-properties officeooo:rsid="0056d7e6" officeooo:paragraph-rsid="0056d7e6"/>
    </style:style>
    <style:style style:name="P116" style:family="paragraph" style:parent-style-name="Standard">
      <style:paragraph-properties fo:padding="0.049cm" fo:border="none"/>
      <style:text-properties fo:color="#0070c0" loext:opacity="100%" officeooo:rsid="0056d7e6" officeooo:paragraph-rsid="0056d7e6"/>
    </style:style>
    <style:style style:name="P117" style:family="paragraph" style:parent-style-name="Standard">
      <style:paragraph-properties fo:padding="0.049cm" fo:border="0.06pt solid #000000"/>
      <style:text-properties officeooo:rsid="0056d7e6" officeooo:paragraph-rsid="0056d7e6"/>
    </style:style>
    <style:style style:name="P118" style:family="paragraph" style:parent-style-name="Titre_20_3">
      <style:text-properties officeooo:rsid="00584b73" officeooo:paragraph-rsid="00584b73"/>
    </style:style>
    <style:style style:name="P119" style:family="paragraph" style:parent-style-name="Standard">
      <style:text-properties officeooo:rsid="00584b73" officeooo:paragraph-rsid="00584b73"/>
    </style:style>
    <style:style style:name="P120" style:family="paragraph" style:parent-style-name="Standard" style:master-page-name="">
      <loext:graphic-properties draw:fill="solid" draw:fill-color="#1f1f1f"/>
      <style:paragraph-properties style:page-number="auto" fo:background-color="#1f1f1f" fo:padding="0.049cm" fo:border="0.74pt solid #000000"/>
      <style:text-properties fo:color="#cccccc" loext:opacity="100%" style:font-name="Consolas" fo:font-size="10.5pt" fo:font-weight="normal" officeooo:rsid="0056d7e6" officeooo:paragraph-rsid="0056d7e6" fo:background-color="#1f1f1f"/>
    </style:style>
    <style:style style:name="P121" style:family="paragraph" style:parent-style-name="Standard">
      <loext:graphic-properties draw:fill="solid" draw:fill-color="#1f1f1f"/>
      <style:paragraph-properties fo:margin-left="0cm" fo:margin-right="0cm" style:line-height-at-least="0.503cm" fo:text-indent="0cm" style:auto-text-indent="false" fo:background-color="#1f1f1f" fo:padding="0.049cm" fo:border="0.74pt solid #000000"/>
      <style:text-properties fo:color="#cccccc" loext:opacity="100%" fo:background-color="#1f1f1f"/>
    </style:style>
    <style:style style:name="P122" style:family="paragraph" style:parent-style-name="Standard">
      <loext:graphic-properties draw:fill="solid" draw:fill-color="#1f1f1f"/>
      <style:paragraph-properties fo:margin-left="0cm" fo:margin-right="0cm" style:line-height-at-least="0.503cm" fo:text-indent="0cm" style:auto-text-indent="false" fo:background-color="#1f1f1f" fo:padding="0.049cm" fo:border="0.74pt solid #000000"/>
      <style:text-properties fo:color="#cccccc" loext:opacity="100%" style:font-name="Consolas" fo:font-size="10.5pt" fo:font-weight="normal" fo:background-color="#1f1f1f"/>
    </style:style>
    <style:style style:name="P123" style:family="paragraph" style:parent-style-name="Standard">
      <style:paragraph-properties fo:margin-left="0cm" fo:margin-right="0cm" style:line-height-at-least="0.503cm" fo:text-indent="0cm" style:auto-text-indent="false"/>
      <style:text-properties style:font-name="Consolas" fo:font-size="10.5pt" fo:font-weight="normal" officeooo:rsid="00584b73" officeooo:paragraph-rsid="00584b73"/>
    </style:style>
    <style:style style:name="P124" style:family="paragraph" style:parent-style-name="Standard">
      <style:paragraph-properties fo:margin-left="0cm" fo:margin-right="0cm" style:line-height-at-least="0.503cm" fo:text-indent="0cm" style:auto-text-indent="false"/>
      <style:text-properties style:font-name="Liberation Serif" fo:font-size="12pt" fo:font-weight="normal" officeooo:rsid="00584b73" officeooo:paragraph-rsid="00584b73" style:font-size-asian="12pt" style:font-size-complex="12pt"/>
    </style:style>
    <style:style style:name="P125" style:family="paragraph" style:parent-style-name="Standard">
      <loext:graphic-properties draw:fill="solid" draw:fill-color="#1f1f1f"/>
      <style:paragraph-properties fo:background-color="#1f1f1f"/>
      <style:text-properties officeooo:rsid="00584b73" officeooo:paragraph-rsid="00584b73"/>
    </style:style>
    <style:style style:name="P126" style:family="paragraph" style:parent-style-name="Standard">
      <loext:graphic-properties draw:fill="solid" draw:fill-color="#1f1f1f"/>
      <style:paragraph-properties fo:background-color="#1f1f1f"/>
      <style:text-properties fo:color="#cccccc" loext:opacity="100%" officeooo:rsid="00584b73" officeooo:paragraph-rsid="00584b73" fo:background-color="#1f1f1f"/>
    </style:style>
    <style:style style:name="P127" style:family="paragraph" style:parent-style-name="Standard">
      <loext:graphic-properties draw:fill="solid" draw:fill-color="#1f1f1f"/>
      <style:paragraph-properties fo:background-color="#1f1f1f"/>
      <style:text-properties officeooo:rsid="005a0c8e" officeooo:paragraph-rsid="00584b73"/>
    </style:style>
    <style:style style:name="P128" style:family="paragraph" style:parent-style-name="Standard">
      <style:text-properties officeooo:rsid="005a0c8e" officeooo:paragraph-rsid="005a0c8e"/>
    </style:style>
    <style:style style:name="P129" style:family="paragraph" style:parent-style-name="Standard">
      <style:text-properties officeooo:rsid="005a0c8e" officeooo:paragraph-rsid="00584b73"/>
    </style:style>
    <style:style style:name="P130" style:family="paragraph" style:parent-style-name="Titre_20_2">
      <style:text-properties officeooo:rsid="005a0c8e" officeooo:paragraph-rsid="005a0c8e"/>
    </style:style>
    <style:style style:name="P131" style:family="paragraph" style:parent-style-name="Standard">
      <style:paragraph-properties fo:padding="0.049cm" fo:border="0.06pt solid #000000"/>
      <style:text-properties officeooo:rsid="005a0c8e" officeooo:paragraph-rsid="005a0c8e"/>
    </style:style>
    <style:style style:name="P132" style:family="paragraph" style:parent-style-name="Titre_20_2">
      <style:text-properties officeooo:rsid="005cde2a" officeooo:paragraph-rsid="005cde2a"/>
    </style:style>
    <style:style style:name="P133" style:family="paragraph" style:parent-style-name="Standard">
      <style:text-properties officeooo:rsid="005cde2a" officeooo:paragraph-rsid="005cde2a"/>
    </style:style>
    <style:style style:name="P134" style:family="paragraph" style:parent-style-name="Titre_20_2">
      <style:text-properties officeooo:rsid="005cefb7" officeooo:paragraph-rsid="005cefb7"/>
    </style:style>
    <style:style style:name="P135" style:family="paragraph" style:parent-style-name="Standard">
      <style:text-properties officeooo:rsid="005cefb7" officeooo:paragraph-rsid="005cefb7"/>
    </style:style>
    <style:style style:name="P136" style:family="paragraph" style:parent-style-name="Standard">
      <style:text-properties officeooo:rsid="007a2253" officeooo:paragraph-rsid="005cefb7"/>
    </style:style>
    <style:style style:name="P137" style:family="paragraph" style:parent-style-name="Titre_20_1">
      <style:text-properties officeooo:rsid="007a2253" officeooo:paragraph-rsid="007a2253"/>
    </style:style>
    <style:style style:name="P138" style:family="paragraph" style:parent-style-name="Standard">
      <style:text-properties officeooo:rsid="007a2253" officeooo:paragraph-rsid="007a2253"/>
    </style:style>
    <style:style style:name="P139" style:family="paragraph" style:parent-style-name="Titre_20_2">
      <style:text-properties officeooo:rsid="007a2253" officeooo:paragraph-rsid="007a2253"/>
    </style:style>
    <style:style style:name="P140" style:family="paragraph" style:parent-style-name="Standard">
      <style:text-properties officeooo:rsid="007a6e29" officeooo:paragraph-rsid="007a6e29"/>
    </style:style>
    <style:style style:name="P141" style:family="paragraph" style:parent-style-name="Standard">
      <style:text-properties officeooo:paragraph-rsid="007a2253"/>
    </style:style>
    <style:style style:name="P142" style:family="paragraph" style:parent-style-name="Standard">
      <style:paragraph-properties fo:break-before="page"/>
      <style:text-properties officeooo:paragraph-rsid="007a2253"/>
    </style:style>
    <style:style style:name="P143" style:family="paragraph" style:parent-style-name="Table_20_Contents">
      <style:paragraph-properties fo:text-align="center" style:justify-single-word="false"/>
    </style:style>
    <style:style style:name="P144" style:family="paragraph" style:parent-style-name="Table_20_Contents">
      <style:text-properties officeooo:paragraph-rsid="007a6e29"/>
    </style:style>
    <style:style style:name="P145" style:family="paragraph" style:parent-style-name="Table_20_Contents">
      <style:text-properties officeooo:rsid="007a6e29" officeooo:paragraph-rsid="007a6e29"/>
    </style:style>
    <style:style style:name="P146" style:family="paragraph" style:parent-style-name="Table_20_Contents">
      <style:text-properties officeooo:rsid="007c5bca" officeooo:paragraph-rsid="007c5bca"/>
    </style:style>
    <style:style style:name="P147" style:family="paragraph" style:parent-style-name="Standard">
      <style:text-properties officeooo:rsid="007f15ee" officeooo:paragraph-rsid="007f15ee"/>
    </style:style>
    <style:style style:name="P148" style:family="paragraph" style:parent-style-name="Standard">
      <style:text-properties officeooo:rsid="007c5bca" officeooo:paragraph-rsid="007c5bca"/>
    </style:style>
    <style:style style:name="P149" style:family="paragraph" style:parent-style-name="Table_20_Contents">
      <style:text-properties officeooo:paragraph-rsid="007c5bca"/>
    </style:style>
    <style:style style:name="T1" style:family="text">
      <style:text-properties fo:font-size="16pt" fo:font-weight="bold" style:font-size-asian="16pt" style:font-weight-asian="bold"/>
    </style:style>
    <style:style style:name="T2" style:family="text">
      <style:text-properties fo:font-size="16pt" fo:font-style="italic" fo:font-weight="bold" style:font-size-asian="16pt" style:font-style-asian="italic" style:font-weight-asian="bold"/>
    </style:style>
    <style:style style:name="T3" style:family="text">
      <style:text-properties fo:font-size="18pt" fo:font-weight="bold" style:font-size-asian="18pt" style:font-weight-asian="bold"/>
    </style:style>
    <style:style style:name="T4" style:family="text">
      <style:text-properties fo:font-weight="bold" style:font-weight-asian="bold"/>
    </style:style>
    <style:style style:name="T5" style:family="text">
      <style:text-properties style:text-line-through-style="solid" style:text-line-through-type="single" fo:font-weight="bold" style:text-underline-mode="continuous" style:text-overline-mode="continuous" style:text-line-through-mode="continuous" style:font-weight-asian="bold"/>
    </style:style>
    <style:style style:name="T6" style:family="text">
      <style:text-properties fo:font-size="14pt" fo:font-weight="bold" style:font-size-asian="14pt" style:font-weight-asian="bold"/>
    </style:style>
    <style:style style:name="T7" style:family="text">
      <style:text-properties style:font-name="Arial" fo:font-size="12pt" fo:font-weight="bold" style:font-name-asian="Arial" style:font-weight-complex="bold"/>
    </style:style>
    <style:style style:name="T8" style:family="text">
      <style:text-properties style:font-name="Arial" fo:font-size="12pt" style:font-name-asian="Arial"/>
    </style:style>
    <style:style style:name="T9" style:family="text">
      <style:text-properties style:font-name="Arial" style:font-name-asian="Arial"/>
    </style:style>
    <style:style style:name="T10" style:family="text">
      <style:text-properties style:font-name="Arial" fo:font-weight="bold" style:font-name-asian="Arial" style:font-weight-asian="bold" style:font-weight-complex="bold"/>
    </style:style>
    <style:style style:name="T11" style:family="text">
      <style:text-properties style:font-name="Arial"/>
    </style:style>
    <style:style style:name="T12" style:family="text">
      <style:text-properties fo:color="#2e75b6" loext:opacity="100%" style:font-name="Arial"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13" style:family="text">
      <style:text-properties fo:color="#ff0000" loext:opacity="100%"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14" style:family="text">
      <style:text-properties fo:color="#ff0000" loext:opacity="100%" style:font-name="Arial" fo:font-size="14pt" style:font-size-asian="14pt" style:font-size-complex="14pt"/>
    </style:style>
    <style:style style:name="T15" style:family="text">
      <style:text-properties style:font-name="Courier New" fo:font-size="11pt" fo:language="en" fo:country="US" style:font-name-asian="Courier New" style:font-size-asian="11pt" style:font-name-complex="Courier New" style:font-size-complex="11pt"/>
    </style:style>
    <style:style style:name="T16" style:family="text">
      <style:text-properties style:font-name="Courier New" fo:font-size="11pt" style:font-name-asian="Courier New" style:font-size-asian="11pt" style:font-name-complex="Courier New" style:font-size-complex="11pt"/>
    </style:style>
    <style:style style:name="T17" style:family="text">
      <style:text-properties style:font-name="Arial" style:text-underline-style="solid" style:text-underline-width="auto" style:text-underline-color="font-color" fo:font-weight="bold" style:text-underline-mode="continuous" style:text-overline-mode="continuous" style:text-line-through-mode="continuous" style:font-name-asian="Arial" style:font-weight-asian="bold" style:font-weight-complex="bold"/>
    </style:style>
    <style:style style:name="T18" style:family="text">
      <style:text-properties style:font-name="Arial" fo:font-weight="bold" style:font-weight-asian="bold" style:font-weight-complex="bold"/>
    </style:style>
    <style:style style:name="T19" style:family="text">
      <style:text-properties style:font-name="Arial" fo:font-weight="bold" style:font-name-asian="Arial" style:font-weight-asian="bold"/>
    </style:style>
    <style:style style:name="T20" style:family="text">
      <style:text-properties officeooo:rsid="005cefb7"/>
    </style:style>
    <style:style style:name="T21" style:family="text">
      <style:text-properties officeooo:rsid="005e6c83"/>
    </style:style>
    <style:style style:name="T22" style:family="text">
      <style:text-properties officeooo:rsid="0050cd32"/>
    </style:style>
    <style:style style:name="T23" style:family="text">
      <style:text-properties fo:color="#d7ba7d" loext:opacity="100%" style:font-name="Consolas" fo:font-size="10.5pt" fo:font-weight="normal" fo:background-color="#1f1f1f" loext:char-shading-value="0"/>
    </style:style>
    <style:style style:name="T24" style:family="text">
      <style:text-properties fo:color="#cccccc" loext:opacity="100%" style:font-name="Consolas" fo:font-size="10.5pt" fo:font-weight="normal" fo:background-color="#1f1f1f" loext:char-shading-value="0"/>
    </style:style>
    <style:style style:name="T25" style:family="text">
      <style:text-properties fo:color="#9cdcfe" loext:opacity="100%" style:font-name="Consolas" fo:font-size="10.5pt" fo:font-weight="normal"/>
    </style:style>
    <style:style style:name="T26" style:family="text">
      <style:text-properties style:font-name="Consolas" fo:font-size="10.5pt" fo:font-weight="normal"/>
    </style:style>
    <style:style style:name="T27" style:family="text">
      <style:text-properties fo:color="#dcdcaa" loext:opacity="100%" style:font-name="Consolas" fo:font-size="10.5pt" fo:font-weight="normal"/>
    </style:style>
    <style:style style:name="T28" style:family="text">
      <style:text-properties fo:color="#b5cea8" loext:opacity="100%" style:font-name="Consolas" fo:font-size="10.5pt" fo:font-weight="normal"/>
    </style:style>
    <style:style style:name="T29" style:family="text">
      <style:text-properties fo:color="#ce9178" loext:opacity="100%" style:font-name="Consolas" fo:font-size="10.5pt" fo:font-weight="normal"/>
    </style:style>
    <style:style style:name="T30" style:family="text">
      <style:text-properties officeooo:rsid="005f113c"/>
    </style:style>
    <style:style style:name="T31" style:family="text">
      <style:text-properties fo:color="#0070c0" loext:opacity="100%"/>
    </style:style>
    <style:style style:name="T32" style:family="text">
      <style:text-properties fo:language="fr" fo:country="FR"/>
    </style:style>
    <style:style style:name="T33" style:family="text">
      <style:text-properties fo:color="#943634" loext:opacity="100%" fo:language="fr" fo:country="FR"/>
    </style:style>
    <style:style style:name="T34" style:family="text">
      <style:text-properties fo:color="#4f6228" loext:opacity="100%" fo:language="fr" fo:country="FR"/>
    </style:style>
    <style:style style:name="T35" style:family="text">
      <style:text-properties fo:color="#984806" loext:opacity="100%" fo:language="fr" fo:country="FR"/>
    </style:style>
    <style:style style:name="T36" style:family="text">
      <style:text-properties fo:color="#0d0d0d" loext:opacity="100%" fo:language="fr" fo:country="FR"/>
    </style:style>
    <style:style style:name="T37" style:family="text">
      <style:text-properties fo:color="#0070c0" loext:opacity="100%" fo:language="fr" fo:country="FR"/>
    </style:style>
    <style:style style:name="T38" style:family="text">
      <style:text-properties officeooo:rsid="00725dd3"/>
    </style:style>
    <style:style style:name="T39" style:family="text">
      <style:text-properties fo:color="#9cdcfe" loext:opacity="100%"/>
    </style:style>
    <style:style style:name="T40" style:family="text">
      <style:text-properties fo:color="#dcdcaa" loext:opacity="100%"/>
    </style:style>
    <style:style style:name="T41" style:family="text">
      <style:text-properties fo:color="#ce9178" loext:opacity="100%"/>
    </style:style>
    <style:style style:name="T42" style:family="text">
      <style:text-properties fo:color="#569cd6" loext:opacity="100%"/>
    </style:style>
    <style:style style:name="T43" style:family="text">
      <style:text-properties fo:color="#569cd6" loext:opacity="100%" style:font-name="Consolas" fo:font-size="10.5pt" fo:font-weight="normal"/>
    </style:style>
    <style:style style:name="T44" style:family="text">
      <style:text-properties fo:color="#4fc1ff" loext:opacity="100%" style:font-name="Consolas" fo:font-size="10.5pt" fo:font-weight="normal"/>
    </style:style>
    <style:style style:name="T45" style:family="text">
      <style:text-properties fo:color="#d4d4d4" loext:opacity="100%" style:font-name="Consolas" fo:font-size="10.5pt" fo:font-weight="normal"/>
    </style:style>
    <style:style style:name="T46" style:family="text">
      <style:text-properties fo:color="#c586c0" loext:opacity="100%" style:font-name="Consolas" fo:font-size="10.5pt" fo:font-weight="normal"/>
    </style:style>
    <style:style style:name="T47" style:family="text">
      <style:text-properties officeooo:rsid="0073a497"/>
    </style:style>
    <style:style style:name="T48" style:family="text">
      <style:text-properties officeooo:rsid="00751dea"/>
    </style:style>
    <style:style style:name="T49" style:family="text">
      <style:text-properties fo:color="#787800" loext:opacity="100%"/>
    </style:style>
    <style:style style:name="T50" style:family="text">
      <style:text-properties fo:color="#590000" loext:opacity="100%"/>
    </style:style>
    <style:style style:name="T51" style:family="text">
      <style:text-properties fo:language="en" fo:country="US"/>
    </style:style>
    <style:style style:name="T52" style:family="text">
      <style:text-properties fo:color="#787800" loext:opacity="100%" fo:language="fr" fo:country="FR"/>
    </style:style>
    <style:style style:name="T53" style:family="text">
      <style:text-properties fo:color="#590000" loext:opacity="100%" fo:language="fr" fo:country="FR"/>
    </style:style>
    <style:style style:name="T54" style:family="text">
      <style:text-properties fo:color="#a66500" loext:opacity="100%" fo:language="fr" fo:country="FR"/>
    </style:style>
    <style:style style:name="T55" style:family="text">
      <style:text-properties officeooo:rsid="0054620b"/>
    </style:style>
    <style:style style:name="T56" style:family="text">
      <style:text-properties fo:color="#388600" loext:opacity="100%" fo:language="fr" fo:country="FR"/>
    </style:style>
    <style:style style:name="T57" style:family="text">
      <style:text-properties fo:color="#943634" loext:opacity="100%"/>
    </style:style>
    <style:style style:name="T58" style:family="text">
      <style:text-properties style:font-name="Cambria" fo:language="fr" fo:country="FR" style:text-underline-style="none" style:font-name-asian="MS Mincho" style:language-asian="en" style:country-asian="US" style:font-name-complex="Arial" style:language-complex="ar" style:country-complex="SA"/>
    </style:style>
    <style:style style:name="T59" style:family="text">
      <style:text-properties officeooo:rsid="005a0c8e"/>
    </style:style>
    <style:style style:name="T60" style:family="text">
      <style:text-properties fo:color="#d16969" loext:opacity="100%" style:font-name="Consolas" fo:font-size="10.5pt" fo:font-weight="normal"/>
    </style:style>
    <style:style style:name="T61" style:family="text">
      <style:text-properties fo:color="#d7ba7d" loext:opacity="100%" style:font-name="Consolas" fo:font-size="10.5pt" fo:font-weight="normal"/>
    </style:style>
    <style:style style:name="T62" style:family="text">
      <style:text-properties officeooo:rsid="007a6e29"/>
    </style:style>
    <style:style style:name="T63" style:family="text">
      <style:text-properties fo:font-variant="normal" fo:text-transform="none" fo:color="#8e97a1" loext:opacity="100%" fo:font-family="opensansregular" fo:font-size="10pt" fo:letter-spacing="normal" fo:font-style="normal" fo:font-weight="normal" style:font-size-asian="10pt" style:font-weight-asian="normal" style:font-size-complex="10pt" style:font-weight-complex="normal"/>
    </style:style>
    <style:style style:name="T64" style:family="text">
      <style:text-properties fo:font-variant="normal" fo:text-transform="none" fo:color="#8e97a1" loext:opacity="100%" fo:font-family="Montserrat, sans-serif" fo:font-size="10pt" fo:letter-spacing="normal" fo:font-style="normal" fo:font-weight="bold" style:font-size-asian="10pt" style:font-size-complex="10pt"/>
    </style:style>
    <style:style style:name="T65" style:family="text">
      <style:text-properties fo:font-variant="normal" fo:text-transform="none" fo:color="#8e97a1" loext:opacity="100%" fo:font-family="'Noto Sans', Arial, sans-serif" fo:font-size="10pt" fo:letter-spacing="normal" fo:font-style="normal" fo:font-weight="bold" style:font-size-asian="10pt" style:font-size-complex="10pt"/>
    </style:style>
    <style:style style:name="T66" style:family="text">
      <style:text-properties officeooo:rsid="007c5bca"/>
    </style:style>
    <style:style style:name="T67" style:family="text">
      <style:text-properties officeooo:rsid="00833a64"/>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ff8000" draw:textarea-horizontal-align="justify" draw:textarea-vertical-align="middle" draw:auto-grow-height="false" fo:min-height="3.044cm" fo:min-width="16.83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color="#00a933" draw:textarea-horizontal-align="justify" draw:textarea-vertical-align="middle" draw:auto-grow-height="false" fo:min-height="3.159cm" fo:min-width="16.82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color="#2a6099" draw:textarea-horizontal-align="justify" draw:textarea-vertical-align="middle" draw:auto-grow-height="false" fo:min-height="3.75cm" fo:min-width="16.759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13" text:anchor-type="page" text:anchor-page-number="24" svg:x="0cm" svg:y="0cm" svg:width="15.242cm" svg:height="15.58cm" draw:z-index="18">
        <draw:image xlink:href="Pictures/10000001000003840000039809F19A7B.png" xlink:type="simple" xlink:show="embed" xlink:actuate="onLoad" draw:mime-type="image/png"/>
      </draw:frame>
      <text:p text:style-name="P1"><text:span text:style-name="Police_20_par_20_défaut"><text:span text:style-name="T1">BTS CIEL option A<text:line-break/></text:span></text:span><text:span text:style-name="Police_20_par_20_défaut"><text:span text:style-name="T2">Cybersécurité, l’informatique et réseaux et l’électronique</text:span></text:span></text:p>
      <text:p text:style-name="P2"/>
      <text:p text:style-name="P3"><text:span text:style-name="Police_20_par_20_défaut"><text:span text:style-name="T1">E6 – PROJET INFORMATIQUE</text:span></text:span></text:p>
      <text:p text:style-name="P4"/>
      <text:p text:style-name="P3"><text:span text:style-name="Police_20_par_20_défaut"><text:span text:style-name="T3">Dossier de réalisation du projet.</text:span></text:span></text:p>
      <text:p text:style-name="P5"/>
      <text:p text:style-name="P5"/>
      <text:p text:style-name="P5"/>
      <table:table table:name="Tableau3" table:style-name="Tableau3">
        <table:table-column table:style-name="Tableau3.A"/>
        <table:table-column table:style-name="Tableau3.B"/>
        <table:table-row>
          <table:table-cell table:style-name="Tableau3.A1" office:value-type="string">
            <text:p text:style-name="P6"><text:span text:style-name="Police_20_par_20_défaut"><text:span text:style-name="T4">Académies : Besançon-Dijon</text:span></text:span></text:p>
          </table:table-cell>
          <table:table-cell table:style-name="Tableau3.A1" office:value-type="string">
            <text:p text:style-name="P7"><text:span text:style-name="Police_20_par_20_défaut"><text:span text:style-name="T4">Session : 2026</text:span></text:span></text:p>
          </table:table-cell>
        </table:table-row>
        <table:table-row>
          <table:table-cell table:style-name="Tableau3.A1" table:number-columns-spanned="2" office:value-type="string">
            <text:p text:style-name="P6"><text:span text:style-name="Police_20_par_20_défaut"><text:span text:style-name="T4">Lycée ou Centre de formation : Gustave Eiffel</text:span></text:span></text:p>
          </table:table-cell>
          <table:covered-table-cell/>
        </table:table-row>
        <table:table-row>
          <table:table-cell table:style-name="Tableau3.A1" table:number-columns-spanned="2" office:value-type="string">
            <text:p text:style-name="P6"><text:span text:style-name="Police_20_par_20_défaut"><text:span text:style-name="T4">Ville : Dijon</text:span></text:span></text:p>
          </table:table-cell>
          <table:covered-table-cell/>
        </table:table-row>
        <table:table-row>
          <table:table-cell table:style-name="Tableau3.A1" table:number-columns-spanned="2" office:value-type="string">
            <text:p text:style-name="P6"><text:span text:style-name="Police_20_par_20_défaut"><text:span text:style-name="T4">Nom du projet : Sechoir a houblon</text:span></text:span></text:p>
          </table:table-cell>
          <table:covered-table-cell/>
        </table:table-row>
        <table:table-row>
          <table:table-cell table:style-name="Tableau3.A1" table:number-columns-spanned="2" office:value-type="string">
            <text:p text:style-name="P6"><text:span text:style-name="Police_20_par_20_défaut"><text:span text:style-name="T4">Projet industriel : <text:s text:c="10"/>OUI <text:s text:c="31"/></text:span></text:span><text:span text:style-name="Police_20_par_20_défaut"><text:span text:style-name="T5">NON</text:span></text:span></text:p>
          </table:table-cell>
          <table:covered-table-cell/>
        </table:table-row>
      </table:table>
      <text:p text:style-name="P8"/>
      <text:p text:style-name="P8"/>
      <table:table table:name="Tableau4" table:style-name="Tableau4">
        <table:table-column table:style-name="Tableau4.A"/>
        <table:table-column table:style-name="Tableau4.B"/>
        <table:table-row>
          <table:table-cell table:style-name="Tableau4.A1" table:number-columns-spanned="2" office:value-type="string">
            <text:p text:style-name="P7"><text:span text:style-name="Police_20_par_20_défaut"><text:span text:style-name="T6">Equipe de développement.</text:span></text:span></text:p>
          </table:table-cell>
          <table:covered-table-cell/>
        </table:table-row>
        <table:table-row>
          <table:table-cell table:style-name="Tableau4.A1" office:value-type="string">
            <text:p text:style-name="P6"><text:span text:style-name="Police_20_par_20_défaut"><text:span text:style-name="T4">Professeur :</text:span></text:span></text:p>
          </table:table-cell>
          <table:table-cell table:style-name="Tableau4.A1" office:value-type="string">
            <text:p text:style-name="P9">Raoul Artola</text:p>
          </table:table-cell>
        </table:table-row>
        <table:table-row>
          <table:table-cell table:style-name="Tableau4.A1" office:value-type="string">
            <text:p text:style-name="P6"><text:span text:style-name="Police_20_par_20_défaut"><text:span text:style-name="T4">L'entreprise :</text:span></text:span></text:p>
          </table:table-cell>
          <table:table-cell table:style-name="Tableau4.A1" office:value-type="string">
            <text:p text:style-name="P9">Adrien Darphin</text:p>
          </table:table-cell>
        </table:table-row>
        <table:table-row>
          <table:table-cell table:style-name="Tableau4.A1" office:value-type="string">
            <text:p text:style-name="P6"><text:span text:style-name="Police_20_par_20_défaut"><text:span text:style-name="T4">Interlocuteur(s) de l'entreprise.</text:span></text:span></text:p>
          </table:table-cell>
          <table:table-cell table:style-name="Tableau4.A1" office:value-type="string">
            <text:p text:style-name="P9">Adrien Darphin (agriculteur)</text:p>
          </table:table-cell>
        </table:table-row>
        <table:table-row>
          <table:table-cell table:style-name="Tableau4.A1" office:value-type="string">
            <text:p text:style-name="P6"><text:span text:style-name="Police_20_par_20_défaut"><text:span text:style-name="T4">Etudiant 1 :</text:span></text:span></text:p>
          </table:table-cell>
          <table:table-cell table:style-name="Tableau4.A1" office:value-type="string">
            <text:p text:style-name="P9">Lénny Sauvage</text:p>
          </table:table-cell>
        </table:table-row>
        <table:table-row>
          <table:table-cell table:style-name="Tableau4.A1" office:value-type="string">
            <text:p text:style-name="P6"><text:span text:style-name="Police_20_par_20_défaut"><text:span text:style-name="T4">Etudiant 2 :</text:span></text:span></text:p>
          </table:table-cell>
          <table:table-cell table:style-name="Tableau4.A1" office:value-type="string">
            <text:p text:style-name="P9">Adam Cardoso</text:p>
          </table:table-cell>
        </table:table-row>
        <table:table-row>
          <table:table-cell table:style-name="Tableau4.A1" office:value-type="string">
            <text:p text:style-name="P6"><text:span text:style-name="Police_20_par_20_défaut"><text:span text:style-name="T4">Etudiant 3 :</text:span></text:span></text:p>
          </table:table-cell>
          <table:table-cell table:style-name="Tableau4.A1" office:value-type="string">
            <text:p text:style-name="P9">Ayoub Rabhi</text:p>
          </table:table-cell>
        </table:table-row>
      </table:table>
      <text:p text:style-name="Standard"/>
      <text:p text:style-name="P10"/>
      <text:p text:style-name="P10"/>
      <text:p text:style-name="P10"/>
      <text:p text:style-name="P10"/>
      <text:p text:style-name="P10"/>
      <text:p text:style-name="P10"/>
      <text:p text:style-name="P8"/>
      <text:p text:style-name="P8"/>
      <text:p text:style-name="P10"/>
      <text:p text:style-name="P10"/>
      <text:p text:style-name="P10"/>
      <text:p text:style-name="texte1"/>
      <text:p text:style-name="texte1"/>
      <text:p text:style-name="texte1"/>
      <text:p text:style-name="texte1"/>
      <text:p text:style-name="texte1"/>
      <text:p text:style-name="texte1"/>
      <text:h text:style-name="P11" text:outline-level="1"><text:soft-page-break/>1. Présentation du projet</text:h>
      <text:h text:style-name="Titre_20_2" text:outline-level="2">1.1 Problématique du projet</text:h>
      <text:p text:style-name="P12">Le séchage du houblon est une étape critique qui doit être réalisée dans les 4 à 6 heures suivant la récolte, à une température maintenue entre 50 et 55°C, sans dépasser 60°C. Actuellement, ce processus est assuré manuellement, obligeant le propriétaire à rester en permanence sur place pour surveiller l'état du houblon. Cette contrainte est à la fois chronophage, fatiguante et source d'erreurs humaines. Il devient donc nécessaire d'automatiser le contrôle du séchage afin de libérer l'exploitant tout en garantissant la qualité du produit et en optimisant la consommation énergétique.</text:p>
      <text:h text:style-name="Titre_20_2" text:outline-level="2">1.2 Expression du besoin</text:h>
      <text:p text:style-name="P12">Le système doit permettre à l'exploitant de piloter et surveiller à distance, depuis son smartphone, l'intégralité du cycle de séchage du houblon. Il doit automatiser la régulation de la température via le contrôle du brûleur à gaz et du ventilateur, mesurer en continu la température du séchoir, déclencher des alertes sonores et visuelles en cas de dépassement de seuil ou de fin de cycle, et enregistrer l'historique complet des données dans une base de données. L'interface web doit également permettre la saisie des paramètres de séchage, le suivi des variétés de houblon produites et l'export des données en fichier CSV sur clé USB.</text:p>
      <text:p text:style-name="P12"/>
      <text:h text:style-name="P13" text:outline-level="2">1.3 Rôles par étudiant</text:h>
      <text:p text:style-name="P14"/>
      <text:p text:style-name="P15"><draw:custom-shape text:anchor-type="paragraph" draw:z-index="14" draw:name="Forme 1" draw:style-name="gr1" draw:text-style-name="P17" svg:width="17.165cm" svg:height="3.373cm" svg:x="0.847cm" svg:y="0.393cm"><text:p text:style-name="P16"><text:span text:style-name="T7">Étudiant 1 — Interface utilisateur, RTC et base de données : </text:span><text:span text:style-name="T8">il est responsable de la mise en œuvre de l'horloge temps réel (RTC), de l'installation du service web (Apache) et de la configuration de la base de données (MariaDB), de la conception de l'interface de saisie des paramètres utilisateur (variété, températures min/max, durée de séchage) ainsi que de la visualisation des données historiques sous forme de tableaux et graphiques. Il développe également la fonctionnalité d'export CS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draw:custom-shape text:anchor-type="paragraph" draw:z-index="15" draw:name="Forme 3" draw:style-name="gr2" draw:text-style-name="P18" svg:width="17.165cm" svg:height="3.499cm" svg:x="0.714cm" svg:y="0.228cm"><text:p text:style-name="P16"><text:span text:style-name="T7">Étudiant 2 — Acquisition des données et régulation thermique : </text:span><text:span text:style-name="T8">il prend en charge le choix et la mise en œuvre des 6 capteurs de température, l'interfaçage électronique avec la Raspberry Pi, et le développement du programme de régulation tout ou rien du brûleur à gaz. Il gère également le déclenchement de l'alerte sonore (sirène) en cas de dépassement des 60°C, ainsi que l'enregistrement horodaté des mesures, commandes et alertes dans la base de donn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draw:custom-shape text:anchor-type="paragraph" draw:z-index="16" draw:name="Forme 4" draw:style-name="gr3" draw:text-style-name="P19" svg:width="17.165cm" svg:height="4.156cm" svg:x="0.714cm" svg:y="0.22cm"><text:p text:style-name="P16"><text:span text:style-name="T7">Étudiant 3 — Contrôle du séchage, alerte visuelle et connectivité WiFi : </text:span><text:span text:style-name="T8">il est responsable de la configuration du point d'accès WiFi, du développement de la page web de contrôle du séchage (visualisation des températures, état du chauffage et de la ventilation, temps restant, alertes), de la mise en œuvre du voyant d'alerte visuelle de fin de cycle, et des fonctionnalités d'ajout de la masse de houblon produit. Il gère aussi l'enregistrement en base de données des événements de démarrage et d'arrêt des cyc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15"><text:span text:style-name="Police_20_par_20_défaut"><text:span text:style-name="T9"/></text:span></text:p>
      <text:p text:style-name="P6"><text:span text:style-name="Police_20_par_20_défaut"><text:span text:style-name="T9"/></text:span></text:p>
      <text:h text:style-name="Titre_20_2" text:outline-level="2" text:is-list-header="true"><text:soft-page-break/>1.4 Structure matérielle et logicielle du système</text:h>
      <text:p text:style-name="P15"><text:span text:style-name="Police_20_par_20_défaut"><text:span text:style-name="T10">Matériel : </text:span></text:span><text:span text:style-name="Police_20_par_20_défaut"><text:span text:style-name="T9">le système repose sur une Raspberry Pi 5 comme contrôleur central, 6 capteurs de température étanches connectés en série, une RTC interne, des interfaces de puissance TOR commandant le brûleur à gaz, le ventilateur triphasé, la sirène et le voyant lumineux. L'armoire électrique est pré-câblée avec boutons Marche/Arrêt. Le smartphone sert de terminal de supervision via WiFi.</text:span></text:span></text:p>
      <text:p text:style-name="P6"/>
      <text:p text:style-name="P15"><text:span text:style-name="Police_20_par_20_défaut"><text:span text:style-name="T10">Logiciel : </text:span></text:span><text:span text:style-name="Police_20_par_20_défaut"><text:span text:style-name="T9">Raspberry Pi OS 64 bits, serveur web Apache 2, PHP 8.4, base de données MariaDB, développement en HTML5, CSS3, JavaScript, PHP et C. L'interface utilisateur est un site web responsive accessible depuis un navigateur mobile, sans installation côté client.</text:span></text:span></text:p>
      <text:h text:style-name="P20" text:outline-level="1">2. Analyse et spécifications</text:h>
      <text:h text:style-name="Titre_20_2" text:outline-level="2">2.1 Diagramme de déploiement</text:h>
      <text:p text:style-name="P12">Le système s'articule autour de la Raspberry Pi 5, qui constitue le nœud central de l'architecture. Côté matériel, elle reçoit les données des 6 capteurs de température via une liaison série, synchronise l'heure grâce à sa RTC interne, et pilote les trois interfaces de puissance TOR commandant respectivement le brûleur de séchage, la sirène sonore et le voyant lumineux. Côté logiciel, cette même Raspberry Pi héberge l'ensemble de la pile applicative : le service web Apache, le moteur PHP 8.4 et le serveur de base de données MariaDB. Le smartphone de l'utilisateur se connecte en WiFi et accède au site web pour superviser et contrôler le séchage en temps réel.</text:p>
      <text:p text:style-name="P15"><draw:frame draw:style-name="fr1" draw:name="Image5" text:anchor-type="paragraph" svg:x="-0.868cm" svg:y="0.603cm" svg:width="20.459cm" style:rel-width="scale" svg:height="9.943cm" style:rel-height="scale" draw:z-index="12"><draw:image xlink:href="Pictures/10000000000006760000032414C0F39F.png" xlink:type="simple" xlink:show="embed" xlink:actuate="onLoad" draw:mime-type="image/png"/></draw:frame></text:p>
      <text:h text:style-name="P21" text:outline-level="2"/>
      <text:h text:style-name="P21" text:outline-level="2">2.2 Diagramme de cas d'utilisation générale</text:h>
      <text:p text:style-name="P12"><text:soft-page-break/>Le système de séchage automatisé a été conçu pour répondre à un besoin concret : permettre au propriétaire de piloter et surveiller son séchoir à houblon à distance, sans nécessiter sa présence permanente sur les lieux. Le propriétaire peut ainsi configurer les paramètres de séchage, superviser en temps réel l'état du système, être alerté en cas d'anomalie ou de fin de cycle, et consulter l'historique des sessions passées.</text:p>
      <text:p text:style-name="P12"/>
      <text:p text:style-name="P15"><draw:frame draw:style-name="fr1" draw:name="Image2" text:anchor-type="paragraph" svg:x="-0.607cm" svg:y="0.31cm" svg:width="20.043cm" style:rel-width="scale" svg:height="14.317cm" style:rel-height="scale" draw:z-index="13"><draw:image xlink:href="Pictures/10000000000003ED000002CE163AEF35.png" xlink:type="simple" xlink:show="embed" xlink:actuate="onLoad" draw:mime-type="image/png"/></draw:frame><text:span text:style-name="Police_20_par_20_défaut"><text:span text:style-name="T9"/></text:span></text:p>
      <text:p text:style-name="P22">2.3 Expression fonctionnelle du besoin</text:p>
      <text:p text:style-name="P23">L’utilisateur principal du système est l’exploitant. Il interagit avec le système depuis son téléphone via un navigateur web connecté au point d’accès WiFi local du Raspberry Pi. Le système doit être simple d’utilisation, robuste et adapté à un environnement agricole.</text:p>
      <table:table table:name="Tableau5" table:style-name="Tableau5">
        <table:table-column table:style-name="Tableau5.A" table:number-columns-repeated="3"/>
        <table:table-row>
          <table:table-cell table:style-name="Tableau5.A1" office:value-type="string">
            <text:p text:style-name="P24">Fonction</text:p>
          </table:table-cell>
          <table:table-cell table:style-name="Tableau5.A1" office:value-type="string">
            <text:p text:style-name="P24">Description attendue</text:p>
          </table:table-cell>
          <table:table-cell table:style-name="Tableau5.A1" office:value-type="string">
            <text:p text:style-name="P24">Utilisateur concerné</text:p>
          </table:table-cell>
        </table:table-row>
        <table:table-row>
          <table:table-cell table:style-name="Tableau5.A2" office:value-type="string">
            <text:p text:style-name="P25">Paramétrer un cycle</text:p>
          </table:table-cell>
          <table:table-cell table:style-name="Tableau5.B2" office:value-type="string">
            <text:p text:style-name="P26">Saisie variété, températures min/max et durée de séchage.</text:p>
          </table:table-cell>
          <table:table-cell table:style-name="Tableau5.C2" office:value-type="string">
            <text:p text:style-name="P25">Exploitant</text:p>
          </table:table-cell>
        </table:table-row>
        <table:table-row>
          <table:table-cell table:style-name="Tableau5.A3" office:value-type="string">
            <text:p text:style-name="P25">Contrôler le séchage</text:p>
          </table:table-cell>
          <table:table-cell table:style-name="Tableau5.B3" office:value-type="string">
            <text:p text:style-name="P26">Visualisation des 6 températures, moyenne, état chauffage/ventilation, temps restant.</text:p>
          </table:table-cell>
          <table:table-cell table:style-name="Tableau5.C3" office:value-type="string">
            <text:p text:style-name="P25">Exploitant</text:p>
          </table:table-cell>
        </table:table-row>
        <table:table-row>
          <table:table-cell table:style-name="Tableau5.A4" office:value-type="string">
            <text:p text:style-name="P25">Mesurer</text:p>
          </table:table-cell>
          <table:table-cell table:style-name="Tableau5.B4" office:value-type="string">
            <text:p text:style-name="P26">Mesures toutes les minutes sur 6 capteurs.</text:p>
          </table:table-cell>
          <table:table-cell table:style-name="Tableau5.C4" office:value-type="string">
            <text:p text:style-name="P25">Système</text:p>
          </table:table-cell>
        </table:table-row>
        <table:table-row>
          <table:table-cell table:style-name="Tableau5.A5" office:value-type="string">
            <text:p text:style-name="P25">Chauffer</text:p>
          </table:table-cell>
          <table:table-cell table:style-name="Tableau5.B5" office:value-type="string">
            <text:p text:style-name="P26">Commande tout ou rien du brûleur selon les seuils.</text:p>
          </table:table-cell>
          <table:table-cell table:style-name="Tableau5.C5" office:value-type="string">
            <text:p text:style-name="P25">Système</text:p>
          </table:table-cell>
        </table:table-row>
        <text:soft-page-break/>
        <table:table-row>
          <table:table-cell table:style-name="Tableau5.A6" office:value-type="string">
            <text:p text:style-name="P25">Alerter</text:p>
          </table:table-cell>
          <table:table-cell table:style-name="Tableau5.B6" office:value-type="string">
            <text:p text:style-name="P26">Sirène en cas de dépassement et voyant en fin de cycle.</text:p>
          </table:table-cell>
          <table:table-cell table:style-name="Tableau5.C6" office:value-type="string">
            <text:p text:style-name="P25">Système</text:p>
          </table:table-cell>
        </table:table-row>
        <table:table-row>
          <table:table-cell table:style-name="Tableau5.A7" office:value-type="string">
            <text:p text:style-name="P25">Enregistrer</text:p>
          </table:table-cell>
          <table:table-cell table:style-name="Tableau5.B7" office:value-type="string">
            <text:p text:style-name="P26">Historique horodaté des mesures, actions et alertes.</text:p>
          </table:table-cell>
          <table:table-cell table:style-name="Tableau5.C7" office:value-type="string">
            <text:p text:style-name="P25">Système</text:p>
          </table:table-cell>
        </table:table-row>
        <table:table-row>
          <table:table-cell table:style-name="Tableau5.A8" office:value-type="string">
            <text:p text:style-name="P25">Exporter</text:p>
          </table:table-cell>
          <table:table-cell table:style-name="Tableau5.B8" office:value-type="string">
            <text:p text:style-name="P26">Création d’un fichier CSV sur clé USB.</text:p>
          </table:table-cell>
          <table:table-cell table:style-name="Tableau5.C8" office:value-type="string">
            <text:p text:style-name="P25">Exploitant</text:p>
          </table:table-cell>
        </table:table-row>
      </table:table>
      <text:p text:style-name="P27">L’expression du besoin a été traduite en fonctions testables afin de faciliter la recette finale du projet.</text:p>
      <text:h text:style-name="P28" text:outline-level="2" text:is-list-header="true">2.4 Diagramme d'exigences — RTC et base de données</text:h>
      <text:p text:style-name="P15"><draw:frame draw:style-name="fr1" draw:name="Image3" text:anchor-type="paragraph" svg:x="6.881cm" svg:y="3.353cm" svg:width="12.079cm" style:rel-width="scale" svg:height="8.756cm" style:rel-height="scale" draw:z-index="0"><draw:image xlink:href="Pictures/10000000000003440000025EA3949FCE.png" xlink:type="simple" xlink:show="embed" xlink:actuate="onLoad" draw:mime-type="image/png"/></draw:frame><text:span text:style-name="Police_20_par_20_défaut"><text:span text:style-name="T9">Deux composants sont au cœur de la fiabilité du système : l'horloge temps réel (RTC) et la base de données. La RTC est indispensable pour garantir un horodatage précis de toutes les actions et mesures enregistrées tout au long du cycle de séchage. Elle maintient l'heure même en cas de coupure de courant. Le fuseau horaire est configuré en Europe/Paris. La base de données MariaDB est hébergée directement sur la Raspberry Pi et centralise les mesures de température, les événements de chauffage, les pauses et évenements, et les informations liées aux variétés de houblon produites</text:span></text:span></text:p>
      <text:h text:style-name="P29" text:outline-level="2"/>
      <text:h text:style-name="P30" text:outline-level="2"/>
      <text:h text:style-name="P30" text:outline-level="2"/>
      <text:h text:style-name="P30" text:outline-level="2"/>
      <text:h text:style-name="P30" text:outline-level="2"/>
      <text:h text:style-name="P30" text:outline-level="2"/>
      <text:h text:style-name="P30" text:outline-level="2"/>
      <text:h text:style-name="P30" text:outline-level="2"><draw:frame draw:style-name="fr1" draw:name="Image6 Copie 1" text:anchor-type="paragraph" svg:x="-0.515cm" svg:y="0.88cm" svg:width="12.573cm" style:rel-width="scale" svg:height="8.532cm" style:rel-height="scale" draw:z-index="1"><draw:image xlink:href="Pictures/100000000000038D00000269F37B78F4.png" xlink:type="simple" xlink:show="embed" xlink:actuate="onLoad" draw:mime-type="image/png"/></draw:frame></text:h>
      <text:h text:style-name="P30" text:outline-level="2"/>
      <text:h text:style-name="P30" text:outline-level="2"/>
      <text:h text:style-name="P30" text:outline-level="2"/>
      <text:h text:style-name="P30" text:outline-level="2"/>
      <text:h text:style-name="P30" text:outline-level="2"/>
      <text:h text:style-name="P30" text:outline-level="2"/>
      <text:h text:style-name="P30" text:outline-level="2"/>
      <text:h text:style-name="P30" text:outline-level="2">2.5 Diagramme d'exigences — Service web</text:h>
      <text:p text:style-name="P12"><text:soft-page-break/>L'interface utilisateur repose entièrement sur un service web hébergé sur la Raspberry Pi, accessible depuis le smartphone du propriétaire via le point d'accès WiFi dédié. Ce service est composé d'un serveur Apache 2 et d'un serveur PHP 8.4. Le service web communique avec la Raspberry Pi pour récupérer l'état du système en temps réel, et avec la base de données pour lire et écrire les informations liées aux cycles de séchage.</text:p>
      <text:p text:style-name="P15"><text:span text:style-name="Police_20_par_20_défaut"><text:span text:style-name="T9"/></text:span></text:p>
      <text:h text:style-name="Titre_20_2" text:outline-level="2"><draw:frame draw:style-name="fr1" draw:name="Image4" text:anchor-type="paragraph" svg:x="-0.37cm" svg:y="0.196cm" svg:width="18.669cm" style:rel-width="scale" svg:height="10.578cm" style:rel-height="scale" draw:z-index="2"><draw:image xlink:href="Pictures/100000000000041A0000025314C81E1D.png" xlink:type="simple" xlink:show="embed" xlink:actuate="onLoad" draw:mime-type="image/png"/></draw:frame></text:h>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draw:line text:anchor-type="paragraph" draw:z-index="17" draw:name="Ligne 1" draw:style-name="gr4" draw:text-style-name="P31" svg:x1="5.242cm" svg:y1="0.85cm" svg:x2="9.463cm" svg:y2="2.057cm"><text:p/></draw:line></text:h>
      <text:h text:style-name="Titre_20_2" text:outline-level="2"/>
      <text:h text:style-name="Titre_20_2" text:outline-level="2"><draw:frame draw:style-name="fr1" draw:name="Image7 Copie 1" text:anchor-type="paragraph" svg:x="1.035cm" svg:y="-0.148cm" svg:width="15.279cm" style:rel-width="scale" svg:height="9.855cm" style:rel-height="scale" draw:z-index="3"><draw:image xlink:href="Pictures/10000000000005050000033D6EA72F92.png" xlink:type="simple" xlink:show="embed" xlink:actuate="onLoad" draw:mime-type="image/png"/></draw:frame></text:h>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is-list-header="true">2.6 Diagramme de séquence</text:h>
      <text:p text:style-name="P12"><text:soft-page-break/>Le cycle de séchage débute par la saisie des paramètres par l'utilisateur : variété de houblon, températures minimale et maximale, et durée de séchage. Une fois ces paramètres validés, l'utilisateur démarre la ventilation depuis l'armoire électrique, ce qui lance officiellement le cycle. Le système entre alors dans une boucle de fonctionnement continu : les températures sont mesurées régulièrement et affichées sur l'interface web. Si la température moyenne descend en dessous du seuil minimal, le brûleur est automatiquement allumé. À l'inverse, si elle dépasse le seuil maximal, le brûleur est immédiatement coupé. En parallèle, le temps restant avant la fin du cycle est calculé et affiché en permanence. Lorsque la durée de séchage est écoulée, le système arrête le chauffage et en informe l'utilisateur via une alerte visuelle.</text:p>
      <text:p text:style-name="P15"><text:span text:style-name="Police_20_par_20_défaut"><text:span text:style-name="T9"/></text:span></text:p>
      <text:p text:style-name="P12"><draw:frame draw:style-name="fr1" draw:name="Image1 Copie 1" text:anchor-type="paragraph" svg:x="0.6cm" svg:y="0.497cm" svg:width="17.214cm" style:rel-width="scale" svg:height="18.538cm" style:rel-height="scale" draw:z-index="4"><draw:image xlink:href="Pictures/10000000000002B1000002E6F7E1A5C0.png" xlink:type="simple" xlink:show="embed" xlink:actuate="onLoad" draw:mime-type="image/png"/></draw:frame></text:p>
      <text:p text:style-name="P1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h text:style-name="Titre_20_2" text:outline-level="2" text:is-list-header="true">2.7 Évolutions et adaptations en cours de développement</text:h>
      <text:p text:style-name="P12"><text:soft-page-break/>Au cours du projet, plusieurs adaptations ont été nécessaires par rapport au cahier des charges initial. La principale est le remplacement de la Raspberry Pi 3 initialement prévue par une Raspberry Pi 5, fournie en cours de développement. Ce changement a eu des impacts directs : la Raspberry Pi 5 intègre nativement une RTC interne, supprimant le besoin d'un module I2C externe. La version du serveur PHP a également évolué vers PHP 8.4, et le serveur de base de données MySQL a été remplacé par MariaDB, compatible mais plus adapté à Raspberry Pi OS.</text:p>
      <text:p text:style-name="P15"/>
      <text:h text:style-name="Titre_20_2" text:outline-level="2">2.8 Tests réalisés sur le système</text:h>
      <text:p text:style-name="P12">Des tests ont été menés de manière incrémentale, en validant chaque composant individuellement avant intégration dans le système complet. Chaque fonctionnalité développée a fait l'objet de tests unitaires documentés, couvrant les cas nominaux et les cas limites (dépassement de température, perte de connexion, données manquantes en base).</text:p>
      <text:p text:style-name="P12">[Compléter ici avec le détail des tests réalisés et leurs résultats]</text:p>
      <text:p text:style-name="P6"/>
      <text:h text:style-name="Titre_20_1" text:outline-level="1">3. Méthodologie de prise en compte des contraintes du cahier des charges</text:h>
      <text:p text:style-name="P12">La méthodologie adoptée tout au long du projet repose sur une lecture attentive du cahier des charges en amont de chaque développement, afin d'identifier les contraintes techniques et fonctionnelles à respecter avant toute implémentation. Les choix techniques ont été systématiquement justifiés et documentés.</text:p>
      <text:p text:style-name="P15"><text:span text:style-name="Police_20_par_20_défaut"><text:span text:style-name="T9">Le travail a été organisé selon les rôles définis dans le cahier des charges, avec des points de synchronisation réguliers entre les trois étudiants afin d'assurer la cohérence de l'architecture globale, notamment au niveau de l'interface et/ou entre les scripts PHP de chaque étudiant et aussi pour la structure de la base de données.</text:span></text:span></text:p>
      <text:h text:style-name="Titre_20_1" text:outline-level="1">4. Contenu du support de rendu</text:h>
      <text:p text:style-name="P15"><text:span text:style-name="Police_20_par_20_défaut"><text:span text:style-name="T9">Le support de rendu CDROOM doit contenir : ce rapport, les codes sources (dernière version), ainsi que les manuels d'utilisation et d'installation du système. La hiérarchie recommandée est la suivante :</text:span></text:span></text:p>
      <text:list text:style-name="WWNum2">
        <text:list-item text:start-value="1">
          <text:p text:style-name="P32">Répertoire source/ : sources de tous les programmes.</text:p>
        </text:list-item>
        <text:list-item>
          <text:p text:style-name="P32">Répertoire bin/ : exécutables.</text:p>
        </text:list-item>
        <text:list-item>
          <text:p text:style-name="P32">Répertoire doc/ : documentations.</text:p>
        </text:list-item>
        <text:list-item>
          <text:p text:style-name="P32">Répertoire installation : fichiers d'installation de l'application.</text:p>
        </text:list-item>
      </text:list>
      <text:p text:style-name="P33"/>
      <text:p text:style-name="P34">Le projet étant coordonée via git, un repo disponible en ligne sur github est accesible a</text:p>
      <text:p text:style-name="P35"><text:span text:style-name="T11">l’url → </text:span><text:a xlink:type="simple" xlink:href="https://github.com/Sauvage89/sechoir-houblon" office:target-frame-name="_top" xlink:show="replace" text:style-name="Internet_20_link" text:visited-style-name="Visited_20_Internet_20_Link"><text:span text:style-name="Police_20_par_20_défaut"><text:span text:style-name="T12">https://github.com/Sauvage89/sechoir-houblon</text:span></text:span></text:a></text:p>
      <text:p text:style-name="P36"/>
      <text:p text:style-name="Standard"><text:span text:style-name="T11">La navigation au sein de ce repo est documenter dans le </text:span><text:span text:style-name="Police_20_par_20_défaut"><text:span text:style-name="T13">README.md</text:span></text:span><text:span text:style-name="Police_20_par_20_défaut"><text:span text:style-name="T14"> </text:span></text:span><text:span text:style-name="T11">qui ce trouve a la racine du projet.</text:span></text:p>
      <text:h text:style-name="P37" text:outline-level="1"><text:bookmark-start text:name="_Toc470112040"/><text:soft-page-break/>Présentation du travail du candidat N°<text:bookmark-end text:name="_Toc470112040"/>1 – Lénny Sauvage</text:h>
      <text:p text:style-name="P38"/>
      <text:h text:style-name="P11" text:outline-level="1">Introduction</text:h>
      <text:p text:style-name="P15"><text:span text:style-name="Police_20_par_20_défaut"><text:span text:style-name="T9">Dans le cadre du projet Séchoir à Houblon, ma contribution repose principalement sur trois axes : la mise en place de l'infrastructure système de la Raspberry Pi (serveur web Apache, base de données MariaDB, horloge temps réel), et le développement des deux interfaces utilisateur qui permettent à l'agriculteur de configurer les lots d’houblon et d'exporter l'historique de sa production.</text:span></text:span></text:p>
      <text:p text:style-name="P12">Ce dossier présente, pour chacun de ces cinq sujets, le contexte et l'objectif, les choix techniques retenus, le périmètre exact de ma réalisation, ainsi que les difficultés rencontrées et les solutions apportées.</text:p>
      <text:p text:style-name="P39">Tout test est vérifié par un cahier de recette.</text:p>
      <text:p text:style-name="P39">Toute documentation technique ce situe dans le dossier guide/ dans le CDROOM ou bien dans le dossier doc/guide/ du github du projet.</text:p>
      <text:h text:style-name="Titre_20_1" text:outline-level="1">1. Configuration du service web (Apache 2 + PHP)</text:h>
      <text:h text:style-name="Titre_20_2" text:outline-level="2">1.1 Contexte et objectif</text:h>
      <text:p text:style-name="P12">L'agriculteur doit pouvoir interagir avec le système de contrôle depuis son smartphone, sans aucune installation logicielle particulière. Le choix d'une interface web s'est imposé comme solution naturelle : accessible depuis n'importe quel navigateur, elle ne nécessite aucun déploiement côté client et reste simple à maintenir.</text:p>
      <text:p text:style-name="P12">Le serveur web est hébergé sur la Raspberry Pi 5 et constitue le point d'entrée unique pour la consultation des températures, le paramétrage du séchage, le pilotage du cycle (démarrage/arrêt), ainsi que la visualisation et l'export des données.</text:p>
      <text:h text:style-name="Titre_20_2" text:outline-level="2">1.2 Choix techniques</text:h>
      <text:p text:style-name="P12">L'environnement technique retenu repose sur les technologies imposées par le cahier des charges :</text:p>
      <text:list xml:id="list153129561709828" text:style-name="WWNum2">
        <text:list-item text:start-value="1">
          <text:p text:style-name="P32">Apache 2 : serveur HTTP, choisi pour sa robustesse, sa disponibilité sur Raspberry Pi OS et sa large documentation.</text:p>
        </text:list-item>
        <text:list-item>
          <text:p text:style-name="P32">PHP 8.4 : langage serveur permettant l'exécution de scripts et l'accès à la base de données.</text:p>
        </text:list-item>
        <text:list-item>
          <text:p text:style-name="P40"><text:span text:style-name="Police_20_par_20_défaut"><text:span text:style-name="T9">HTML5 / CSS3 / JavaScript / C : couche présentation côté navigateur, avec appels asynchrones (fetch) vers les scripts PHP.</text:span></text:span></text:p>
        </text:list-item>
      </text:list>
      <text:h text:style-name="Titre_20_2" text:outline-level="2">1.3 Périmètre de ma réalisation</text:h>
      <text:p text:style-name="P12">Ma contribution a porté sur l'installation et la configuration complète du serveur Apache 2 sur la Raspberry Pi, l'activation du module PHP, la définition des droits d'accès selon le principe de moindre privilège (utilisateur www-data), ainsi que la mise en place de la structure de fichiers du site web. La configuration du VirtualHost (fichier 000-default.conf) et la politique de droits sur les répertoires /var/www/html et /var/log/apache2 ont été définies et appliquées.</text:p>
      <text:h text:style-name="Titre_20_2" text:outline-level="2">1.4 Installation et configuration</text:h>
      <text:h text:style-name="Titre_20_3" text:outline-level="3">1.4.1 Installation d'Apache 2</text:h>
      <text:p text:style-name="P15"><text:soft-page-break/><text:span text:style-name="Police_20_par_20_défaut"><text:span text:style-name="T9">L'installation du serveur web a été réalisée via le gestionnaire de paquets APT. Une vérification du bon fonctionnement a été effectuée en accédant à la page par défaut du serveur depuis un navigateur web sur le réseau local. Le service Apache a ensuite été configuré pour démarrer automatiquement au démarrage du système.</text:span></text:span></text:p>
      <text:h text:style-name="Titre_20_3" text:outline-level="3">1.4.2 Installation de PHP 8.4</text:h>
      <text:p text:style-name="P12">Le module PHP a été installé et intégré à Apache afin de permettre l'exécution de scripts côté serveur. Cette étape est essentielle car l'ensemble de la logique métier (traitement des données, interaction avec la base) repose sur PHP.</text:p>
      <text:h text:style-name="Titre_20_3" text:outline-level="3">1.4.3 Organisation du site</text:h>
      <text:p text:style-name="P12">Le site est déployé dans /var/www/html, avec la structure suivante :</text:p>
      <text:list xml:id="list201820870503862" text:continue-numbering="true" text:style-name="WWNum2">
        <text:list-item>
          <text:p text:style-name="P32">api/ : scripts PHP (traitement, accès BDD)</text:p>
        </text:list-item>
        <text:list-item>
          <text:p text:style-name="P32">site/ : pages HTML et PHP</text:p>
        </text:list-item>
        <text:list-item>
          <text:p text:style-name="P32">css/ : feuilles de style (une par page)</text:p>
        </text:list-item>
        <text:list-item>
          <text:p text:style-name="P32">js/ : scripts Javascript</text:p>
        </text:list-item>
      </text:list>
      <text:p text:style-name="P12">Cette organisation permet une séparation claire entre front-end et back-end, facilitant la maintenance et le travail collaboratif.</text:p>
      <text:h text:style-name="Titre_20_3" text:outline-level="3">1.4.4 Droits d'accès (principe de moindre privilège)</text:h>
      <text:p text:style-name="P12">Le processus Apache s'exécute sous l'utilisateur système www-data, qui ne dispose que des droits strictement nécessaires :</text:p>
      <text:list xml:id="list201820697442757" text:continue-numbering="true" text:style-name="WWNum2">
        <text:list-item>
          <text:p text:style-name="P32">/var/www/html et ses sous-dossiers : droits 500 (dr-x------) — parcours et lecture, pas d'écriture.</text:p>
        </text:list-item>
        <text:list-item>
          <text:p text:style-name="P32">Fichiers du site : droits 400 (-r--------) — lecture seule.</text:p>
        </text:list-item>
        <text:list-item>
          <text:p text:style-name="P32">/var/log/apache2/access.log et error.log : droits 600 (-rw-------) — lecture et écriture pour les journaux.</text:p>
        </text:list-item>
        <text:list-item>
          <text:p text:style-name="P32">/etc/apache2/ : réservé à root:root, droits 700 récursifs.</text:p>
        </text:list-item>
      </text:list>
      <text:p text:style-name="P12">Cette configuration garantit qu'une éventuelle faille dans le site web ne permettrait pas à un attaquant d'écrire ou de modifier des fichiers système.</text:p>
      <text:h text:style-name="Titre_20_3" text:outline-level="3">1.4.5 Configuration du VirtualHost</text:h>
      <text:p text:style-name="P12">Le serveur Apache est configuré via le fichier 000-default.conf dans /etc/apache2/sites-available/. Ce fichier définit le port d'écoute (80), le répertoire racine (/var/www/html), et les chemins des journaux d'accès et d'erreurs. Le fichier actif dans sites-enabled/ est un lien symbolique vers ce fichier disponible.</text:p>
      <text:h text:style-name="Titre_20_2" text:outline-level="2">1.5 Fonctionnement des échanges front-end / back-end</text:h>
      <text:p text:style-name="P12">Les pages du site ne se rechargent pas lors des interactions de l'utilisateur. La communication entre le navigateur et le serveur s'effectue de manière asynchrone via l'API fetch de JavaScript :</text:p>
      <text:list text:style-name="WWNum3">
        <text:list-item text:start-value="1">
          <text:p text:style-name="P41">L'utilisateur interagit avec l'interface (bouton, formulaire).</text:p>
        </text:list-item>
        <text:list-item>
          <text:p text:style-name="P41">Le JavaScript effectue une requête HTTP vers un script PHP de l'API.</text:p>
        </text:list-item>
        <text:list-item>
          <text:p text:style-name="P41">Le script PHP traite la demande, interroge ou met à jour la base de données, puis retourne une réponse au format JSON.</text:p>
        </text:list-item>
        <text:list-item>
          <text:p text:style-name="P42"><text:soft-page-break/><text:span text:style-name="Police_20_par_20_défaut"><text:span text:style-name="T9">Le JavaScript interprète la réponse JSON et met à jour dynamiquement l'affichage sans rechargement de page.</text:span></text:span></text:p>
        </text:list-item>
      </text:list>
      <text:p text:style-name="P12">Cette approche permet une interface fluide et réactive, adaptée à une utilisation depuis un smartphone, sans nécessiter de framework JavaScript lourd.</text:p>
      <text:p text:style-name="P6"/>
      <text:h text:style-name="Titre_20_1" text:outline-level="1">2. Configuration du service base de données (MariaDB)</text:h>
      <text:h text:style-name="Titre_20_2" text:outline-level="2">2.1 Contexte et objectif</text:h>
      <text:p text:style-name="P12">L'enregistrement fiable des données est une exigence centrale du projet : températures relevées toutes les 30 minutes, événements système, cycles de séchage, lots et variétés de houblon, masses produites. Une base de données relationnelle MariaDB (compatible MySQL, imposé par le cahier des charges) a été retenue pour structurer, stocker et restituer ces informations.</text:p>
      <text:p text:style-name="P12">L'objectif est de permettre à l'agriculteur de disposer d'un historique complet et cohérent, utilisable à la fois pour le suivi en temps réel via l'interface web et pour l'analyse rétrospective des campagnes de séchage.</text:p>
      <text:h text:style-name="Titre_20_2" text:outline-level="2">2.2 Périmètre de ma réalisation</text:h>
      <text:p text:style-name="P12">Mon travail a couvert la conception du schéma relationnel, la création des tables avec leurs contraintes d'intégrité (clés primaires, clés étrangères, valeurs nullables), ainsi que la définition des stratégies d'enregistrement pour chaque table. J'ai également rédigé la documentation technique de la base.</text:p>
      <text:h text:style-name="Titre_20_2" text:outline-level="2">2.3 Architecture de la base</text:h>
      <text:p text:style-name="P12">La base de données, utilisée par le compte www-data, est organisée autour de neuf tables couvrant l'ensemble du cycle de vie d'un lot de houblon :</text:p>
      <text:p text:style-name="P6"/>
      <table:table table:name="Tableau6" table:style-name="Tableau6">
        <table:table-column table:style-name="Tableau6.A"/>
        <table:table-column table:style-name="Tableau6.B"/>
        <table:table-row>
          <table:table-cell table:style-name="Tableau6.A1" office:value-type="string">
            <text:p text:style-name="P43">Table</text:p>
          </table:table-cell>
          <table:table-cell table:style-name="Tableau6.A1" office:value-type="string">
            <text:p text:style-name="P43">Description</text:p>
          </table:table-cell>
        </table:table-row>
        <table:table-row>
          <table:table-cell table:style-name="Tableau6.A2" office:value-type="string">
            <text:p text:style-name="P44">pause</text:p>
          </table:table-cell>
          <table:table-cell table:style-name="Tableau6.A2" office:value-type="string">
            <text:p text:style-name="P44">Enregistre les pauses horodatées survenant durant le fonctionnement du séchoir.</text:p>
          </table:table-cell>
        </table:table-row>
        <table:table-row>
          <table:table-cell table:style-name="Tableau6.A2" office:value-type="string">
            <text:p text:style-name="P44">variete</text:p>
          </table:table-cell>
          <table:table-cell table:style-name="Tableau6.A2" office:value-type="string">
            <text:p text:style-name="P44">Référentiel des variétés de houblon disponibles et désactivées.</text:p>
          </table:table-cell>
        </table:table-row>
        <table:table-row>
          <table:table-cell table:style-name="Tableau6.A2" office:value-type="string">
            <text:p text:style-name="P44">masse</text:p>
          </table:table-cell>
          <table:table-cell table:style-name="Tableau6.A2" office:value-type="string">
            <text:p text:style-name="P44">Enregistre la masse de houblon produite à l'issue du séchage.</text:p>
          </table:table-cell>
        </table:table-row>
        <table:table-row>
          <table:table-cell table:style-name="Tableau6.A2" office:value-type="string">
            <text:p text:style-name="P44">etage</text:p>
          </table:table-cell>
          <table:table-cell table:style-name="Tableau6.A2" office:value-type="string">
            <text:p text:style-name="P44">Données statiques représentant les étages physiques du séchoir.</text:p>
          </table:table-cell>
        </table:table-row>
        <table:table-row>
          <table:table-cell table:style-name="Tableau6.A2" office:value-type="string">
            <text:p text:style-name="P44">etatSechoir</text:p>
          </table:table-cell>
          <table:table-cell table:style-name="Tableau6.A2" office:value-type="string">
            <text:p text:style-name="P44">Table d'état courant du séchoir (variable globale persistante).</text:p>
          </table:table-cell>
        </table:table-row>
        <table:table-row>
          <table:table-cell table:style-name="Tableau6.A2" office:value-type="string">
            <text:p text:style-name="P44">capteur</text:p>
          </table:table-cell>
          <table:table-cell table:style-name="Tableau6.A2" office:value-type="string">
            <text:p text:style-name="P44">Référence les capteurs de température actifs et inactifs du système.</text:p>
          </table:table-cell>
        </table:table-row>
        <table:table-row>
          <table:table-cell table:style-name="Tableau6.A2" office:value-type="string">
            <text:p text:style-name="P44">lot</text:p>
          </table:table-cell>
          <table:table-cell table:style-name="Tableau6.A2" office:value-type="string">
            <text:p text:style-name="P44">Table centrale — suit un cycle complet de production pour une variété donnée.</text:p>
          </table:table-cell>
        </table:table-row>
        <table:table-row>
          <table:table-cell table:style-name="Tableau6.A2" office:value-type="string">
            <text:p text:style-name="P44">temperature</text:p>
          </table:table-cell>
          <table:table-cell table:style-name="Tableau6.A2" office:value-type="string">
            <text:p text:style-name="P44">Stocke les mesures de température relevées par les capteurs.</text:p>
          </table:table-cell>
        </table:table-row>
        <text:soft-page-break/>
        <table:table-row>
          <table:table-cell table:style-name="Tableau6.A2" office:value-type="string">
            <text:p text:style-name="P44">lotEtage</text:p>
          </table:table-cell>
          <table:table-cell table:style-name="Tableau6.A2" office:value-type="string">
            <text:p text:style-name="P44">Table d'association reliant un lot à son étage courant, traçant ses changements d'étage.</text:p>
          </table:table-cell>
        </table:table-row>
      </table:table>
      <text:p text:style-name="P6"/>
      <text:h text:style-name="Titre_20_2" text:outline-level="2">2.4 Modèle Conceptuel de Données (MCD)</text:h>
      <text:p text:style-name="P15"><text:span text:style-name="Police_20_par_20_défaut"><text:span text:style-name="T9">Un Modèle Conceptuel de Données est structuré autour de trois éléments : les </text:span></text:span><text:span text:style-name="Police_20_par_20_défaut"><text:span text:style-name="T10">entités</text:span></text:span><text:span text:style-name="Police_20_par_20_défaut"><text:span text:style-name="T9">, les </text:span></text:span><text:span text:style-name="Police_20_par_20_défaut"><text:span text:style-name="T10">associations</text:span></text:span><text:span text:style-name="Police_20_par_20_défaut"><text:span text:style-name="T9"> et les </text:span></text:span><text:span text:style-name="Police_20_par_20_défaut"><text:span text:style-name="T10">attributs</text:span></text:span><text:span text:style-name="Police_20_par_20_défaut"><text:span text:style-name="T9">. Une entité représente un objet du système (par exemple un lot de houblon), ses attributs décrivent ses propriétés (variété, taux de remplissage, durée de séchage), et les associations modélisent les liens entre entités.</text:span></text:span></text:p>
      <text:p text:style-name="P12">La lecture des associations se fait via les cardinalités, exprimées selon la notation suivante : (1,1) = 1 et 1 seul,</text:p>
      <text:p text:style-name="P12">(0,1) = 0 ou 1,</text:p>
      <text:p text:style-name="P12">(1,n) = entre 1 et n,</text:p>
      <text:p text:style-name="P12">(0,n) = entre 0 et n.</text:p>
      <text:p text:style-name="P12">Par exemple, un lot appartient à une et une seule variété, tandis qu'une variété peut être associée à zéro à plusieurs lots.</text:p>
      <text:p text:style-name="P15"><draw:frame draw:style-name="fr1" draw:name="Image6" text:anchor-type="paragraph" svg:x="-0.459cm" svg:y="0.265cm" svg:width="19.741cm" style:rel-width="scale" svg:height="8.67cm" style:rel-height="scale" draw:z-index="5"><draw:image xlink:href="Pictures/10000000000006DA0000031B031F7B74.png" xlink:type="simple" xlink:show="embed" xlink:actuate="onLoad" draw:mime-type="image/png"/></draw:frame><text:span text:style-name="Police_20_par_20_défaut"><text:span text:style-name="T9"/></text:span></text:p>
      <text:h text:style-name="Titre_20_2" text:outline-level="2">2.5 Modèle Logique de Données (MLD)</text:h>
      <text:p text:style-name="P12">Le Modèle Logique de Données est une traduction du MCD dans un format adapté à une implémentation en base de données relationnelle. Chaque entité devient une table, ses attributs deviennent des colonnes, et chaque table possède une clé primaire. Le passage du MCD au MLD dépend des cardinalités :</text:p>
      <text:list xml:id="list201818844219746" text:continue-list="list201820697442757" text:style-name="WWNum2">
        <text:list-item>
          <text:p text:style-name="P32">(1,1) se traduit par une clé étrangère dans l'une des deux tables.</text:p>
        </text:list-item>
        <text:list-item>
          <text:p text:style-name="P32">(1,n) se traduit par une clé étrangère du côté « n ».</text:p>
        </text:list-item>
        <text:list-item>
          <text:p text:style-name="P32">(n,n) nécessite la création d'une table intermédiaire.</text:p>
        </text:list-item>
      </text:list>
      <text:p text:style-name="P15"/>
      <text:p text:style-name="P6"><draw:frame draw:style-name="fr1" draw:name="Image7" text:anchor-type="paragraph" svg:x="-0.146cm" svg:y="0.141cm" svg:width="18.96cm" style:rel-width="scale" svg:height="8.855cm" style:rel-height="scale" draw:z-index="6"><draw:image xlink:href="Pictures/10000000000006CF0000032E52F48D71.png" xlink:type="simple" xlink:show="embed" xlink:actuate="onLoad" draw:mime-type="image/png"/></draw:frame><text:soft-page-break/></text:p>
      <text:h text:style-name="Titre_20_1" text:outline-level="1">3. Configuration de l'horloge temps réel (RTC)</text:h>
      <text:h text:style-name="Titre_20_2" text:outline-level="2">3.1 Contexte et objectif</text:h>
      <text:p text:style-name="P12">Le séchoir est déployé dans une zone blanche, sans accès à Internet. La Raspberry Pi ne peut donc pas synchroniser son horloge via un serveur NTP. Or, l'horodatage correct de toutes les mesures et événements est une condition de fiabilité du système : des horodatages erronés rendraient l'historique inexploitable.</text:p>
      <text:p text:style-name="P12">L'ajout d'une horloge temps réel (RTC) permet de conserver l'heure exacte même après une coupure d'alimentation, garantissant ainsi la cohérence des données à chaque redémarrage.</text:p>
      <text:h text:style-name="Titre_20_2" text:outline-level="2">3.2 Solution retenue</text:h>
      <text:p text:style-name="P12">Au cours du développement, une Raspberry Pi 5 a été mise à disposition. Contrairement à la Raspberry Pi 3 initialement prévue, la Pi 5 intègre nativement une RTC interne. Il suffit de brancher une pile sur le connecteur BAT de la carte pour alimenter cette RTC lorsque le système est hors tension, sans nécessiter de module externe ni de configuration I2C supplémentaire.</text:p>
      <text:h text:style-name="Titre_20_2" text:outline-level="2">3.3 Périmètre de ma réalisation</text:h>
      <text:p text:style-name="P12">J'ai réalisé une étude comparative des modules RTC externes courants (DS1307, DS3231, PCF8523) afin d'argumenter le choix technique initial. J'ai ensuite procédé à la configuration système : désactivation du faux RTC logiciel (fake-hwclock), réglage manuel de l'heure, écriture dans la RTC (hwclock -w), et vérification du bon fonctionnement après coupure d'alimentation.</text:p>
      <text:h text:style-name="Titre_20_2" text:outline-level="2">3.4 Étude comparative des modules RTC externes</text:h>
      <text:p text:style-name="P12">Avant la mise à disposition de la Raspberry Pi 5, une analyse des modules RTC disponibles a été conduite afin de sélectionner le composant le plus adapté : déploiement en zone blanche, environnement agricole soumis à des variations de température, et besoin de fiabilité sur une longue période sans maintenance.</text:p>
      <text:p text:style-name="P6"/>
      <table:table table:name="Tableau7" table:style-name="Tableau7">
        <table:table-column table:style-name="Tableau7.A"/>
        <table:table-column table:style-name="Tableau7.B"/>
        <table:table-column table:style-name="Tableau7.C"/>
        <table:table-column table:style-name="Tableau7.D"/>
        <text:soft-page-break/>
        <table:table-row>
          <table:table-cell table:style-name="Tableau7.A1" office:value-type="string">
            <text:p text:style-name="P43">Critère</text:p>
          </table:table-cell>
          <table:table-cell table:style-name="Tableau7.A1" office:value-type="string">
            <text:p text:style-name="P43">DS1307</text:p>
          </table:table-cell>
          <table:table-cell table:style-name="Tableau7.A1" office:value-type="string">
            <text:p text:style-name="P43">DS3231</text:p>
          </table:table-cell>
          <table:table-cell table:style-name="Tableau7.A1" office:value-type="string">
            <text:p text:style-name="P43">PCF8523</text:p>
          </table:table-cell>
        </table:table-row>
        <table:table-row>
          <table:table-cell table:style-name="Tableau7.A2" office:value-type="string">
            <text:p text:style-name="P44">Interface</text:p>
          </table:table-cell>
          <table:table-cell table:style-name="Tableau7.A2" office:value-type="string">
            <text:p text:style-name="P44">I2C</text:p>
          </table:table-cell>
          <table:table-cell table:style-name="Tableau7.A2" office:value-type="string">
            <text:p text:style-name="P44">I2C</text:p>
          </table:table-cell>
          <table:table-cell table:style-name="Tableau7.A2" office:value-type="string">
            <text:p text:style-name="P44">I2C</text:p>
          </table:table-cell>
        </table:table-row>
        <table:table-row>
          <table:table-cell table:style-name="Tableau7.A2" office:value-type="string">
            <text:p text:style-name="P44">Tension</text:p>
          </table:table-cell>
          <table:table-cell table:style-name="Tableau7.A2" office:value-type="string">
            <text:p text:style-name="P44">5V</text:p>
          </table:table-cell>
          <table:table-cell table:style-name="Tableau7.A2" office:value-type="string">
            <text:p text:style-name="P44">3,3V</text:p>
          </table:table-cell>
          <table:table-cell table:style-name="Tableau7.A2" office:value-type="string">
            <text:p text:style-name="P44">3,3V</text:p>
          </table:table-cell>
        </table:table-row>
        <table:table-row>
          <table:table-cell table:style-name="Tableau7.A2" office:value-type="string">
            <text:p text:style-name="P44">Précision</text:p>
          </table:table-cell>
          <table:table-cell table:style-name="Tableau7.A2" office:value-type="string">
            <text:p text:style-name="P44">Moyenne</text:p>
          </table:table-cell>
          <table:table-cell table:style-name="Tableau7.A2" office:value-type="string">
            <text:p text:style-name="P44">Haute (±2 ppm)</text:p>
          </table:table-cell>
          <table:table-cell table:style-name="Tableau7.A2" office:value-type="string">
            <text:p text:style-name="P44">Moyenne</text:p>
          </table:table-cell>
        </table:table-row>
        <table:table-row>
          <table:table-cell table:style-name="Tableau7.A2" office:value-type="string">
            <text:p text:style-name="P44">Rétention pile</text:p>
          </table:table-cell>
          <table:table-cell table:style-name="Tableau7.A2" office:value-type="string">
            <text:p text:style-name="P44">Variable</text:p>
          </table:table-cell>
          <table:table-cell table:style-name="Tableau7.A2" office:value-type="string">
            <text:p text:style-name="P44">~6 ans</text:p>
          </table:table-cell>
          <table:table-cell table:style-name="Tableau7.A2" office:value-type="string">
            <text:p text:style-name="P44">~6 ans</text:p>
          </table:table-cell>
        </table:table-row>
        <table:table-row>
          <table:table-cell table:style-name="Tableau7.A2" office:value-type="string">
            <text:p text:style-name="Standard"><text:span text:style-name="Police_20_par_20_défaut"><text:span text:style-name="T9">Coût moyen</text:span></text:span></text:p>
          </table:table-cell>
          <table:table-cell table:style-name="Tableau7.A2" office:value-type="string">
            <text:p text:style-name="Standard"><text:span text:style-name="Police_20_par_20_défaut"><text:span text:style-name="T9">~ </text:span></text:span><text:span text:style-name="Police_20_par_20_défaut"><text:span text:style-name="T11">6,50 €</text:span></text:span></text:p>
            <text:p text:style-name="P44"/>
          </table:table-cell>
          <table:table-cell table:style-name="Tableau7.A2" office:value-type="string">
            <text:p text:style-name="Standard"><text:span text:style-name="Police_20_par_20_défaut"><text:span text:style-name="T9">~ 7,90 €</text:span></text:span></text:p>
          </table:table-cell>
          <table:table-cell table:style-name="Tableau7.A2" office:value-type="string">
            <text:p text:style-name="Standard"><text:span text:style-name="Police_20_par_20_défaut"><text:span text:style-name="T9">~ 8,30 €</text:span></text:span></text:p>
          </table:table-cell>
        </table:table-row>
        <table:table-row table:style-name="Tableau7.7">
          <table:table-cell table:style-name="Tableau7.A2" office:value-type="string">
            <text:p text:style-name="P45">Compatible GPIO Raspberry Pi 3,3V</text:p>
          </table:table-cell>
          <table:table-cell table:style-name="Tableau7.A2" office:value-type="string">
            <text:p text:style-name="P44">Non (adaptateur requis)</text:p>
          </table:table-cell>
          <table:table-cell table:style-name="Tableau7.A2" office:value-type="string">
            <text:p text:style-name="P44">Oui</text:p>
          </table:table-cell>
          <table:table-cell table:style-name="Tableau7.A2" office:value-type="string">
            <text:p text:style-name="P44">Oui</text:p>
          </table:table-cell>
        </table:table-row>
      </table:table>
      <text:p text:style-name="P6"/>
      <text:p text:style-name="P12">Conclusion : pour un usage critique en zone blanche où l'horodatage doit rester fiable sur toute une saison agricole, le DS3231 aurait été retenu. Sa tolérance aux variations thermiques et sa haute précision (±2 ppm ≈ ±1 minute par an) en font le module le plus adapté. La mise à disposition de la Raspberry Pi 5 a cependant rendu cette sélection caduque.</text:p>
      <text:h text:style-name="Titre_20_2" text:outline-level="2">3.5 Analyse des risques liés à l'absence de RTC</text:h>
      <text:p text:style-name="P12">Sans RTC fonctionnelle, à chaque coupure d'alimentation la Raspberry Pi redémarre avec une heure incorrecte. Les conséquences directes sont :</text:p>
      <text:list xml:id="list201819010361400" text:continue-numbering="true" text:style-name="WWNum2">
        <text:list-item>
          <text:p text:style-name="P32">Les mesures de température en base seraient horodatées incorrectement, rendant tout graphique d'évolution thermique inexploitable.</text:p>
        </text:list-item>
        <text:list-item>
          <text:p text:style-name="P32">Les événements en base (démarrage de cycle, alerte, arrêt) perdraient leur valeur chronologique, rendant impossible tout audit rétrospectif.</text:p>
        </text:list-item>
      </text:list>
      <text:h text:style-name="Titre_20_2" text:outline-level="2">3.6 Procédure de configuration — Raspberry Pi 5 (RTC interne)</text:h>
      <text:h text:style-name="Titre_20_3" text:outline-level="3">Étape 1 — Connexion de la pile</text:h>
      <text:p text:style-name="P12">Brancher une pile bouton compatible sur le connecteur BAT de la Raspberry Pi 5. Cette pile alimentera exclusivement le circuit RTC lorsque la carte sera hors tension.</text:p>
      <text:h text:style-name="Titre_20_3" text:outline-level="3">Étape 2 — Réglage initial de l'heure</text:h>
      <text:p text:style-name="P12">Lors de la première mise en service, l'heure doit être renseignée manuellement puisque le système est hors réseau :</text:p>
      <text:p text:style-name="P46">sudo timedatectl set-timezone Europe/Paris</text:p>
      <text:p text:style-name="P47"><text:span text:style-name="Police_20_par_20_défaut"><text:span text:style-name="T15">sudo timedatectl set-time "YYYY-MM-DD HH:MM:SS"</text:span></text:span></text:p>
      <text:h text:style-name="Titre_20_3" text:outline-level="3">Étape 3 — Vérification du fonctionnement</text:h>
      <text:p text:style-name="P12">Après un redémarrage, la commande suivante doit afficher l'heure correcte :</text:p>
      <text:p text:style-name="P47"><text:span text:style-name="Police_20_par_20_défaut"><text:span text:style-name="T16">sudo timedatectl status</text:span></text:span></text:p>
      <text:h text:style-name="Titre_20_3" text:outline-level="3">Étape 4 — Vérification finale après coupure</text:h>
      <text:p text:style-name="P15"><text:soft-page-break/><text:span text:style-name="Police_20_par_20_défaut"><text:span text:style-name="T9">Pour valider le comportement lors d'une vraie coupure d'alimentation : couper l'alimentation, patienter quelques minutes, remettre sous tension, puis exécuter date et sudo timedatectl status pour confirmer que l'heure est restée correcte.</text:span></text:span></text:p>
      <text:h text:style-name="Titre_20_2" text:outline-level="2">3.7 Bilan</text:h>
      <text:p text:style-name="P12">La RTC constitue un prérequis technique indispensable au bon fonctionnement du système dans un contexte hors réseau. La Raspberry Pi 5, en intégrant nativement ce composant, simplifie considérablement le câblage et la configuration par rapport à la solution initialement envisagée avec un module I2C externe. La procédure de configuration a été testée et validée : après coupure d'alimentation et redémarrage, l'heure système est correctement restituée depuis la RTC interne.</text:p>
      <text:p text:style-name="P6"/>
      <text:h text:style-name="Titre_20_1" text:outline-level="1">4. Développement de l'IHM de configuration du houblon</text:h>
      <text:h text:style-name="Titre_20_2" text:outline-level="2">4.1 Contexte et objectif</text:h>
      <text:p text:style-name="P15"><text:span text:style-name="Police_20_par_20_défaut"><text:span text:style-name="T9">Avant de démarrer un cycle de séchage, l'agriculteur doit renseigner un ensemble de paramètres : la variété de houblon chargée à chaque étage, le taux de remplissage, la température cible (min/max) et la durée prévue du cycle pour le lot qu’il est entrain de renseigner. Cette saisie doit être possible depuis un smartphone, sans compétence informatique particulière. Ces paramètres sont ensuite sauvegardés en base de données dès le lancement du cycle.</text:span></text:span></text:p>
      <text:h text:style-name="Titre_20_2" text:outline-level="2">4.2 Fonctionnalités développées</text:h>
      <text:list xml:id="list201819363491324" text:continue-numbering="true" text:style-name="WWNum2">
        <text:list-item>
          <text:p text:style-name="P32">Sélection de la variété de houblon par étage (liste déroulante alimentée depuis la table variete).</text:p>
        </text:list-item>
        <text:list-item>
          <text:p text:style-name="P32">Saisie du taux de remplissage de l'étage (boutons − et +, par pas de 10 %, entre 0 et 100 %).</text:p>
        </text:list-item>
        <text:list-item>
          <text:p text:style-name="P32">Saisie de la durée du cycle au format hh:mm avec boutons d'ajustement par pas de 10 minutes.</text:p>
        </text:list-item>
        <text:list-item>
          <text:p text:style-name="P32">Affichage récapitulatif de tous les paramètres.</text:p>
        </text:list-item>
        <text:list-item>
          <text:p text:style-name="P32">Enregistrement en base de données via un script PHP.</text:p>
        </text:list-item>
        <text:list-item>
          <text:p text:style-name="P32">Adaptation de l'interface selon le contexte (création ou modification d'un lot existant).</text:p>
        </text:list-item>
      </text:list>
      <text:h text:style-name="Titre_20_2" text:outline-level="2">4.3 Périmètre de ma réalisation</text:h>
      <text:p text:style-name="P15"><text:span text:style-name="Police_20_par_20_défaut"><text:span text:style-name="T9">J'ai conçu et développé la page HTML/CSS/JavaScript correspondante, ainsi que le script PHP côté serveur chargé de valider les données saisies et de les persister en base. L'interface a été pensée pour une utilisation mobile (responsive) via la librairie « bootstrap », avec un retour visuel immédiat à l'utilisateur après chaque action .</text:span></text:span></text:p>
      <text:h text:style-name="Titre_20_2" text:outline-level="2">4.4 Architecture technique de l'IHM</text:h>
      <text:h text:style-name="Titre_20_3" text:outline-level="3">4.4.1 Structure des fichiers</text:h>
      <text:p text:style-name="P12">L'interface de configuration se présente sous la forme d'un overlay (fenêtre modale) qui s'ouvre au clic sur le bouton de chaque étage depuis la page principale de gestion du séchoir. Ce choix technique évite une navigation entre plusieurs pages et permet à l'agriculteur d'agir rapidement, sans perdre de vue l'état général du séchoir.</text:p>
      <text:p text:style-name="P15"><text:soft-page-break/><text:span text:style-name="Police_20_par_20_défaut"><text:span text:style-name="T9">Le code est découpé en deux fichiers PHP distincts : gestion_sechoir.php qui affiche la vue principale des quatre étages, et gestion_sechoir_overlay.php qui contient la fenêtre modale de configuration.</text:span></text:span></text:p>
      <text:h text:style-name="Titre_20_3" text:outline-level="3">4.4.2 Architecture JavaScript modulaire</text:h>
      <text:p text:style-name="P12">Côté JavaScript, j'ai adopté une architecture modulaire en séparant les responsabilités en plusieurs fichiers distincts, chargés de manière différée (defer) :</text:p>
      <text:list xml:id="list201820115116271" text:continue-numbering="true" text:style-name="WWNum2">
        <text:list-item>
          <text:p text:style-name="P32">GestionAPI.js : gestion des appels vers l'API REST de la Raspberry Pi (get_status.php, création/suppression de lot).</text:p>
        </text:list-item>
        <text:list-item>
          <text:p text:style-name="P32">GestionUI.js : manipulation du DOM, affichage et masquage de l'overlay, mise à jour des champs.</text:p>
        </text:list-item>
        <text:list-item>
          <text:p text:style-name="P32">GestionUTILS.js : fonctions utilitaires (validation du format hh:mm, calcul du pourcentage de remplissage).</text:p>
        </text:list-item>
        <text:list-item>
          <text:p text:style-name="P32">GestionSTATE.js : gestion de l'état courant de l'overlay (étage sélectionné, lot existant ou nouveau).</text:p>
        </text:list-item>
        <text:list-item>
          <text:p text:style-name="P32">index.js : point d'entrée, initialisation et liaison des événements.</text:p>
        </text:list-item>
      </text:list>
      <text:p text:style-name="P12">Ce découpage facilite la maintenance et la lecture du code.</text:p>
      <text:h text:style-name="Titre_20_2" text:outline-level="2">4.5 Comportement de l'overlay selon le contexte</text:h>
      <text:p text:style-name="P12">L'overlay adapte son comportement selon qu'un lot existe déjà sur l'étage concerné ou non. Lors de l'ouverture, l'état courant de l'étage est récupéré depuis l'API : si un lot est déjà enregistré, les champs sont pré-remplis avec ses données et le bouton principal affiche « Modifier le lot » ; sinon, le formulaire est vide et le bouton affiche « Créer un lot ».</text:p>
      <text:p text:style-name="P15"><draw:frame draw:style-name="fr2" draw:name="Image9" text:anchor-type="paragraph" svg:x="2.404cm" svg:y="0.349cm" svg:width="13.446cm" style:rel-width="scale" svg:height="12.409cm" style:rel-height="scale" draw:z-index="7"><draw:image xlink:href="Pictures/100000000000036500000322D62AD20A.png" xlink:type="simple" xlink:show="embed" xlink:actuate="onLoad" draw:mime-type="image/png"/></draw:frame><text:span text:style-name="Police_20_par_20_défaut"><text:span text:style-name="T9"/></text:span></text:p>
      <text:p text:style-name="P12"/>
      <text:p text:style-name="P12"/>
      <text:p text:style-name="P12"/>
      <text:p text:style-name="P12"/>
      <text:p text:style-name="P15"><text:span text:style-name="Police_20_par_20_défaut"><text:span text:style-name="T9"/></text:span></text:p>
      <text:p text:style-name="P12"/>
      <text:p text:style-name="P12"/>
      <text:p text:style-name="P12"/>
      <text:p text:style-name="P12"/>
      <text:p text:style-name="P12"/>
      <text:p text:style-name="P12"/>
      <text:p text:style-name="P12"/>
      <text:p text:style-name="P12"/>
      <text:p text:style-name="P12"/>
      <text:p text:style-name="P12"/>
      <text:p text:style-name="P12"/>
      <text:h text:style-name="Titre_20_2" text:outline-level="2"><draw:frame draw:style-name="fr2" draw:name="Image10" text:anchor-type="paragraph" svg:x="1.894cm" svg:y="0.113cm" svg:width="13.346cm" style:rel-width="scale" svg:height="12.174cm" style:rel-height="scale" draw:z-index="8"><draw:image xlink:href="Pictures/100000000000036300000317B56B81F0.png" xlink:type="simple" xlink:show="embed" xlink:actuate="onLoad" draw:mime-type="image/png"/></draw:frame><text:soft-page-break/></text:h>
      <text:h text:style-name="Titre_20_2" text:outline-level="2"/>
      <text:h text:style-name="Titre_20_2" text:outline-level="2"/>
      <text:h text:style-name="Titre_20_2"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is-list-header="true">4.6 Communication avec l'API</text:h>
      <text:p text:style-name="P49"><text:span text:style-name="Police_20_par_20_défaut"><text:span text:style-name="T9">La sauvegarde des paramètres s'effectue via une requête fetch vers un endpoint PHP côté serveur. Les données sont envoyées au format JSON et le script PHP les valide puis les insère ou les met à jour en base de données.</text:span></text:span><text:span text:style-name="T9"/></text:p>
      <text:p text:style-name="P50"><draw:frame draw:style-name="fr2" draw:name="Image12" text:anchor-type="paragraph" svg:x="6.482cm" svg:y="0.34cm" svg:width="13.319cm" style:rel-width="scale" svg:height="10.34cm" style:rel-height="scale" draw:z-index="10"><draw:image xlink:href="Pictures/10000000000003DC000003064C4CC0AA.png" xlink:type="simple" xlink:show="embed" xlink:actuate="onLoad" draw:mime-type="image/png"/></draw:frame></text:p>
      <text:p text:style-name="P50">Script de connection</text:p>
      <text:p text:style-name="Standard"><text:span text:style-name="Police_20_par_20_défaut"><text:span text:style-name="T17">a la base de donnée</text:span></text:span></text:p>
      <text:p text:style-name="P44"/>
      <text:p text:style-name="P44"/>
      <text:p text:style-name="P44">Cette fonction retourne un objet « PDO » qui est une interface de <text:s/>communication avec la base de donnée.</text:p>
      <text:p text:style-name="P44"/>
      <text:p text:style-name="P44">Le « ? » permet de dire que cette objet peut être NULL si une erreur est survenue lors de la tentative de connexion.</text:p>
      <text:p text:style-name="P12"/>
      <text:p text:style-name="P51">Appeler cette fonction permet de récupérer un moyen de communiquer avec la base de données.</text:p>
      <text:p text:style-name="P15"><text:span text:style-name="Source_20_Text"><text:span text:style-name="T11"/></text:span></text:p>
      <text:p text:style-name="P15"><text:soft-page-break/><text:span text:style-name="Source_20_Text"><text:span text:style-name="T11">Le bloc </text:span></text:span><text:span text:style-name="Source_20_Text"><text:span text:style-name="T18">try...catch</text:span></text:span><text:span text:style-name="Source_20_Text"><text:span text:style-name="T11"> : Il sert à capturer les erreurs de connexion (exceptions). Cela est crucial pour la sécurité, car cela empêche PHP d'afficher par erreur vos identifiants (nom d'utilisateur et mot de passe) sur l'écran de l'utilisateur en cas de panne du serveur.</text:span></text:span></text:p>
      <text:p text:style-name="P15"><text:span text:style-name="Police_20_par_20_défaut"><text:span text:style-name="T9">L'option </text:span></text:span><text:span text:style-name="Source_20_Text"><text:span text:style-name="T18">PDO::ATTR_ERRMODE =&gt; PDO::ERRMODE_EXCEPTION</text:span></text:span><text:span text:style-name="Police_20_par_20_défaut"><text:span text:style-name="T9"> : Indispensable pour le développement, elle force PHP à générer une erreur fatale (exception) dès qu'une requête SQL est mal écrite, rendant le débogage beaucoup plus rapide.</text:span></text:span></text:p>
      <text:p text:style-name="P15"><text:span text:style-name="Police_20_par_20_défaut"><text:span text:style-name="T9">L'option </text:span></text:span><text:span text:style-name="Source_20_Text"><text:span text:style-name="T18">PDO::ATTR_DEFAULT_FETCH_MODE =&gt; PDO::FETCH_ASSOC</text:span></text:span><text:span text:style-name="Police_20_par_20_défaut"><text:span text:style-name="T9"> : Cette configuration définit le mode de récupération par défaut. Elle permet de recevoir les données sous forme de tableaux associatifs (clé =&gt; valeur) automatiquement, sans avoir à le préciser à chaque requête.</text:span></text:span></text:p>
      <text:p text:style-name="P15"><text:span text:style-name="Police_20_par_20_défaut"><text:span text:style-name="T9">L'encodage </text:span></text:span><text:span text:style-name="Source_20_Text"><text:span text:style-name="T18">charset=utf8</text:span></text:span><text:span text:style-name="Police_20_par_20_défaut"><text:span text:style-name="T9"> : Il garantit que les caractères spéciaux et les accents soient correctement lus et enregistrés dans la base de données dès l'établissement de la connexion.</text:span></text:span></text:p>
      <text:p text:style-name="P15"><text:span text:style-name="Source_20_Text">Pour finir, l’instanciation </text:span><text:span text:style-name="Source_20_Text"><text:span text:style-name="T4">new PDO(...)</text:span></text:span><text:span text:style-name="Police_20_par_20_défaut"><text:span text:style-name="T19"> <text:s/>:</text:span></text:span><text:span text:style-name="Police_20_par_20_défaut"><text:span text:style-name="T9"> C'est l'étape précise où PHP tente de se connecter physiquement à la base de données.</text:span></text:span></text:p>
      <text:p text:style-name="P52"><draw:frame draw:style-name="fr2" draw:name="Image11" text:anchor-type="paragraph" svg:x="-0.252cm" svg:y="1.266cm" svg:width="18.602cm" style:rel-width="scale" svg:height="4.72cm" style:rel-height="scale" draw:z-index="11"><draw:image xlink:href="Pictures/1000000000000392000000E80DB519C7.png" xlink:type="simple" xlink:show="embed" xlink:actuate="onLoad" draw:mime-type="image/png"/></draw:frame><text:span text:style-name="Police_20_par_20_défaut"><text:span text:style-name="T17"/></text:span></text:p>
      <text:p text:style-name="P53">Script d’envoie de requete a une base de donnée</text:p>
      <text:p text:style-name="P12"/>
      <text:p text:style-name="P54">Cette fonction permet d’envoyer une requete a une base de donnée.<text:line-break/><text:line-break/>Elle retourne un objet « PDOStatement » qui est le resultat de la requete executer et/ou contient les erreur survenue lors de la requête.</text:p>
      <text:p text:style-name="P54"/>
      <text:p text:style-name="P55"><text:span text:style-name="Police_20_par_20_défaut"><text:span text:style-name="T19">Le paramètre </text:span></text:span><text:span text:style-name="Source_20_Text"><text:span text:style-name="T4">$params = []</text:span></text:span><text:span text:style-name="Police_20_par_20_défaut"><text:span text:style-name="T19"> (Argument optionnel) :</text:span></text:span><text:span text:style-name="Police_20_par_20_défaut"><text:span text:style-name="T9"> C'est une sécurité très importante. Le fait d'utiliser un tableau vide par défaut permet deux choses :</text:span></text:span></text:p>
      <text:list text:style-name="L1">
        <text:list-item>
          <text:p text:style-name="P56"><text:span text:style-name="Police_20_par_20_défaut"><text:span text:style-name="T19">Si tu ne mets rien :</text:span></text:span><text:span text:style-name="Police_20_par_20_défaut"><text:span text:style-name="T9"> La fonction comprend qu'il n'y a pas de variables à filtrer (ex: "Afficher tout").</text:span></text:span></text:p>
        </text:list-item>
        <text:list-item>
          <text:p text:style-name="P56"><text:span text:style-name="Police_20_par_20_défaut"><text:span text:style-name="T19">Si tu mets des valeurs :</text:span></text:span><text:span text:style-name="Police_20_par_20_défaut"><text:span text:style-name="T9"> Elle les utilise pour remplir les "trous" de ta requête SQL en les nettoyant, ce qui protège ton site contre les </text:span></text:span><text:span text:style-name="Police_20_par_20_défaut"><text:span text:style-name="T19">injections SQL</text:span></text:span><text:span text:style-name="Police_20_par_20_défaut"><text:span text:style-name="T9"> (piratage).</text:span></text:span></text:p>
        </text:list-item>
      </text:list>
      <text:p text:style-name="P15"><text:span text:style-name="Source_20_Text"><text:span text:style-name="T4">$pdo-&gt;prepare($query_sql)</text:span></text:span><text:span text:style-name="Police_20_par_20_défaut"><text:span text:style-name="T19"> (La préparation) :</text:span></text:span><text:span text:style-name="Police_20_par_20_défaut"><text:span text:style-name="T9"> Avant d'envoyer les données, la fonction envoie le "plan" de la requête au serveur. La base de données analyse la structure de la commande sans l'exécuter, ce qui améliore les performances si on répète la même action.</text:span></text:span></text:p>
      <text:p text:style-name="P15"><text:span text:style-name="Source_20_Text"><text:span text:style-name="T4">$stmt-&gt;execute($params)</text:span></text:span><text:span text:style-name="Police_20_par_20_défaut"><text:span text:style-name="T19"> (L'exécution) :</text:span></text:span><text:span text:style-name="Police_20_par_20_défaut"><text:span text:style-name="T9"> PHP envoie les données réelles pour compléter la requête. Si une erreur de syntaxe SQL est présente, c'est à ce moment-là que l'exception (l'erreur fatale) sera déclenchée grâce aux réglages faits dans </text:span></text:span><text:span text:style-name="Source_20_Text">db_connect</text:span><text:span text:style-name="Police_20_par_20_défaut"><text:span text:style-name="T9">.</text:span></text:span></text:p>
      <text:h text:style-name="Titre_20_2" text:outline-level="2"><text:soft-page-break/>4.7 Mise à jour automatique de l'affichage</text:h>
      <text:p text:style-name="P12">La page de gestion du séchoir interroge régulièrement l'API get_status.php pour récupérer l'état en temps réel de chaque étage et des six capteurs de température. La fonction rafraichirStatus() est appelée au chargement de la page et relancée périodiquement. Les données reçues alimentent directement les éléments du DOM via les fonctions updateEtatCycle(), updateEtage() et updateTemperature(). La température moyenne des six capteurs est calculée côté client et affichée dans un bloc dédié.</text:p>
      <text:h text:style-name="Titre_20_2" text:outline-level="2">4.8 Difficultés rencontrées et solutions apportées</text:h>
      <text:p text:style-name="P12">La principale difficulté a été la gestion de la cohérence entre l'état affiché et l'état réel de la base de données, notamment lors d'actions rapides successives (création puis suppression immédiate d'un lot). J'ai résolu ce point en systématisant le rechargement des données depuis l'API après chaque action, plutôt que de modifier l'affichage localement.</text:p>
      <text:p text:style-name="P12">Un autre point d'attention a été la validation du format de saisie de la durée (hh:mm). La validation est effectuée en JavaScript avant l'envoi, avec un retour visuel immédiat sous le champ concerné, sans bloquer l'utilisateur.</text:p>
      <text:p text:style-name="P6">Et la dernière difficulté était qu’on était 2 étudiants a devoir développées une meme page, ce qui a nécessité une bonne coordination d’équipe pour l’avancement du projet.</text:p>
      <text:h text:style-name="Titre_20_1" text:outline-level="1">5. Développement de l'IHM d'export de données</text:h>
      <text:h text:style-name="Titre_20_2" text:outline-level="2">5.1 Contexte et objectif</text:h>
      <text:p text:style-name="P12">À l'issue d'une saison de séchage, l'agriculteur doit pouvoir accéder à l'historique complet de ses productions : variétés séchées, dates et durées des cycles, températures relevées, masses finales obtenues. Le cahier des charges prévoit la visualisation de ces données sous forme de tableaux et graphiques, ainsi que leur export au format CSV.</text:p>
      <text:h text:style-name="Titre_20_2" text:outline-level="2">5.2 Fonctionnalités développées</text:h>
      <text:list text:continue-list="list201820115116271" text:style-name="WWNum2">
        <text:list-item>
          <text:p text:style-name="P32">Affichage des données de production historiques (variété, dates, masse en kg) sous forme de tableau.</text:p>
        </text:list-item>
        <text:list-item>
          <text:p text:style-name="P32">Visualisation graphique de l'évolution des températures par cycle de séchage.</text:p>
        </text:list-item>
        <text:list-item>
          <text:p text:style-name="P32">Filtrage des données par variété ou par numéro de lot.</text:p>
        </text:list-item>
        <text:list-item>
          <text:p text:style-name="P32">Export des données sélectionnées au format CSV.</text:p>
        </text:list-item>
      </text:list>
      <text:h text:style-name="Titre_20_2" text:outline-level="2">5.3 Périmètre de ma réalisation</text:h>
      <text:p text:style-name="P12">J'ai développé la page d'export dans son intégralité : interface HTML/CSS/JavaScript pour l'affichage et le filtrage, scripts PHP pour l'interrogation de la base de données et la génération du fichier CSV.</text:p>
      <text:h text:style-name="Titre_20_2" text:outline-level="2">5.4 Architecture technique de la page</text:h>
      <text:h text:style-name="Titre_20_3" text:outline-level="3">5.4.1 Parcours utilisateur en trois étapes</text:h>
      <text:p text:style-name="P12">La page d'export est structurée selon un parcours utilisateur en trois étapes successives, matérialisées par trois sections qui s'affichent progressivement : le choix du type d'export, puis les filtres, puis les résultats. Cette progression guidée évite de surcharger l'écran et reste lisible sur smartphone.</text:p>
      <text:p text:style-name="P15"><text:soft-page-break/><text:span text:style-name="Police_20_par_20_défaut"><text:span text:style-name="T9">Deux modes d'export ont été prévus : l'export par lot, qui permet d'obtenir le détail complet d'un cycle de séchage précis par lot (pleinement fonctionnel), et l'export par production, destiné à regrouper tous les lots d'une saison (en dévellopement).</text:span></text:span></text:p>
      <text:h text:style-name="Titre_20_3" text:outline-level="3">5.4.2 Chargement dynamique des données de filtrage</text:h>
      <text:p text:style-name="P15"><text:span text:style-name="Police_20_par_20_défaut"><text:span text:style-name="T9">Dès le chargement de la page, la liste des variétés de houblon est récupérée automatiquement depuis la base de données via un appel à l'API query_get_variete.php. Les options du filtre sont générées dynamiquement par rapport aux type d’export.</text:span></text:span></text:p>
      <text:h text:style-name="Titre_20_3" text:outline-level="3">5.4.3 Filtrage et prévisualisation des résultats</text:h>
      <text:p text:style-name="P12">Lorsque l'utilisateur clique sur « Rechercher », la fonction loadTable() collecte les valeurs des champs de filtre actifs et les envoie au script PHP query_get_lots_preview.php via une requête POST. Les filtres sont collectés par une fonction générique getFiltersRender() qui parcourt un dictionnaire de correspondances entre les noms de champs logiques et les identifiants HTML, rendant le code extensible sans modification de la logique de collecte.</text:p>
      <text:p text:style-name="P12">Les résultats sont affichés sous deux formes simultanées générées par la même fonction renderTable() : un tableau classique pour les écrans larges, et un affichage en cartes empilées pour mobile. Les statuts des lots (Terminé, En cours, Erreur) sont mis en valeur par des badges colorés définis dans le dictionnaire BADGE.</text:p>
      <text:h text:style-name="Titre_20_3" text:outline-level="3">5.4.4 Génération et téléchargement du fichier CSV</text:h>
      <text:p text:style-name="P12">L'export d'un lot individuel est déclenché par le bouton CSV de chaque ligne du tableau. La fonction exportRow() envoie les filtres actifs ainsi que le numéro du lot ciblé à l'API query_export_csv.php, qui retourne un objet JSON structuré contenant quatre blocs de données : les informations du lot, le passage par étage (avec dates de début et de fin de séjour), les relevés de température, et les événements (pauses, arrêts).</text:p>
      <text:p text:style-name="P15"><text:span text:style-name="Police_20_par_20_défaut"><text:span text:style-name="T9">La construction du fichier CSV est réalisée entièrement côté JavaScript, sans rechargement de page. Chaque bloc est précédé d'un en-tête de section (=== TEMPERATURES ===, etc.) pour faciliter la lecture dans un tableur. Les blocs températures et événements sont optionnels selon les cases cochées dans les filtres. Le fichier générée est proposé au téléchargement.</text:span></text:span></text:p>
      <text:p text:style-name="P15"><draw:frame draw:style-name="fr2" draw:name="Image8" text:anchor-type="paragraph" svg:x="-0.24cm" svg:y="0.36cm" svg:width="18.602cm" style:rel-width="scale" svg:height="10.938cm" style:rel-height="scale" draw:z-index="9"><draw:image xlink:href="Pictures/1000000000000365000001FF7B255FAA.png" xlink:type="simple" xlink:show="embed" xlink:actuate="onLoad" draw:mime-type="image/png"/></draw:frame><text:span text:style-name="Police_20_par_20_défaut"><text:span text:style-name="T9"/></text:span></text:p>
      <text:h text:style-name="Titre_20_2" text:outline-level="2"><text:soft-page-break/>5.5 Difficultés rencontrées et solutions apportées</text:h>
      <text:p text:style-name="P12">La principale difficulté a été la structuration du fichier CSV de sortie pour qu'il soit à la fois exploitable dans un tableur et lisible en texte brut. L'ajout de séparateurs de sections textuels (=== LOT ===, === ETAGES ===, etc.) est un compromis qui facilite la compréhension sans perturber une importation automatisée, les en-têtes de colonnes étant systématiquement présents après chaque séparateur.</text:p>
      <text:p text:style-name="P12">Une autre difficulté a été la gestion de l'état courant de l'interface entre la prévisualisation du tableau et le déclenchement de l'export. Deux fonctions distinctes ont été créées à cet effet : getFiltersRender() ignore les cases à cocher pour la prévisualisation, tandis que getFilters() les inclut pour la génération du CSV.</text:p>
      <text:p text:style-name="P6"/>
      <text:p text:style-name="P6"/>
      <text:p text:style-name="P6"/>
      <text:p text:style-name="P6"/>
      <text:h text:style-name="Titre_20_1" text:outline-level="1">Conclusion</text:h>
      <text:p text:style-name="P12">Ce dossier présente l'ensemble des réalisations dont j'ai eu la responsabilité dans le cadre du projet Séchoir à Houblon. Les cinq sujets traités — service web, base de données, RTC, IHM de configuration et IHM d'export — forment un ensemble cohérent couvrant l'intégralité de la chaîne : de la configuration de l'infrastructure système jusqu'à l'interface utilisateur finale.</text:p>
      <text:p text:style-name="P15"><text:span text:style-name="T9">Les principales difficultés rencontrées ont été la gestion de la cohérence des données entre l'interface et la base, la structuration d'un fichier CSV lisible par différents outils, et l'adaptation au changement de matériel (Raspberry Pi 3 vers Pi 5) en cours de projet. Ces défis ont été surmontés grâce à une approche incrémentale et à une documentation rigoureuse de chaque étape.</text:span></text:p>
      <text:p text:style-name="Marginalia"/>
      <text:h text:style-name="P57" text:outline-level="1">Présentation du travail du candidat N°2 – Adam Cardoso</text:h>
      <text:p text:style-name="P58"/>
      <text:h text:style-name="Titre_20_1" text:outline-level="1">Introduction</text:h>
      <text:p text:style-name="P59"/>
      <text:h text:style-name="P60" text:outline-level="1">1. Présentation de ma mission individuellement</text:h>
      <text:p text:style-name="P59">Dans ce projet, ma mission portait principalement sur la mise en place de l’accès au système et le développement d’une partie de l’interface web utilisateur. Je me suis notamment chargé de la configuration réseau de la Raspberry Pi, du développement de la page web « Contrôler le séchage », de la page « Ajouter masse houblon » ainsi que de la mise en place d’un système d’alerte visuelle à l’aide d’un voyant lumineux.</text:p>
      <text:p text:style-name="P59"/>
      <text:h text:style-name="P61" text:outline-level="1">2. Déroulement des tâches réalisées</text:h>
      <text:p text:style-name="P62"/>
      <text:h text:style-name="Titre_20_1" text:outline-level="1"><text:span text:style-name="T20">3.</text:span> Conception du site web « Contrôler le séchage » - Structure HTML</text:h>
      <text:p text:style-name="P63">La première tâche que j’ai réalisé a été la création de la page « Contrôler le séchage » du site web. Dans un premier temps, avant toute intégration du langage PHP, j’ai travaillé sur le squelette de l’interface de contrôle du séchoir. Cette phase m’a permis d’expérimenter différentes dispositions possibles afin de déterminer comment organiser efficacement les éléments de la page (état du cycle, étages, variétés, dates, capteurs).</text:p>
      <text:p text:style-name="P63">Par exemple, chaque étage du séchoir est représenté par un bloc dédié dans la page HTML :</text:p>
      <text:p text:style-name="P63"/>
      <text:p text:style-name="P64"/>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Cette organisation permet une lecture claire et hiérarchisée des informations liées à chaque niveau du séchoir.</text:p>
      <text:h text:style-name="P65" text:outline-level="2"><text:span text:style-name="T21">3.1</text:span> Mise en forme et design – CSS</text:h>
      <text:p text:style-name="P66">Une fois la structure HTML finalisée, le CSS a été travaillé en collaboration avec un de mes camarades. Le design de l’interface n’étant attribué à aucun membre précis du groupe, nous avons défini ensemble la mise en forme générale (alignement des blocs, tailles de texte, hiérarchie visuelle). Cette étape a permis de rendre l’interface plus lisible et plus adaptée à une utilisation en tant qu’outil de supervision. <text:span text:style-name="T22">La partie CSS est divisée en plusieurs fichiers CSS et chacun de ces fichiers s’occupe d’un aspect du design. Par exemple, « info-block » qu’on voit à la ligne 12 de la capture est définit dans le fichier « gestion-card-content.css » par</text:span></text:p>
      <text:p text:style-name="P67"/>
      <text:p text:style-name="P68"><text:span text:style-name="T23">.info-block</text:span><text:span text:style-name="T24"> {</text:span></text:p>
      <text:p text:style-name="P69">  <text:span text:style-name="T25">background</text:span><text:span text:style-name="T26">: </text:span><text:span text:style-name="T27">var</text:span><text:span text:style-name="T26">(</text:span><text:span text:style-name="T25">--bg</text:span><text:span text:style-name="T26">);</text:span></text:p>
      <text:p text:style-name="P69">  <text:span text:style-name="T25">border</text:span><text:span text:style-name="T26">: </text:span><text:span text:style-name="T28">1px</text:span><text:span text:style-name="T26"> </text:span><text:span text:style-name="T29">solid</text:span><text:span text:style-name="T26"> </text:span><text:span text:style-name="T27">var</text:span><text:span text:style-name="T26">(</text:span><text:span text:style-name="T25">--border</text:span><text:span text:style-name="T26">);</text:span></text:p>
      <text:p text:style-name="P69">  <text:span text:style-name="T25">border-radius</text:span><text:span text:style-name="T26">: </text:span><text:span text:style-name="T28">4px</text:span><text:span text:style-name="T26">;</text:span></text:p>
      <text:p text:style-name="P69">  <text:span text:style-name="T25">padding</text:span><text:span text:style-name="T26">: </text:span><text:span text:style-name="T28">0.35rem</text:span><text:span text:style-name="T26"> </text:span><text:span text:style-name="T28">0.6rem</text:span><text:span text:style-name="T26">;</text:span></text:p>
      <text:p text:style-name="P69">  <text:span text:style-name="T25">height</text:span><text:span text:style-name="T26">: </text:span><text:span text:style-name="T28">100%</text:span><text:span text:style-name="T26">;</text:span></text:p>
      <text:p text:style-name="P70">}</text:p>
      <text:p text:style-name="P71"/>
      <text:p text:style-name="P71"/>
      <text:p text:style-name="P71"/>
      <text:p text:style-name="P71"/>
      <text:h text:style-name="P72" text:outline-level="2"><text:soft-page-break/><text:span text:style-name="T30">3.2 </text:span>Développement PHP</text:h>
      <text:p text:style-name="P73">Après avoir terminé la disposition de l’interface, j’ai travaillé sur la partie PHP afin de relier le site à la base de données. Le PHP permet de récupérer les informations stockées (étages actifs, variétés, dates, alertes) et de les transmettre à l’interface. Par exemple, le script get_status.php récupère les étages actifs ainsi que leurs informations associées grâce à une requête SQL :</text:p>
      <text:p text:style-name="P74"><text:span text:style-name="T31">SELECT</text:span> </text:p>
      <text:p text:style-name="P74">    houbEtag.houbEtag_etage <text:span text:style-name="T31">AS </text:span>etage,</text:p>
      <text:p text:style-name="P74">    houbVar.houbVar_type <text:span text:style-name="T31">AS </text:span>variete,</text:p>
      <text:p text:style-name="P74">    houbLot.houbLot_dateDebut <text:span text:style-name="T31">AS </text:span>date_debut,</text:p>
      <text:p text:style-name="P74">    houbLot.houbLot_dateFin <text:span text:style-name="T31">AS </text:span>date_fin</text:p>
      <text:p text:style-name="P74"><text:span text:style-name="T31">FROM </text:span>houbEtag</text:p>
      <text:p text:style-name="P74"><text:span text:style-name="T31">JOIN </text:span>houbLot <text:span text:style-name="T31">ON </text:span>houbLot.id_houbLot = houbEtag.houbEtag_houbLot</text:p>
      <text:p text:style-name="P74"><text:span text:style-name="T31">JOIN </text:span>houbVar <text:span text:style-name="T31">ON </text:span>houbVar.id_houbVar = houbLot.houbLot_houbVar</text:p>
      <text:p text:style-name="P74"><text:span text:style-name="T31">WHERE </text:span>houbEtag.houbEtag_actif = 1</text:p>
      <text:p text:style-name="P74"><text:span text:style-name="T31">ORDER BY </text:span>houbEtag.houbEtag_etage <text:span text:style-name="T31">ASC</text:span>;</text:p>
      <text:p text:style-name="P75"/>
      <text:p text:style-name="P75" loext:marker-style-name="T32"><text:span text:style-name="T32">Le PHP permet également de déterminer automatiquement l’état global du cycle de séchage :</text:span><text:span text:style-name="T32"/></text:p>
      <text:p text:style-name="P76" loext:marker-style-name="T32"/>
      <text:p text:style-name="P74" loext:marker-style-name="T32"><text:span text:style-name="T33">$etat_cycle </text:span><text:span text:style-name="T32">= </text:span><text:span text:style-name="T34">count</text:span><text:span text:style-name="T33">($etages</text:span><text:span text:style-name="T32">) &gt; 0 ? </text:span><text:span text:style-name="T35">"Actif" </text:span><text:span text:style-name="T32">: </text:span><text:span text:style-name="T35">"Inactif"</text:span><text:span text:style-name="T36">;</text:span></text:p>
      <text:p text:style-name="P77" loext:marker-style-name="T36"/>
      <text:p text:style-name="P73">Ces données sont ensuite envoyées au format JSON pour être exploitées côté client :</text:p>
      <text:p text:style-name="P73"/>
      <text:p text:style-name="P74" loext:marker-style-name="T32"><text:span text:style-name="T37">echo </text:span><text:span text:style-name="T34">json_encode</text:span><text:span text:style-name="T36">([</text:span></text:p>
      <text:p text:style-name="P74" loext:marker-style-name="T32"><text:span text:style-name="T36">    </text:span><text:span text:style-name="T35">"etat_cycle"</text:span><text:span text:style-name="T36"> =&gt; </text:span><text:span text:style-name="T33">$etat_cycle</text:span><text:span text:style-name="T36">,</text:span></text:p>
      <text:p text:style-name="P74" loext:marker-style-name="T32"><text:span text:style-name="T36">    </text:span><text:span text:style-name="T35">"derniere_alerte"</text:span><text:span text:style-name="T36"> =&gt; </text:span><text:span text:style-name="T33">$derniere_alerte</text:span><text:span text:style-name="T36">,</text:span></text:p>
      <text:p text:style-name="P74" loext:marker-style-name="T32"><text:span text:style-name="T36">    </text:span><text:span text:style-name="T35">"etages"</text:span><text:span text:style-name="T36"> =&gt; </text:span><text:span text:style-name="T33">$etages</text:span></text:p>
      <text:p text:style-name="P78">]);</text:p>
      <text:p text:style-name="P79"/>
      <text:h text:style-name="P80" text:outline-level="2"><text:soft-page-break/>3.3 Affichage des températures</text:h>
      <text:p text:style-name="P81">La page permet d’avoir un suivi en temps réel des températures. Ces températures sont récupérées directement depuis les capteurs via liaison série. L’affichage de ces températures se fait sur le dernier étage car les 6 capteurs sont placés dans cet étage. Cette partie est importante car elle permet à l’agriculteur de visualiser la répartition de la température à l’intérieur du séchoir et si la plage de température idéale est respectée.</text:p>
      <text:p text:style-name="P81"/>
      <text:h text:style-name="P80" text:outline-level="2">3.4 Gestion de la pause et de la reprise du séchoir</text:h>
      <text:p text:style-name="P81">Sur cette page, on peut retrouver au début juste en-dessous de l’état deux boutons qui servent à mettre pause et reprendre le cycle de séchage. <text:span text:style-name="T38">Cela permettra à l’agriculteur de mettre pause au cycle de séchage lorsqu’il voudra vérifier si son houblon est assez sec ou non. Ci-dessous, un aperçu de ce que propose la page web. Bien sûr, certaines fonctionnalités n’ont pas été faites par moi car nous avons dû travailler à deux sur cette page web.</text:span></text:p>
      <text:p text:style-name="P82"><draw:frame draw:style-name="fr3" draw:name="Image15" text:anchor-type="as-char" svg:width="18.602cm" svg:height="9.305cm" draw:z-index="20"><draw:image xlink:href="Pictures/10000001000009EF000004F883E8219C.png" xlink:type="simple" xlink:show="embed" xlink:actuate="onLoad" draw:mime-type="image/png"/></draw:frame></text:p>
      <text:p text:style-name="P81"/>
      <text:p text:style-name="P83">Les boutons Pause et Reprendre fonctionnent de la manière suivante :</text:p>
      <text:p text:style-name="P83"/>
      <text:p text:style-name="P83">Lorsque l’agriculteur appuie sur le bouton Pause, il déclenche un événement identifié par « id=btnPauseSechoir ». Au chargement de la page, le fichier GestionPAUSE.js a été exécuté. Donc dès que la page est prête, le bouton Pause est relié à sa fonction « pauseSechoir() ».</text:p>
      <text:p text:style-name="P83"/>
      <text:p text:style-name="P84"><text:span text:style-name="T39">document</text:span>.<text:span text:style-name="T40">addEventListener</text:span>(<text:span text:style-name="T41">"DOMContentLoaded"</text:span>, () <text:span text:style-name="T42">=&gt;</text:span> {</text:p>
      <text:p text:style-name="P85">    <text:span text:style-name="T43">const</text:span><text:span text:style-name="T26"> </text:span><text:span text:style-name="T44">btnPause</text:span><text:span text:style-name="T26"> </text:span><text:span text:style-name="T45">=</text:span><text:span text:style-name="T26"> </text:span><text:span text:style-name="T25">document</text:span><text:span text:style-name="T26">.</text:span><text:span text:style-name="T27">getElementById</text:span><text:span text:style-name="T26">(</text:span><text:span text:style-name="T29">"btnPauseSechoir"</text:span><text:span text:style-name="T26">);</text:span></text:p>
      <text:p text:style-name="P85">    <text:span text:style-name="T43">const</text:span><text:span text:style-name="T26"> </text:span><text:span text:style-name="T44">btnReprendre</text:span><text:span text:style-name="T26"> </text:span><text:span text:style-name="T45">=</text:span><text:span text:style-name="T26"> </text:span><text:span text:style-name="T25">document</text:span><text:span text:style-name="T26">.</text:span><text:span text:style-name="T27">getElementById</text:span><text:span text:style-name="T26">(</text:span><text:span text:style-name="T29">"btnReprendreSechoir"</text:span><text:span text:style-name="T26">);</text:span></text:p>
      <text:p text:style-name="P86"/>
      <text:p text:style-name="P85">    <text:span text:style-name="T46">if</text:span><text:span text:style-name="T26"> (</text:span><text:span text:style-name="T44">btnPause</text:span><text:span text:style-name="T26">) {</text:span></text:p>
      <text:p text:style-name="P85">        <text:span text:style-name="T44">btnPause</text:span><text:span text:style-name="T26">.</text:span><text:span text:style-name="T27">addEventListener</text:span><text:span text:style-name="T26">(</text:span><text:span text:style-name="T29">"click"</text:span><text:span text:style-name="T26">, </text:span><text:span text:style-name="T27">pauseSechoir</text:span><text:span text:style-name="T26">);</text:span></text:p>
      <text:p text:style-name="P85">    <text:span text:style-name="T26">}</text:span></text:p>
      <text:p text:style-name="P86"/>
      <text:p text:style-name="P85">    <text:span text:style-name="T46">if</text:span><text:span text:style-name="T26"> (</text:span><text:span text:style-name="T44">btnReprendre</text:span><text:span text:style-name="T26">) {</text:span></text:p>
      <text:p text:style-name="P85">        <text:span text:style-name="T44">btnReprendre</text:span><text:span text:style-name="T26">.</text:span><text:span text:style-name="T27">addEventListener</text:span><text:span text:style-name="T26">(</text:span><text:span text:style-name="T29">"click"</text:span><text:span text:style-name="T26">, </text:span><text:span text:style-name="T27">reprendreSechoir</text:span><text:span text:style-name="T26">);</text:span></text:p>
      <text:p text:style-name="P85">    <text:span text:style-name="T26">}</text:span></text:p>
      <text:p text:style-name="P87">});</text:p>
      <text:p text:style-name="P88"/>
      <text:p text:style-name="P83">Le fonctionnement est le même pour le bouton Reprendre avec un point différent qu’on va voir. <text:span text:style-name="T47">La fonction JavaScript envoie une requête vers le serveur. La requête est asynchrone et la page ne se recharge pas. Le serveur PHP prend le relais. La requête SQL exécuté est donc :</text:span></text:p>
      <text:p text:style-name="P83"/>
      <text:p text:style-name="P89"><text:span text:style-name="T31">UPDATE</text:span> etatSechoir</text:p>
      <text:p text:style-name="P90">SET</text:p>
      <text:p text:style-name="P91">    etatSechoir_status = 'pause',</text:p>
      <text:p text:style-name="P91">    etatSechoir_pauseDebut = NOW(),</text:p>
      <text:p text:style-name="P91">    etatSechoir_dataMaj = NOW()</text:p>
      <text:p text:style-name="P91"><text:span text:style-name="T31">WHERE</text:span> id_etatSechoir = 1</text:p>
      <text:p text:style-name="P92"><text:span text:style-name="T31">AND</text:span> etatSechoir_status != 'pause'</text:p>
      <text:p text:style-name="P93"/>
      <text:p text:style-name="P94">Cette requête passe le status du séchoir à « pause » et empêche la double pause grâce à</text:p>
      <text:p text:style-name="P95"><text:span text:style-name="T31">AND</text:span> etatSechoir_status!=’pause’</text:p>
      <text:p text:style-name="P93"/>
      <text:p text:style-name="P96">Deux réponse du serveurs vers le navigateur sont possibles :</text:p>
      <text:p text:style-name="P94">{</text:p>
      <text:p text:style-name="Standard">  "status": "ok"</text:p>
      <text:p text:style-name="Standard">}</text:p>
      <text:p text:style-name="P94">Ou :</text:p>
      <text:p text:style-name="P94">{</text:p>
      <text:p text:style-name="Standard">  "status": "ignored",</text:p>
      <text:p text:style-name="Standard">  "message": "Le séchoir est déjà en pause."</text:p>
      <text:p text:style-name="Standard">}</text:p>
      <text:p text:style-name="Standard"/>
      <text:p text:style-name="P85">        <text:span text:style-name="T43">const</text:span><text:span text:style-name="T26"> </text:span><text:span text:style-name="T44">data</text:span><text:span text:style-name="T26"> </text:span><text:span text:style-name="T45">=</text:span><text:span text:style-name="T26"> </text:span><text:span text:style-name="T46">await</text:span><text:span text:style-name="T26"> </text:span><text:span text:style-name="T44">res</text:span><text:span text:style-name="T26">.</text:span><text:span text:style-name="T27">json</text:span><text:span text:style-name="T26">();</text:span></text:p>
      <text:p text:style-name="P86"/>
      <text:p text:style-name="P85">        <text:span text:style-name="T46">if</text:span><text:span text:style-name="T26"> (</text:span><text:span text:style-name="T44">data</text:span><text:span text:style-name="T26">.</text:span><text:span text:style-name="T25">status</text:span><text:span text:style-name="T26"> </text:span><text:span text:style-name="T45">===</text:span><text:span text:style-name="T26"> </text:span><text:span text:style-name="T29">"ok"</text:span><text:span text:style-name="T26">) {</text:span></text:p>
      <text:p text:style-name="P85">            <text:span text:style-name="T25">console</text:span><text:span text:style-name="T26">.</text:span><text:span text:style-name="T27">log</text:span><text:span text:style-name="T26">(</text:span><text:span text:style-name="T29">"Séchoir repris"</text:span><text:span text:style-name="T26">);</text:span></text:p>
      <text:p text:style-name="P85">            <text:span text:style-name="T27">setPauseButtonsState</text:span><text:span text:style-name="T26">(</text:span><text:span text:style-name="T29">"en_cours"</text:span><text:span text:style-name="T26">);</text:span></text:p>
      <text:p text:style-name="P85">            <text:span text:style-name="T27">rafraichirStatus</text:span><text:span text:style-name="T26">();</text:span></text:p>
      <text:p text:style-name="P85">        <text:span text:style-name="T26">}</text:span></text:p>
      <text:p text:style-name="Standard"/>
      <text:p text:style-name="P94">Si la pause est acceptée, JavaScript considère que le séchoir est en pause et l’interface est mise à jour avec « rafraichirStatus() » qui est une fonction présente dans <text:span text:style-name="T48">un autre fichier et qui permet de relir l’état du séchoir en base de données.</text:span></text:p>
      <text:p text:style-name="P97"/>
      <text:p text:style-name="P98">Pour reprendre l’état du séchoir, ce qui change est la requête SQL qui sera donc :</text:p>
      <text:p text:style-name="P98"/>
      <text:p text:style-name="P92"><text:span text:style-name="T31">UPDATE</text:span> etatSechoir</text:p>
      <text:p text:style-name="P91"><text:span text:style-name="T31">SET</text:span> </text:p>
      <text:p text:style-name="P91">    etatSechoir_ajoutMinute = etatSechoir_ajoutMinute </text:p>
      <text:p text:style-name="P91">        + TIMESTAMPDIFF(MINUTE, etatSechoir_pauseDebut, NOW()),</text:p>
      <text:p text:style-name="P91">    etatSechoir_pauseDebut = NULL,</text:p>
      <text:p text:style-name="P91">    etatSechoir_status = 'en_cours',</text:p>
      <text:p text:style-name="P91">    etatSechoir_dataMaj = NOW()</text:p>
      <text:p text:style-name="P91"><text:span text:style-name="T31">WHERE</text:span> id_etatSechoir = 1</text:p>
      <text:p text:style-name="P91"><text:span text:style-name="T31">AND</text:span> etatSechoir_pauseDebut <text:span text:style-name="T31">IS</text:span> <text:span text:style-name="T31">NOT</text:span> <text:span text:style-name="T31">NULL</text:span></text:p>
      <text:p text:style-name="P91"><text:span text:style-name="T31">AND</text:span> etatSechoir_status = 'pause'</text:p>
      <text:p text:style-name="P93"/>
      <text:p text:style-name="P98">Cette requête va calculer le temps que le séchoir a été mis en pause grâce à la fonction TIMESTAMPDIFF afin d’éviter de compter le temps de pause comme du temps de séchage. Elle remet ensuite la date de début <text:s/>de pause à NULL et repasse l’état du séchoir à en_cours. </text:p>
      <text:p text:style-name="P93"/>
      <text:p text:style-name="P93"/>
      <text:p text:style-name="P94"/>
      <text:h text:style-name="P99" text:outline-level="1">4. Configuration du point d’accès Wi-Fi</text:h>
      <text:h text:style-name="P100" text:outline-level="2">4.1 Objectif de la configuration</text:h>
      <text:p text:style-name="P73">L’un des objectifs majeurs du projet est de permettre à l’agriculteur d’accéder au système de supervision du séchoir sans dépendre d’une connexion Internet. Pour répondre à ce besoin, la Raspberry Pi 5 a été configurée comme point d’accès Wi-Fi. Ce réseau permet à un smartphone de se connecter directement au séchoir et d’accéder au site web hébergé localement sur la Raspberry Pi. Cette solution présente plusieurs avantages :</text:p>
      <text:p text:style-name="P75" loext:marker-style-name="T32"><text:span text:style-name="T32">• autonomie complète du système,</text:span><text:span text:style-name="T32"/></text:p>
      <text:p text:style-name="P75" loext:marker-style-name="T32"><text:span text:style-name="T32">• simplicité d’utilisation pour l’utilisateur final,</text:span><text:span text:style-name="T32"/></text:p>
      <text:p text:style-name="P75" loext:marker-style-name="T32"><text:span text:style-name="T32">• fiabilité accrue en environnement agricole isolé.</text:span><text:span text:style-name="T32"/></text:p>
      <text:p text:style-name="P101"/>
      <text:h text:style-name="P100" text:outline-level="2">4.2 Installations des services nécessaires</text:h>
      <text:p text:style-name="P73">Afin de transformer la Raspberry en point d’accès Wi-Fi, deux services principaux ont été utilisés :</text:p>
      <text:p text:style-name="P75" loext:marker-style-name="T32"><text:span text:style-name="T32">• hostapd → permet de créer un point d’accès Wi-Fi</text:span><text:span text:style-name="T32"/></text:p>
      <text:p text:style-name="P75" loext:marker-style-name="T32"><text:span text:style-name="T32">• dnsmasq → gère l’attribution automatique des adresses IP (DHCP) et la résolution DNS locale</text:span><text:span text:style-name="T32"/></text:p>
      <text:p text:style-name="P73"/>
      <text:p text:style-name="P73">L’installation de ces services a été effectuée à l’aide du gestionnaire de paquets :</text:p>
      <text:p text:style-name="P74">1 <text:span text:style-name="T49">sudo </text:span>apt update</text:p>
      <text:p text:style-name="P74">2 <text:span text:style-name="T49">sudo apt install </text:span>hostapd dnsmasq <text:span text:style-name="T50">-y</text:span></text:p>
      <text:p text:style-name="P102" loext:marker-style-name="T51"/>
      <text:p text:style-name="P73">Par défaut, le service hostapd peut-être désactivé (masqué). Il a donc été nécessaire de le débloquer et de l’activer au démarrage :</text:p>
      <text:p text:style-name="P74">1 <text:span text:style-name="T49">sudo</text:span> systemctl unmask hostapd</text:p>
      <text:p text:style-name="P74">2 <text:span text:style-name="T49">sudo </text:span>systemctl enable hostapd</text:p>
      <text:p text:style-name="P74">3 <text:span text:style-name="T49">sudo </text:span>systemctl start hostapd</text:p>
      <text:p text:style-name="P101"/>
      <text:h text:style-name="P100" text:outline-level="2">4.3 Configuration du service hostapd</text:h>
      <text:h text:style-name="P103" text:outline-level="3">Création du fichier de configuration</text:h>
      <text:p text:style-name="P73">Le fichier de configuration principal de hostapd a été créé afin de définir les paramètres du réseau Wi-Fi diffusé par la Raspberry :</text:p>
      <text:p text:style-name="P74" loext:marker-style-name="T32"><text:span text:style-name="T32">1 </text:span><text:span text:style-name="T52">sudo nano </text:span><text:span text:style-name="T32">/etc/hostapd/hostapd.conf</text:span></text:p>
      <text:p text:style-name="P75" loext:marker-style-name="T32"/>
      <text:p text:style-name="P73" loext:marker-style-name="T51"><text:span text:style-name="T51">Configuration utilisée :</text:span><text:span text:style-name="T51"/></text:p>
      <text:p text:style-name="P74">1 <text:span text:style-name="T50">interface</text:span>=wlan0</text:p>
      <text:p text:style-name="P74">2 <text:span text:style-name="T50">driver</text:span>=nl80211</text:p>
      <text:p text:style-name="P74">3 <text:span text:style-name="T50">ssid</text:span>=MonWiFiPi</text:p>
      <text:p text:style-name="P74">4 <text:span text:style-name="T50">hw_mode</text:span>=g</text:p>
      <text:p text:style-name="P74">5 <text:span text:style-name="T50">channel</text:span>=7</text:p>
      <text:p text:style-name="P74">6</text:p>
      <text:p text:style-name="P74">7 <text:span text:style-name="T50">auth_algs</text:span>=1</text:p>
      <text:p text:style-name="P74">8 <text:span text:style-name="T50">ignore_broadcast_ssid</text:span>=0</text:p>
      <text:p text:style-name="P74">9</text:p>
      <text:p text:style-name="P74">10 <text:span text:style-name="T50">wpa</text:span>=2</text:p>
      <text:p text:style-name="P74">11 <text:span text:style-name="T50">wpa_passphrase</text:span>=motdepasse123</text:p>
      <text:p text:style-name="P74">12 <text:span text:style-name="T50">wpa_key_mgmt</text:span>=WPA-PSK</text:p>
      <text:p text:style-name="P74" loext:marker-style-name="T32"><text:span text:style-name="T32">13 </text:span><text:span text:style-name="T53">rsn_pairwise</text:span><text:span text:style-name="T32">=CCMP</text:span></text:p>
      <text:p text:style-name="P76" loext:marker-style-name="T32"><text:soft-page-break/></text:p>
      <text:p text:style-name="P73">Cette configuration permet :</text:p>
      <text:p text:style-name="P75" loext:marker-style-name="T32"><text:span text:style-name="T32">• la diffusion du réseau Wi-Fi « MonWifiPi »,</text:span><text:span text:style-name="T32"/></text:p>
      <text:p text:style-name="P75" loext:marker-style-name="T32"><text:span text:style-name="T32">• une sécurisation via le protocole WPA2,</text:span><text:span text:style-name="T32"/></text:p>
      <text:p text:style-name="P76" loext:marker-style-name="T32">• une compatibilité avec les téléphones et appareils mobiles.</text:p>
      <text:p text:style-name="P76" loext:marker-style-name="T32"/>
      <text:h text:style-name="P104" text:outline-level="3">Déclaration du fichier de configuration</text:h>
      <text:p text:style-name="P73">Le chemin du fichier de configuration a ensuite été associé au service hostapd :</text:p>
      <text:p text:style-name="P74" loext:marker-style-name="T32"><text:span text:style-name="T32">1 </text:span><text:span text:style-name="T52">sudo nano </text:span><text:span text:style-name="T32">/etc/default/hostapd</text:span></text:p>
      <text:p text:style-name="P73"/>
      <text:p text:style-name="P73">Ajout de la ligne suivante :</text:p>
      <text:p text:style-name="P74" loext:marker-style-name="T32"><text:span text:style-name="T32">1 </text:span><text:span text:style-name="T53">DAEMON_CONF</text:span><text:span text:style-name="T32">=</text:span><text:span text:style-name="T54">"/etc/hostapd/hostapd.conf"</text:span></text:p>
      <text:p text:style-name="P105" loext:marker-style-name="T32"/>
      <text:h text:style-name="Titre_20_2" text:outline-level="2"><text:span text:style-name="T55">4.4 </text:span>Attribution d’une adresse IP statique</text:h>
      <text:p text:style-name="P73">Pour assurer la stabilité du réseau et permettre la résolution DNS locale, une adresse IP statique a été attribuée à l’interface Wi-Fi wlan0 :</text:p>
      <text:p text:style-name="P74">1 <text:span text:style-name="T49">sudo ip </text:span>addr <text:span text:style-name="T49">add </text:span>192.168.1.254/24 dev wlan0</text:p>
      <text:p text:style-name="P74">2 <text:span text:style-name="T49">sudo ip link set </text:span>wlan0 up</text:p>
      <text:p text:style-name="P102" loext:marker-style-name="T51"/>
      <text:p text:style-name="P73">Cette adresse correspond à la passerelle du réseau local Wi-Fi utilisé par le hotspot.</text:p>
      <text:p text:style-name="P106"/>
      <text:h text:style-name="P107" text:outline-level="2">4.5 Configuration du service dnsmasq</text:h>
      <text:h text:style-name="P104" text:outline-level="3">Sauvegarde de l’ancienne configuration</text:h>
      <text:p text:style-name="P73">Avant toute modification, le fichier de configuration initial a été sauvegardé :</text:p>
      <text:p text:style-name="P74" loext:marker-style-name="T32"><text:span text:style-name="T32">1 </text:span><text:span text:style-name="T52">sudo mv </text:span><text:span text:style-name="T32">/etc/dnsmasq.conf /etc/dnsmasq.conf.backup</text:span></text:p>
      <text:p text:style-name="P106"/>
      <text:h text:style-name="P104" text:outline-level="3">Création de la nouvelle configuration</text:h>
      <text:p text:style-name="P73">Un nouveau fichier a ensuite été créé :</text:p>
      <text:p text:style-name="P74" loext:marker-style-name="T32"><text:span text:style-name="T32">1 </text:span><text:span text:style-name="T52">sudo</text:span><text:span text:style-name="T32"> </text:span><text:span text:style-name="T52">nano</text:span><text:span text:style-name="T32"> /etc/dnsmasq.conf</text:span></text:p>
      <text:p text:style-name="P73"/>
      <text:p text:style-name="P73">Configuration appliquée :</text:p>
      <text:p text:style-name="P74" loext:marker-style-name="T32"><text:span text:style-name="T53">interface</text:span><text:span text:style-name="T32">=wlan0</text:span></text:p>
      <text:p text:style-name="P74" loext:marker-style-name="T32"><text:span text:style-name="T53">dhcp-range</text:span><text:span text:style-name="T32">=192.168.1.2,192.168.1.20,255.255.255.0,24h</text:span></text:p>
      <text:p text:style-name="P108" loext:marker-style-name="T32"/>
      <text:p text:style-name="P74" loext:marker-style-name="T56"><text:span text:style-name="T56"># Nom local pour accéder à la Raspberry Pi</text:span><text:span text:style-name="T56"/></text:p>
      <text:p text:style-name="P74" loext:marker-style-name="T32"><text:span text:style-name="T53">address</text:span><text:span text:style-name="T32">=/monpi.local/192.168.1.254</text:span></text:p>
      <text:p text:style-name="P73"/>
      <text:p text:style-name="P73">Cette configuration permet : </text:p>
      <text:p text:style-name="P75" loext:marker-style-name="T32"><text:span text:style-name="T32">• l’attribution automatique d’adresses IP aux appareils connectés,</text:span><text:span text:style-name="T32"/></text:p>
      <text:p text:style-name="P75" loext:marker-style-name="T32"><text:span text:style-name="T32">• l’accès au serveur web via le nom monpi.local, plus simple à retenir qu’une adresse IP.</text:span><text:span text:style-name="T32"/></text:p>
      <text:p text:style-name="P73"/>
      <text:p text:style-name="P73">Le service a ensuite été redémarré et activé au démarrage :</text:p>
      <text:p text:style-name="P74">1 <text:span text:style-name="T49">sudo</text:span> systemctl restart dnsmasq</text:p>
      <text:p text:style-name="P74">2 <text:span text:style-name="T49">sudo</text:span> systemctl enable dnsmasq</text:p>
      <text:p text:style-name="P75"/>
      <text:p text:style-name="P75"/>
      <text:h text:style-name="P107" text:outline-level="2"><text:soft-page-break/>4.6 Gestion de NetworkManager</text:h>
      <text:p text:style-name="P73">Sur les versions récentes de Raspberry Pi OS, NetworkManager peut interférer avec le fonctionnement de hostapd. Il a donc été nécessaire de déclarer l’interface wlan0 comme non gérée :</text:p>
      <text:p text:style-name="P74" loext:marker-style-name="T32"><text:span text:style-name="T32">1 </text:span><text:span text:style-name="T52">sudo nano</text:span><text:span text:style-name="T32"> /etc/NetworkManager/NetworkManager.conf</text:span></text:p>
      <text:p text:style-name="P73"/>
      <text:p text:style-name="P73">Ajout de la configuration suivante :</text:p>
      <text:p text:style-name="P74">1 <text:span text:style-name="T57">[keyfile]</text:span></text:p>
      <text:p text:style-name="P74"><text:span text:style-name="T55">2 </text:span><text:span text:style-name="T57">unmanaged-devices</text:span>=interface-name:wlan0</text:p>
      <text:p text:style-name="P102" loext:marker-style-name="T51"/>
      <text:p text:style-name="P73">Puis redémarrage du service :</text:p>
      <text:p text:style-name="P74" loext:marker-style-name="T32"><text:span text:style-name="T32">1 </text:span><text:span text:style-name="T52">sudo</text:span><text:span text:style-name="T32"> systemctl restart NetworkManager</text:span></text:p>
      <text:p text:style-name="P76" loext:marker-style-name="T32"/>
      <text:h text:style-name="P109" text:outline-level="2">4.7 Démarrage du point d’accès</text:h>
      <text:p text:style-name="P73">Une fois l’ensemble des services configurés, le hotspot a été démarré :</text:p>
      <text:p text:style-name="P74">1 <text:span text:style-name="T49">sudo</text:span> systemctl restart hostapd</text:p>
      <text:p text:style-name="P74">2 <text:span text:style-name="T49">sudo</text:span> systemctl restart dnsmasq</text:p>
      <text:p text:style-name="P102" loext:marker-style-name="T51"/>
      <text:p text:style-name="P73">Les statuts ont été vérifiés afin de s’assurer du bon fonctionnement :</text:p>
      <text:p text:style-name="P74">1 <text:span text:style-name="T49">sudo</text:span> systemctl status hostapd</text:p>
      <text:p text:style-name="P74">2 <text:span text:style-name="T49">sudo</text:span> systemctl status dnsmasq</text:p>
      <text:p text:style-name="P75"/>
      <text:h text:style-name="P109" text:outline-level="2">4.8 Accès au serveur web depuis un smartphone</text:h>
      <text:p text:style-name="P73">Après connexion au réseau MonWifiPi, le téléphone reçoit automatiquement une adresse IP. Le serveur web local est accessible depuis un navigateur via l’adresse <text:span text:style-name="Internet_20_link"><text:span text:style-name="T58">http://monpi.local</text:span></text:span> . Dans le cas d’un serveur PHP intégré :</text:p>
      <text:p text:style-name="P75" loext:marker-style-name="T32"><text:span text:style-name="T32">Php -S 0.0.0.0:8080</text:span><text:span text:style-name="T32"/></text:p>
      <text:p text:style-name="P73"/>
      <text:p text:style-name="P73">L’accès se fait alors via :</text:p>
      <text:p text:style-name="P75" loext:marker-style-name="T32"><text:span text:style-name="Internet_20_link"><text:span text:style-name="T58">http://monpi.local:8080</text:span></text:span><text:span text:style-name="T58"/></text:p>
      <text:p text:style-name="P110"/>
      <text:h text:style-name="P109" text:outline-level="2">4.9 Problèmes rencontrés et solutions apportées</text:h>
      <text:p text:style-name="P73">Plusieurs difficultés ont été rencontrées lors de la configuration, notamment :</text:p>
      <text:p text:style-name="P75" loext:marker-style-name="T32"><text:span text:style-name="T32">• hostapd masqué par défaut,</text:span><text:span text:style-name="T32"/></text:p>
      <text:p text:style-name="P75" loext:marker-style-name="T32"><text:span text:style-name="T32">• conflits avec NetworkManager,</text:span><text:span text:style-name="T32"/></text:p>
      <text:p text:style-name="P75" loext:marker-style-name="T32"><text:span text:style-name="T32">• absence d’attribution d’adresse IP aux clients Wi-Fi.</text:span><text:span text:style-name="T32"/></text:p>
      <text:p text:style-name="P76" loext:marker-style-name="T32"/>
      <text:p text:style-name="P73">Ces problèmes ont été résolus par :</text:p>
      <text:p text:style-name="P75" loext:marker-style-name="T32"><text:span text:style-name="T32">• le déblocage manuel du service hostapd,</text:span><text:span text:style-name="T32"/></text:p>
      <text:p text:style-name="P75" loext:marker-style-name="T32"><text:span text:style-name="T32">• la déclaration de wlan0 comme interface non gérée,</text:span><text:span text:style-name="T32"/></text:p>
      <text:p text:style-name="P75" loext:marker-style-name="T32"><text:span text:style-name="T32">• la vérification de la cohérence entre l’IP statique et la plage DHCP.</text:span><text:span text:style-name="T32"/></text:p>
      <text:p text:style-name="P110"/>
      <text:h text:style-name="P109" text:outline-level="2">4.91 Résultat final</text:h>
      <text:p text:style-name="P73">A l’issue de cette configuration : </text:p>
      <text:p text:style-name="P75" loext:marker-style-name="T32"><text:span text:style-name="T32">• la Raspberry Pi 5 diffuse automatiquement le réseau Wi-Fi « MonWifiPi »</text:span><text:span text:style-name="T32"/></text:p>
      <text:p text:style-name="P75" loext:marker-style-name="T32"><text:span text:style-name="T32">• les appareils connectés obtiennent une adresse IP via dnsmasq,</text:span><text:span text:style-name="T32"/></text:p>
      <text:p text:style-name="P75" loext:marker-style-name="T32"><text:span text:style-name="T32">• le site web du séchoir est accessible via </text:span><text:span text:style-name="Internet_20_link"><text:span text:style-name="T58">http://monpi.local</text:span></text:span><text:span text:style-name="T32">,</text:span></text:p>
      <text:p text:style-name="P75" loext:marker-style-name="T32"><text:span text:style-name="T32">• le hotspot démarre automatiquement au démarrage de la Raspberry.</text:span></text:p>
      <text:p text:style-name="P73"><text:soft-page-break/>Cette solution répond pleinement au besoin d’autonomie et de simplicité d’accès du projet.</text:p>
      <text:h text:style-name="P111" text:outline-level="1">5. Conception de la page « Ajouter masse houblon »</text:h>
      <text:h text:style-name="P109" text:outline-level="2">5.1 Objectif de la page</text:h>
      <text:p text:style-name="P112">La page « Ajouter masse houblon » a été développé afin de permettre à l’agriculteur d’enregistrer la masse finale de houblon après séchage.<text:line-break/><text:line-break/>En effet, une fois le cycle de séchage terminé, l’agriculteur pèse la production et souhaite :<text:line-break/>• Associer une masse finale à un ou plusieurs lots,<text:line-break/>• Conserver une trace de cette masse en base de données,<text:line-break/>• Centraliser ces informations pour un suivi ultérieur.<text:line-break/><text:line-break/>Cette page constitue donc une étape importante dans le cycle de production, permettant de passer d’un suivi du séchage à un suivi des résultats.</text:p>
      <text:p text:style-name="P112"><draw:frame draw:style-name="fr4" draw:name="Image14" text:anchor-type="as-char" svg:width="18.602cm" svg:height="4.149cm" draw:z-index="19"><draw:image xlink:href="Pictures/10000001000004AD0000010B23CBCC8A.png" xlink:type="simple" xlink:show="embed" xlink:actuate="onLoad" draw:mime-type="image/png"/></draw:frame></text:p>
      <text:h text:style-name="P113" text:outline-level="2">5.2 Architecture générale de la page</text:h>
      <text:p text:style-name="P114">La page repose sur une architecture classique client / serveur :</text:p>
      <text:p text:style-name="P114">• Front-End (côté client) :</text:p>
      <text:p text:style-name="P114"><text:tab/>• Interface HTML générée par PHP</text:p>
      <text:p text:style-name="P114"><text:tab/>• Interactions dynamiques en JavaScript (ajout_masse.js)</text:p>
      <text:p text:style-name="P114"/>
      <text:p text:style-name="P114">• Back-End (côté serveur) :</text:p>
      <text:p text:style-name="P114"><text:tab/>• Traitement des données en PHP</text:p>
      <text:p text:style-name="P114"><text:tab/>• Interactions avec la base de données MySQL via PDO</text:p>
      <text:p text:style-name="P114"/>
      <text:p text:style-name="P114">Cette séparation permet :</text:p>
      <text:p text:style-name="P114">• Une interface réactive côté utilisateur,</text:p>
      <text:p text:style-name="P114">• Un traitement sécurisé côté serveur,</text:p>
      <text:p text:style-name="P114">• Une maintenance facilitée.</text:p>
      <text:p text:style-name="P114"/>
      <text:h text:style-name="P113" text:outline-level="2">5.3 Interface utilisateur</text:h>
      <text:p text:style-name="P114">L’interface est organisée en deux parties principales :</text:p>
      <text:p text:style-name="P114"/>
      <text:h text:style-name="P115" text:outline-level="3">Sélection des lots</text:h>
      <text:p text:style-name="P114">La partie gauche de l’interface affiche la liste des lots disponibles. Ces lots sont récupérés dynamiquement depuis la base de données via une requête SQL :</text:p>
      <text:p text:style-name="P114"/>
      <text:p text:style-name="P116"/>
      <text:p text:style-name="P116"/>
      <text:p text:style-name="P116"/>
      <text:p text:style-name="P117"><text:soft-page-break/><text:span text:style-name="T31">SELECT</text:span> lot.id_lot, variete.variete_nom</text:p>
      <text:p text:style-name="P91"><text:span text:style-name="T31">FROM</text:span> lot</text:p>
      <text:p text:style-name="P91"><text:span text:style-name="T31">INNER</text:span> <text:span text:style-name="T31">JOIN</text:span> variete <text:span text:style-name="T31">ON</text:span> lot.id_variete = variete.id_variete</text:p>
      <text:p text:style-name="P91"><text:span text:style-name="T31">WHERE</text:span> lot.id_masse <text:span text:style-name="T31">IS</text:span> <text:span text:style-name="T31">NULL</text:span></text:p>
      <text:p text:style-name="P91"><text:span text:style-name="T31">AND</text:span> lot.lot_dateHeureSortie <text:span text:style-name="T31">IS</text:span> <text:span text:style-name="T31">NOT</text:span> <text:span text:style-name="T31">NULL</text:span></text:p>
      <text:p text:style-name="Standard"/>
      <text:p text:style-name="P114">Cette requête permet de :</text:p>
      <text:p text:style-name="P114">• Afficher uniquement les lots ayant terminé leur séchage,<text:line-break/>• Exclure ceux déjà associés à une masse.</text:p>
      <text:p text:style-name="P114"/>
      <text:p text:style-name="P114">L’utilisateur peut sélectionner un ou plusieurs lots via des cases à cocher.</text:p>
      <text:p text:style-name="P114"/>
      <text:h text:style-name="P115" text:outline-level="3">Saisie de la masse</text:h>
      <text:p text:style-name="P114">Sur la partie drotie, un champ de saisie permet à l’utilisateur d’entrer la masse totale en kilogrammes.</text:p>
      <text:p text:style-name="P114"/>
      <text:p text:style-name="P114">Des contrôles sont appliqués directement en Javascript afin de garantir la validité des données :</text:p>
      <text:p text:style-name="P114">• Autorisation uniquement des nombres,</text:p>
      <text:p text:style-name="P114">• Limitations à 2 chiffres après la virgule.</text:p>
      <text:p text:style-name="P114"/>
      <text:p text:style-name="P114">Exemple :</text:p>
      <text:p text:style-name="P114">if (!/^\d*\.?\d{0,2}$/.test(valeur))</text:p>
      <text:p text:style-name="Standard"/>
      <text:p text:style-name="P114">Cela permet d’éviter des erreurs de saisie dès l’interface utilisateur.</text:p>
      <text:p text:style-name="P114"/>
      <text:h text:style-name="P115" text:outline-level="3">Interaction et validation des données</text:h>
      <text:p text:style-name="P114">Lors du clic sur le bouton « Ajouter la masse », plusieurs vérifications sont effectuées côté client :</text:p>
      <text:p text:style-name="P114">• Au moins un lot doit être sélectionné,</text:p>
      <text:p text:style-name="P114">• La masse doit être valide (format numérique avec 2 décimales maximum).</text:p>
      <text:p text:style-name="P114"/>
      <text:p text:style-name="P114">En cas d’erreur, un message est affiché à l’utilisateur sous forme d’alerte.</text:p>
      <text:p text:style-name="P114"/>
      <text:h text:style-name="P118" text:outline-level="3">Système de confirmation</text:h>
      <text:p text:style-name="P119">Avant l’envoi des données, une fenêtre de confirmation (overlay) est affichée. Cette fenêtre permet à l’utilisateur de :</text:p>
      <text:p text:style-name="P119">• Vérifier les lots sélectionnés,</text:p>
      <text:p text:style-name="P119">• Vérifier la masse saisie,</text:p>
      <text:p text:style-name="P119">• Confirmer ou annuler l’opération.</text:p>
      <text:p text:style-name="P119"/>
      <text:p text:style-name="P119">Cette étape améliore la fiabilité du système en évitant les erreurs de validation accidentelles.</text:p>
      <text:p text:style-name="P119"/>
      <text:h text:style-name="P118" text:outline-level="3">Envoi des données au serveur</text:h>
      <text:p text:style-name="P119">Une fois confirmées, les données sont envoyées au serveur via une requête AJAX utilisant l’API Fetch :</text:p>
      <text:p text:style-name="P114"/>
      <text:p text:style-name="P120"><text:span text:style-name="T40">fetch</text:span>(<text:span text:style-name="T41">"/site/ajout_masse.php"</text:span>, {</text:p>
      <text:p text:style-name="P121">    <text:span text:style-name="T25">method:</text:span><text:span text:style-name="T26"> </text:span><text:span text:style-name="T29">"POST"</text:span><text:span text:style-name="T26">,</text:span></text:p>
      <text:p text:style-name="P121">    <text:span text:style-name="T25">headers:</text:span><text:span text:style-name="T26"> {</text:span></text:p>
      <text:p text:style-name="P121">        <text:span text:style-name="T29">"Content-Type"</text:span><text:span text:style-name="T25">:</text:span><text:span text:style-name="T26"> </text:span><text:span text:style-name="T29">"application/json"</text:span></text:p>
      <text:p text:style-name="P121">    <text:span text:style-name="T26">},</text:span></text:p>
      <text:p text:style-name="P121">    <text:span text:style-name="T25">body:</text:span><text:span text:style-name="T26"> </text:span><text:span text:style-name="T25">JSON</text:span><text:span text:style-name="T26">.</text:span><text:span text:style-name="T27">stringify</text:span><text:span text:style-name="T26">({</text:span></text:p>
      <text:p text:style-name="P121">        <text:span text:style-name="T25">masse:</text:span><text:span text:style-name="T26"> </text:span><text:span text:style-name="T25">masseSelectionnee</text:span><text:span text:style-name="T26">,</text:span></text:p>
      <text:p text:style-name="P121"><text:soft-page-break/>        <text:span text:style-name="T25">id_lots:</text:span><text:span text:style-name="T26"> </text:span><text:span text:style-name="T25">lotsSelectionnes</text:span><text:span text:style-name="T26">.</text:span><text:span text:style-name="T27">map</text:span><text:span text:style-name="T26">(</text:span><text:span text:style-name="T25">lot</text:span><text:span text:style-name="T26"> </text:span><text:span text:style-name="T43">=&gt;</text:span><text:span text:style-name="T26"> </text:span><text:span text:style-name="T25">lot</text:span><text:span text:style-name="T26">.</text:span><text:span text:style-name="T25">id</text:span><text:span text:style-name="T26">)</text:span></text:p>
      <text:p text:style-name="P121">    <text:span text:style-name="T26">})</text:span></text:p>
      <text:p text:style-name="P122">})</text:p>
      <text:p text:style-name="P123"/>
      <text:p text:style-name="P124">Cette approche présente plusieurs avantages :</text:p>
      <text:p text:style-name="P124">• Pas de rechargement de la page,</text:p>
      <text:p text:style-name="P124">• Meilleure expérience utilisateur,</text:p>
      <text:p text:style-name="P124">• Communication structurée en JSON</text:p>
      <text:p text:style-name="P123"/>
      <text:h text:style-name="Titre_20_2" text:outline-level="2"><text:span text:style-name="T59">5.4 </text:span>Traitement côté serveur (PHP)</text:h>
      <text:p text:style-name="P119">Le fichier PHP reçoit les données envoyées par le client et les traite en plusieurs étapes.</text:p>
      <text:p text:style-name="P119"/>
      <text:h text:style-name="P118" text:outline-level="3">Validation des données</text:h>
      <text:p text:style-name="P119">Le serveur vérifie :</text:p>
      <text:p text:style-name="P119">• Que la masse est bien définie et respecte le format attendu,</text:p>
      <text:p text:style-name="P119">• Que les identifiants des lots sont valides.</text:p>
      <text:p text:style-name="P119"/>
      <text:p text:style-name="P119">Exemple :</text:p>
      <text:p text:style-name="P125"/>
      <text:p text:style-name="P126"><text:span text:style-name="T46">if</text:span><text:span text:style-name="T45"> (</text:span><text:span text:style-name="T25">$masse</text:span><text:span text:style-name="T45"> === </text:span><text:span text:style-name="T43">null</text:span><text:span text:style-name="T45"> || !</text:span><text:span text:style-name="T27">preg_match</text:span><text:span text:style-name="T45">(</text:span><text:span text:style-name="T60">'/</text:span><text:span text:style-name="T45">^</text:span><text:span text:style-name="T61">\d</text:span><text:span text:style-name="T45">+</text:span><text:span text:style-name="T60">(</text:span><text:span text:style-name="T61">\.\d</text:span><text:span text:style-name="T60">{1,2})?</text:span><text:span text:style-name="T45">$</text:span><text:span text:style-name="T60">/'</text:span><text:span text:style-name="T45">, </text:span><text:span text:style-name="T25">$masse</text:span><text:span text:style-name="T45">))</text:span></text:p>
      <text:p text:style-name="P127"/>
      <text:p text:style-name="P128">Cette validation côté serveur est essentielle pour éviter :</text:p>
      <text:p text:style-name="P128">• Les erreurs de saisies,</text:p>
      <text:p text:style-name="P128">• Les injections malveillantes.</text:p>
      <text:p text:style-name="P129"/>
      <text:h text:style-name="P130" text:outline-level="2">5.5 Insertion en base de données</text:h>
      <text:p text:style-name="P128">Le traitement est réalisé dans une transaction SQL, garantissant la cohérence des données.</text:p>
      <text:p text:style-name="P128"/>
      <text:p text:style-name="P128">Etapes réalisées :</text:p>
      <text:p text:style-name="P128">1. Insertion de la masse :</text:p>
      <text:p text:style-name="P128"/>
      <text:p text:style-name="P131"><text:span text:style-name="T31">INSERT</text:span> <text:span text:style-name="T31">INTO</text:span> masse (masse_masse, masse_dateHeure)</text:p>
      <text:p text:style-name="P91"><text:span text:style-name="T31">VALUES</text:span> (:masse, NOW())</text:p>
      <text:p text:style-name="P128"/>
      <text:p text:style-name="P128">2. Récupération de l’identifiant de la masse et association de cette masse au lots sélectionnés :</text:p>
      <text:p text:style-name="P128"/>
      <text:p text:style-name="P131"><text:span text:style-name="T31">UPDATE</text:span> lot</text:p>
      <text:p text:style-name="P131"><text:span text:style-name="T31">SET</text:span> id_masse = ?</text:p>
      <text:p text:style-name="P131"><text:span text:style-name="T31">WHERE</text:span> id_lot <text:span text:style-name="T31">IN</text:span> (…)</text:p>
      <text:p text:style-name="P128"/>
      <text:p text:style-name="P128">La transaction permet de :</text:p>
      <text:p text:style-name="P128">• Garantir que toutes les opérations réussissent ou échouent ensemble,</text:p>
      <text:p text:style-name="P128">• Eviter les incohérences en base de données.</text:p>
      <text:p text:style-name="P128"/>
      <text:h text:style-name="P132" text:outline-level="2">5.6 Gestion des réponses serveur</text:h>
      <text:p text:style-name="P133">Le serveur renvoie une réponse au format JSON :</text:p>
      <text:p text:style-name="P133"/>
      <text:p text:style-name="P133"/>
      <text:p text:style-name="P133"/>
      <text:p text:style-name="P133"><text:soft-page-break/>{</text:p>
      <text:p text:style-name="Standard">  "success": true,</text:p>
      <text:p text:style-name="Standard">  "message": "Masse ajoutée avec succès."</text:p>
      <text:p text:style-name="Standard">}</text:p>
      <text:p text:style-name="P133"/>
      <text:p text:style-name="P133">Côté JavaScript :</text:p>
      <text:p text:style-name="P133">• La réponse est analysée,</text:p>
      <text:p text:style-name="P133">• Un message est affiché à l’utilisateur,</text:p>
      <text:p text:style-name="P133">• L’interface est réinitialisée en cas de succès.</text:p>
      <text:p text:style-name="P133"/>
      <text:p text:style-name="P133"/>
      <text:h text:style-name="P134" text:outline-level="2">5.7 Réinitialisation de l’interface</text:h>
      <text:p text:style-name="P135">Après un enregistrement réussi :</text:p>
      <text:p text:style-name="P135">• Le champ de saisie est vidé,</text:p>
      <text:p text:style-name="P135">• Les lots sont désélectionnés,</text:p>
      <text:p text:style-name="P135">• La fenêtre de confirmation est fermée.</text:p>
      <text:p text:style-name="P135"/>
      <text:p text:style-name="P135">Cela permet à l’utilisateur de réaliser une nouvelle saisie rapidement.</text:p>
      <text:p text:style-name="P135"/>
      <text:h text:style-name="P134" text:outline-level="2">5.8 Bilan de la conception</text:h>
      <text:p text:style-name="P135">La page « Ajouter masse houblon » permet de répondre efficacement au besoin de suivi de production de l’agriculteur.</text:p>
      <text:p text:style-name="P135"/>
      <text:p text:style-name="P135">Elle offre :</text:p>
      <text:p text:style-name="P135">• Une interface claire et intuitive,</text:p>
      <text:p text:style-name="P135">• Une validation robuste des données,</text:p>
      <text:p text:style-name="P135">• Une interaction fluide avec la base de données,</text:p>
      <text:p text:style-name="P135">• Une bonne séparation entre interface et traitement.</text:p>
      <text:p text:style-name="P136"/>
      <text:h text:style-name="P137" text:outline-level="1">6. Choix et mise en place du voyant lumineux</text:h>
      <text:p text:style-name="P138">Une alerte visuelle doit être mise en place afin d’alerter l’agriculteur de la fin d’un cycle de séchage. </text:p>
      <text:p text:style-name="P138">Le voyant lumineux doit respecter les critères suivants selon le cahier des charges :</text:p>
      <text:p text:style-name="P138">• Visibilité suffisante dans un environnement lumineux</text:p>
      <text:p text:style-name="P138">• Compatibilité avec la Raspberry Pi 5 fournies</text:p>
      <text:p text:style-name="P138">• Fiabilité sur de longues durées de fonctionnement</text:p>
      <text:p text:style-name="P138">• Consommation électrique faible.</text:p>
      <text:p text:style-name="P138"/>
      <text:h text:style-name="P139" text:outline-level="2">6.1 Choix du voyant</text:h>
      <text:p text:style-name="P140">J’ai repéré trois choix lors de ma recherche :</text:p>
      <text:p text:style-name="P141"/>
      <text:p text:style-name="P141"/>
      <text:p text:style-name="P141"/>
      <text:p text:style-name="P141"/>
      <text:p text:style-name="P141"/>
      <text:p text:style-name="P141"/>
      <text:p text:style-name="P141"/>
      <text:p text:style-name="P141"/>
      <text:p text:style-name="P142"/>
      <table:table table:name="Tableau8" table:style-name="Tableau8">
        <table:table-column table:style-name="Tableau8.A" table:number-columns-repeated="3"/>
        <table:table-column table:style-name="Tableau8.D"/>
        <table:table-row>
          <table:table-cell table:style-name="Tableau8.A1" office:value-type="string">
            <text:p text:style-name="P143">N<text:span text:style-name="T62">om</text:span></text:p>
          </table:table-cell>
          <table:table-cell table:style-name="Tableau8.A1" office:value-type="string">
            <text:p text:style-name="P144"><text:span text:style-name="T62">Voyant LED 5V - </text:span><text:span text:style-name="T63">VE5VCR</text:span></text:p>
          </table:table-cell>
          <table:table-cell table:style-name="Tableau8.A1" office:value-type="string">
            <text:p text:style-name="P144"><text:span text:style-name="T62">ELMARK Voyant LED Rouge 24V AC/DC - </text:span><text:span text:style-name="T64">EM401424</text:span></text:p>
          </table:table-cell>
          <table:table-cell table:style-name="Tableau8.D1" office:value-type="string">
            <text:p text:style-name="P144"><text:span text:style-name="T62">Voyant monobloc à LED IMO 24VAC/DC - </text:span><text:span text:style-name="T65">LMB-24-WHI</text:span></text:p>
          </table:table-cell>
        </table:table-row>
        <table:table-row>
          <table:table-cell table:style-name="Tableau8.A2" office:value-type="string">
            <text:p text:style-name="P145">Type</text:p>
          </table:table-cell>
          <table:table-cell table:style-name="Tableau8.A2" office:value-type="string">
            <text:p text:style-name="P145">LED simple 5V</text:p>
          </table:table-cell>
          <table:table-cell table:style-name="Tableau8.A2" office:value-type="string">
            <text:p text:style-name="P145">Voyant industriel 24V</text:p>
          </table:table-cell>
          <table:table-cell table:style-name="Tableau8.D2" office:value-type="string">
            <text:p text:style-name="P144"><text:span text:style-name="T62">Voyant industriel </text:span>Ø22 mm</text:p>
          </table:table-cell>
        </table:table-row>
        <table:table-row>
          <table:table-cell table:style-name="Tableau8.A2" office:value-type="string">
            <text:p text:style-name="P145">Prix </text:p>
          </table:table-cell>
          <table:table-cell table:style-name="Tableau8.A2" office:value-type="string">
            <text:p text:style-name="P145"><text:span text:style-name="T66">2,93</text:span>€ </text:p>
          </table:table-cell>
          <table:table-cell table:style-name="Tableau8.A2" office:value-type="string">
            <text:p text:style-name="P145">2,99€</text:p>
          </table:table-cell>
          <table:table-cell table:style-name="Tableau8.D2" office:value-type="string">
            <text:p text:style-name="P145">7,07€</text:p>
          </table:table-cell>
        </table:table-row>
        <table:table-row>
          <table:table-cell table:style-name="Tableau8.A2" office:value-type="string">
            <text:p text:style-name="P145">Compatibilité RaspBerry Pi</text:p>
          </table:table-cell>
          <table:table-cell table:style-name="Tableau8.A2" office:value-type="string">
            <text:p text:style-name="P145">Directe via GPIO </text:p>
          </table:table-cell>
          <table:table-cell table:style-name="Tableau8.A2" office:value-type="string">
            <text:p text:style-name="P145">Nécessite transistor/relais</text:p>
          </table:table-cell>
          <table:table-cell table:style-name="Tableau8.D2" office:value-type="string">
            <text:p text:style-name="P145">Nécessite transistor/relais</text:p>
          </table:table-cell>
        </table:table-row>
        <table:table-row>
          <table:table-cell table:style-name="Tableau8.A2" office:value-type="string">
            <text:p text:style-name="P145">Facilité d’installation</text:p>
          </table:table-cell>
          <table:table-cell table:style-name="Tableau8.A2" office:value-type="string">
            <text:p text:style-name="P145">Très simple</text:p>
          </table:table-cell>
          <table:table-cell table:style-name="Tableau8.A2" office:value-type="string">
            <text:p text:style-name="P145">Moyenne</text:p>
          </table:table-cell>
          <table:table-cell table:style-name="Tableau8.D2" office:value-type="string">
            <text:p text:style-name="P145">Moyenne</text:p>
          </table:table-cell>
        </table:table-row>
        <table:table-row>
          <table:table-cell table:style-name="Tableau8.A2" office:value-type="string">
            <text:p text:style-name="P146">Intensité lumineuse</text:p>
          </table:table-cell>
          <table:table-cell table:style-name="Tableau8.A2" office:value-type="string">
            <text:p text:style-name="P145">30mcd</text:p>
          </table:table-cell>
          <table:table-cell table:style-name="Tableau8.A2" office:value-type="string">
            <text:p text:style-name="P145">1000-2000mcd</text:p>
          </table:table-cell>
          <table:table-cell table:style-name="Tableau8.D2" office:value-type="string">
            <text:p text:style-name="P145">2000-3000mcd</text:p>
          </table:table-cell>
        </table:table-row>
        <table:table-row>
          <table:table-cell table:style-name="Tableau8.A2" office:value-type="string">
            <text:p text:style-name="P145">Robustesse</text:p>
          </table:table-cell>
          <table:table-cell table:style-name="Tableau8.A2" office:value-type="string">
            <text:p text:style-name="P145">Standard</text:p>
          </table:table-cell>
          <table:table-cell table:style-name="Tableau8.A2" office:value-type="string">
            <text:p text:style-name="P145"><text:span text:style-name="T66">Industrielle</text:span> </text:p>
          </table:table-cell>
          <table:table-cell table:style-name="Tableau8.D2" office:value-type="string">
            <text:p text:style-name="P146">Industrielle</text:p>
          </table:table-cell>
        </table:table-row>
        <table:table-row>
          <table:table-cell table:style-name="Tableau8.A2" office:value-type="string">
            <text:p text:style-name="P145">Consommation</text:p>
          </table:table-cell>
          <table:table-cell table:style-name="Tableau8.A2" office:value-type="string">
            <text:p text:style-name="P145">Environ 13mA</text:p>
          </table:table-cell>
          <table:table-cell table:style-name="Tableau8.A2" office:value-type="string">
            <text:p text:style-name="P145">Environ 15-20mA</text:p>
          </table:table-cell>
          <table:table-cell table:style-name="Tableau8.D2" office:value-type="string">
            <text:p text:style-name="Table_20_Contents"><text:s/><text:span text:style-name="T62">Environ 20mA</text:span></text:p>
          </table:table-cell>
        </table:table-row>
        <table:table-row>
          <table:table-cell table:style-name="Tableau8.A2" office:value-type="string">
            <text:p text:style-name="P145">Adapté environnement agricole</text:p>
          </table:table-cell>
          <table:table-cell table:style-name="Tableau8.A2" office:value-type="string">
            <text:p text:style-name="P145">Moyen</text:p>
          </table:table-cell>
          <table:table-cell table:style-name="Tableau8.A2" office:value-type="string">
            <text:p text:style-name="P145">Oui</text:p>
          </table:table-cell>
          <table:table-cell table:style-name="Tableau8.D2" office:value-type="string">
            <text:p text:style-name="P145">Oui</text:p>
          </table:table-cell>
        </table:table-row>
        <table:table-row>
          <table:table-cell table:style-name="Tableau8.A2" office:value-type="string">
            <text:p text:style-name="P146">Résistance vibrations/poussières</text:p>
          </table:table-cell>
          <table:table-cell table:style-name="Tableau8.A2" office:value-type="string">
            <text:p text:style-name="P146">Moyenne</text:p>
          </table:table-cell>
          <table:table-cell table:style-name="Tableau8.A2" office:value-type="string">
            <text:p text:style-name="P146">Bonne</text:p>
          </table:table-cell>
          <table:table-cell table:style-name="Tableau8.D2" office:value-type="string">
            <text:p text:style-name="P146">Bonne </text:p>
          </table:table-cell>
        </table:table-row>
        <table:table-row>
          <table:table-cell table:style-name="Tableau8.A2" office:value-type="string">
            <text:p text:style-name="P146">Durée de vie estimée</text:p>
          </table:table-cell>
          <table:table-cell table:style-name="Tableau8.A2" office:value-type="string">
            <text:p text:style-name="P146">50 000h</text:p>
          </table:table-cell>
          <table:table-cell table:style-name="Tableau8.A2" office:value-type="string">
            <text:p text:style-name="P146">50 000h</text:p>
          </table:table-cell>
          <table:table-cell table:style-name="Tableau8.D2" office:value-type="string">
            <text:p text:style-name="P146">50 000h</text:p>
          </table:table-cell>
        </table:table-row>
      </table:table>
      <text:p text:style-name="P135"/>
      <text:p text:style-name="P147">mcd = millicandela</text:p>
      <text:p text:style-name="P135"/>
      <text:p text:style-name="P148">Choix final :</text:p>
      <text:p text:style-name="P149"><text:span text:style-name="T62">ELMARK Voyant LED Rouge 24V AC/DC - </text:span><text:span text:style-name="T64">EM401424</text:span></text:p>
      <text:p text:style-name="P148"/>
      <text:p text:style-name="P148">Car :</text:p>
      <text:p text:style-name="P148">• Seulement 2,99€</text:p>
      <text:p text:style-name="P148">• Beaucoup plus visible que la LED 5V</text:p>
      <text:p text:style-name="P148">• Adapté milieu agricole</text:p>
      <text:p text:style-name="P148">• coût très faible par rapport aux performances</text:p>
      <text:p text:style-name="P148"/>
      <text:p text:style-name="P148">Cependant, le lycée avait déjà des voyants lumineux en stock donc je vais utiliser pour ce projet <text:span text:style-name="T67">celui</text:span> fournit par le lycé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modern" style:font-pitch="fixed"/>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wiss 721 SWA" svg:font-family="'Swiss 721 SWA'"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53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itre_20_1" style:display-name="Titre 1" style:family="paragraph" style:parent-style-name="Standard" style:next-style-name="Standard" style:default-outline-level="1">
      <style:paragraph-properties fo:margin-top="0.706cm" fo:margin-bottom="0.353cm" style:contextual-spacing="false" fo:hyphenation-ladder-count="no-limit" fo:hyphenation-keep="auto" loext:hyphenation-keep-type="column" loext:hyphenation-keep-line="false" fo:padding-left="0cm" fo:padding-right="0cm" fo:padding-top="0cm" fo:padding-bottom="0.035cm" fo:border-left="none" fo:border-right="none" fo:border-top="none" fo:border-bottom="0.74pt solid #2e75b6" style:shadow="none"/>
      <style:text-properties fo:color="#1f4e79" loext:opacity="100%"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size-complex="16pt" style:font-weight-complex="bold" fo:hyphenate="false" loext:hyphenation-no-caps="false" loext:hyphenation-no-last-word="false" loext:hyphenation-word-char-count="no-limit" loext:hyphenation-zone="no-limit"/>
    </style:style>
    <style:style style:name="Titre_20_2" style:display-name="Titre 2" style:family="paragraph" style:parent-style-name="Standard" style:next-style-name="Standard" style:default-outline-level="2">
      <style:paragraph-properties fo:margin-top="0.353cm" fo:margin-bottom="0.212cm" style:contextual-spacing="false" fo:hyphenation-ladder-count="no-limit" fo:hyphenation-keep="auto" loext:hyphenation-keep-type="column" loext:hyphenation-keep-line="false"/>
      <style:text-properties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fo:hyphenate="false" loext:hyphenation-no-caps="false" loext:hyphenation-no-last-word="false" loext:hyphenation-word-char-count="no-limit" loext:hyphenation-zone="no-limit"/>
    </style:style>
    <style:style style:name="Titre_20_3" style:display-name="Titre 3" style:family="paragraph" style:parent-style-name="Standard" style:next-style-name="Standard" style:default-outline-level="3">
      <style:paragraph-properties fo:margin-top="0.212cm" fo:margin-bottom="0.212cm" style:contextual-spacing="false" fo:line-height="112%" fo:hyphenation-ladder-count="no-limit" fo:hyphenation-keep="auto" loext:hyphenation-keep-type="column" loext:hyphenation-keep-line="false"/>
      <style:text-properties style:font-name="Cambria" fo:font-family="Cambria" style:font-family-generic="roman" style:font-pitch="variable" fo:font-weight="bold" style:font-name-asian="Cambria" style:font-family-asian="Cambria" style:font-family-generic-asian="roman" style:font-pitch-asian="variable" style:font-weight-asian="bold" style:font-name-complex="Cambria" style:font-family-complex="Cambria" style:font-family-generic-complex="roman"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exte1" style:family="paragraph" style:parent-style-name="Standard">
      <style:paragraph-properties fo:margin-left="4.001cm" fo:margin-right="1cm" fo:margin-top="0.212cm" fo:margin-bottom="0cm" style:contextual-spacing="false" fo:hyphenation-ladder-count="no-limit" fo:hyphenation-keep="auto" loext:hyphenation-keep-type="column" loext:hyphenation-keep-line="false">
        <style:tab-stops/>
      </style:paragraph-properties>
      <style:text-properties style:font-name="Swiss 721 SWA" fo:font-family="'Swiss 721 SWA'" style:font-family-generic="roman" style:font-pitch="variable" style:font-name-asian="Swiss 721 SWA" style:font-family-asian="'Swiss 721 SWA'" style:font-family-generic-asian="roman" style:font-pitch-asian="variable" style:font-name-complex="Swiss 721 SWA" style:font-family-complex="'Swiss 721 SWA'"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and_20_Footer">
      <style:paragraph-properties fo:hyphenation-ladder-count="no-limit" fo:hyphenation-keep="auto" loext:hyphenation-keep-type="column" loext:hyphenation-keep-line="false">
        <style:tab-stops>
          <style:tab-stop style:position="8.453cm" style:type="center"/>
          <style:tab-stop style:position="16.907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ext_20_body_20_indent" style:display-name="Text body indent" style:family="paragraph" style:parent-style-name="Standard" style:class="text">
      <style:paragraph-properties fo:hyphenation-ladder-count="no-limit" fo:hyphenation-keep="auto" loext:hyphenation-keep-type="column" loext:hyphenation-keep-line="false"/>
      <style:text-properties fo:color="#ff0000" loext:opacity="100%" fo:font-style="italic" style:text-underline-style="solid" style:text-underline-width="auto" style:text-underline-color="font-color" fo:font-weight="bold" style:text-underline-mode="continuous" style:text-overline-mode="continuous" style:text-line-through-mode="continuous" style:font-style-asian="italic" style:font-weight-asian="bold" fo:hyphenate="false" loext:hyphenation-no-caps="false" loext:hyphenation-no-last-word="false" loext:hyphenation-word-char-count="no-limit" loext:hyphenation-zone="no-limit"/>
    </style:style>
    <style:style style:name="Marginalia" style:family="paragraph" style:parent-style-name="Standard"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aragraphe_20_de_20_liste" style:display-name="Paragraphe de liste"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hyphenation-keep="auto" loext:hyphenation-keep-type="column" loext:hyphenation-keep-line="false"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paragraph-properties fo:text-align="start" style:justify-single-word="false" fo:orphans="2" fo:widows="2" fo:hyphenation-ladder-count="no-limit" fo:hyphenation-keep="auto" loext:hyphenation-keep-type="column" loext:hyphenation-keep-line="false" style:vertical-align="baseline"/>
      <style:text-properties style:font-name="Cambria" fo:font-family="Cambria" style:font-family-generic="roman" style:font-pitch="variable" fo:font-size="11pt" fo:language="en" fo:country="US" style:font-name-asian="MS Mincho" style:font-family-asian="'MS Mincho'" style:font-family-generic-asian="modern" style:font-pitch-asian="fixed" style:font-size-asian="11pt" style:language-asian="en" style:country-asian="US" style:font-name-complex="Arial"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lice_20_par_20_défaut" style:display-name="Police par défaut" style:family="text"/>
    <style:style style:name="ListLabel_20_37" style:display-name="ListLabel 37"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text-properties style:font-name-complex="Wingdings" style:font-family-complex="Wingdings" style:font-family-generic-complex="system" style:font-pitch-complex="variable" style:font-charset-complex="x-symbol"/>
    </style:style>
    <style:style style:name="ListLabel_20_40" style:display-name="ListLabel 40"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Wingdings" style:font-family-complex="Wingdings" style:font-family-generic-complex="system" style:font-pitch-complex="variable" style:font-charset-complex="x-symbol"/>
    </style:style>
    <style:style style:name="ListLabel_20_43" style:display-name="ListLabel 43"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Wingdings" style:font-family-complex="Wingdings" style:font-family-generic-complex="system" style:font-pitch-complex="variable" style:font-charset-complex="x-symbol"/>
    </style:style>
    <style:style style:name="ListLabel_20_19" style:display-name="ListLabel 19"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style:font-name-complex="Wingdings" style:font-family-complex="Wingdings" style:font-family-generic-complex="system" style:font-pitch-complex="variable" style:font-charset-complex="x-symbol"/>
    </style:style>
    <style:style style:name="ListLabel_20_22" style:display-name="ListLabel 22"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Wingdings" style:font-family-complex="Wingdings" style:font-family-generic-complex="system" style:font-pitch-complex="variable" style:font-charset-complex="x-symbol"/>
    </style:style>
    <style:style style:name="ListLabel_20_25" style:display-name="ListLabel 25"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Wingdings" style:font-family-complex="Wingdings" style:font-family-generic-complex="system" style:font-pitch-complex="variable" style:font-charset-complex="x-symbol"/>
    </style:style>
    <style:style style:name="ListLabel_20_28" style:display-name="ListLabel 28"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Wingdings" style:font-family-complex="Wingdings" style:font-family-generic-complex="system" style:font-pitch-complex="variable" style:font-charset-complex="x-symbol"/>
    </style:style>
    <style:style style:name="ListLabel_20_31" style:display-name="ListLabel 31"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Wingdings" style:font-family-complex="Wingdings" style:font-family-generic-complex="system" style:font-pitch-complex="variable" style:font-charset-complex="x-symbol"/>
    </style:style>
    <style:style style:name="ListLabel_20_34" style:display-name="ListLabel 34" style:family="text">
      <style:text-properties style:font-name="Calibri" fo:font-family="Calibri" style:font-family-generic="swiss"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complex="Wingdings" style:font-family-complex="Wingdings"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0" style:display-name="ListLabel 10"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mplex="Courier New" style:font-family-complex="'Courier New'" style:font-family-generic-complex="modern" style:font-pitch-complex="fixed"/>
    </style:style>
    <style:style style:name="WW_5f_CharLFO1LVL3" style:display-name="WW_CharLFO1LVL3" style:family="text">
      <style:text-properties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mplex="Courier New" style:font-family-complex="'Courier New'" style:font-family-generic-complex="modern" style:font-pitch-complex="fixed"/>
    </style:style>
    <style:style style:name="WW_5f_CharLFO1LVL6" style:display-name="WW_CharLFO1LVL6" style:family="text">
      <style:text-properties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mplex="Courier New" style:font-family-complex="'Courier New'" style:font-family-generic-complex="modern" style:font-pitch-complex="fixed"/>
    </style:style>
    <style:style style:name="WW_5f_CharLFO1LVL9" style:display-name="WW_CharLFO1LVL9" style:family="text">
      <style:text-properties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mplex="Courier New" style:font-family-complex="'Courier New'" style:font-family-generic-complex="modern" style:font-pitch-complex="fixed"/>
    </style:style>
    <style:style style:name="WW_5f_CharLFO2LVL3" style:display-name="WW_CharLFO2LVL3" style:family="text">
      <style:text-properties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mplex="Courier New" style:font-family-complex="'Courier New'" style:font-family-generic-complex="modern" style:font-pitch-complex="fixed"/>
    </style:style>
    <style:style style:name="WW_5f_CharLFO2LVL6" style:display-name="WW_CharLFO2LVL6" style:family="text">
      <style:text-properties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mplex="Courier New" style:font-family-complex="'Courier New'" style:font-family-generic-complex="modern" style:font-pitch-complex="fixed"/>
    </style:style>
    <style:style style:name="WW_5f_CharLFO2LVL9" style:display-name="WW_CharLFO2LVL9" style:family="text">
      <style:text-properties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mplex="Courier New" style:font-family-complex="'Courier New'" style:font-family-generic-complex="modern" style:font-pitch-complex="fixed"/>
    </style:style>
    <style:style style:name="WW_5f_CharLFO3LVL3" style:display-name="WW_CharLFO3LVL3" style:family="text">
      <style:text-properties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mplex="Courier New" style:font-family-complex="'Courier New'" style:font-family-generic-complex="modern" style:font-pitch-complex="fixed"/>
    </style:style>
    <style:style style:name="WW_5f_CharLFO3LVL6" style:display-name="WW_CharLFO3LVL6" style:family="text">
      <style:text-properties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Calibri" fo:font-family="Calibri" style:font-family-generic="swiss" style:font-pitch="variable"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mplex="Courier New" style:font-family-complex="'Courier New'" style:font-family-generic-complex="modern" style:font-pitch-complex="fixed"/>
    </style:style>
    <style:style style:name="WW_5f_CharLFO3LVL9" style:display-name="WW_CharLFO3LVL9" style:family="text">
      <style:text-properties style:font-name-complex="Wingdings" style:font-family-complex="Wingdings" style:font-family-generic-complex="system" style:font-pitch-complex="variable" style:font-charset-complex="x-symbol"/>
    </style:style>
    <style:style style:name="Titre_20_2_20_Car" style:display-name="Titre 2 Car" style:family="text" style:parent-style-name="Police_20_par_20_défaut">
      <style:text-properties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Default_20_Paragraph_20_Font" style:display-name="Default Paragraph Font" style:family="text"/>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WW_5f_CharLFO1LVL1" loext:num-list-format="%1%" text:bullet-char="">
        <style:list-level-properties text:list-level-position-and-space-mode="label-alignment">
          <style:list-level-label-alignment text:label-followed-by="listtab" fo:text-indent="-0.635cm" fo:margin-left="1.97cm"/>
        </style:list-level-properties>
        <style:text-properties style:font-name="Calibri"/>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3.24cm"/>
        </style:list-level-properties>
        <style:text-properties style:font-name="Times New Roman"/>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4.51cm"/>
        </style:list-level-properties>
        <style:text-properties style:font-name="Times New Roman"/>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78cm"/>
        </style:list-level-properties>
        <style:text-properties style:font-name="Calibri"/>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7.05cm"/>
        </style:list-level-properties>
        <style:text-properties style:font-name="Times New Roman"/>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8.32cm"/>
        </style:list-level-properties>
        <style:text-properties style:font-name="Times New Roman"/>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9.59cm"/>
        </style:list-level-properties>
        <style:text-properties style:font-name="Calibri"/>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86cm"/>
        </style:list-level-properties>
        <style:text-properties style:font-name="Times New Roman"/>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2.1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2LVL1" loext:num-list-format="%1%" text:bullet-char="">
        <style:list-level-properties text:list-level-position-and-space-mode="label-alignment">
          <style:list-level-label-alignment text:label-followed-by="listtab" fo:text-indent="-0.635cm" fo:margin-left="1.769cm"/>
        </style:list-level-properties>
        <style:text-properties style:font-name="Calibri"/>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039cm"/>
        </style:list-level-properties>
        <style:text-properties style:font-name="Times New Roman"/>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4.309cm"/>
        </style:list-level-properties>
        <style:text-properties style:font-name="Times New Roman"/>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579cm"/>
        </style:list-level-properties>
        <style:text-properties style:font-name="Calibri"/>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849cm"/>
        </style:list-level-properties>
        <style:text-properties style:font-name="Times New Roman"/>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8.119cm"/>
        </style:list-level-properties>
        <style:text-properties style:font-name="Times New Roman"/>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9.389cm"/>
        </style:list-level-properties>
        <style:text-properties style:font-name="Calibri"/>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659cm"/>
        </style:list-level-properties>
        <style:text-properties style:font-name="Times New Roman"/>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929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3LVL1" loext:num-list-format="%1%" text:bullet-char="">
        <style:list-level-properties text:list-level-position-and-space-mode="label-alignment">
          <style:list-level-label-alignment text:label-followed-by="listtab" fo:text-indent="-0.635cm" fo:margin-left="1.97cm"/>
        </style:list-level-properties>
        <style:text-properties style:font-name="Calibri"/>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24cm"/>
        </style:list-level-properties>
        <style:text-properties style:font-name="Times New Roman"/>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4.51cm"/>
        </style:list-level-properties>
        <style:text-properties style:font-name="Times New Roman"/>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78cm"/>
        </style:list-level-properties>
        <style:text-properties style:font-name="Calibri"/>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7.05cm"/>
        </style:list-level-properties>
        <style:text-properties style:font-name="Times New Roman"/>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8.32cm"/>
        </style:list-level-properties>
        <style:text-properties style:font-name="Times New Roman"/>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9.59cm"/>
        </style:list-level-properties>
        <style:text-properties style:font-name="Calibri"/>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86cm"/>
        </style:list-level-properties>
        <style:text-properties style:font-name="Times New Roman"/>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2.1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17.383cm" fo:margin-left="-0.397cm" table:align="left"/>
    </style:style>
    <style:style style:name="Tableau1.A" style:family="table-column">
      <style:table-column-properties style:column-width="5.741cm"/>
    </style:style>
    <style:style style:name="Tableau1.C" style:family="table-column">
      <style:table-column-properties style:column-width="5.9cm"/>
    </style:style>
    <style:style style:name="Tableau1.1" style:family="table-row">
      <style:table-row-properties style:min-row-height="0.397cm" style:use-optimal-row-height="false"/>
    </style:style>
    <style:style style:name="Tableau1.A1" style:family="table-cell">
      <style:table-cell-properties fo:padding-left="0.191cm" fo:padding-right="0.191cm" fo:padding-top="0cm" fo:padding-bottom="0cm" fo:border-left="none" fo:border-right="none" fo:border-top="none" fo:border-bottom="0.5pt solid #000000" style:writing-mode="lr-tb"/>
    </style:style>
    <style:style style:name="Tableau2" style:family="table">
      <style:table-properties style:width="17.002cm" table:align="center"/>
    </style:style>
    <style:style style:name="Tableau2.A" style:family="table-column">
      <style:table-column-properties style:column-width="6.615cm"/>
    </style:style>
    <style:style style:name="Tableau2.B" style:family="table-column">
      <style:table-column-properties style:column-width="3.794cm"/>
    </style:style>
    <style:style style:name="Tableau2.C" style:family="table-column">
      <style:table-column-properties style:column-width="6.593cm"/>
    </style:style>
    <style:style style:name="Tableau2.1" style:family="table-row">
      <style:table-row-properties style:min-row-height="0.501cm" style:use-optimal-row-height="false"/>
    </style:style>
    <style:style style:name="Tableau2.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MP1" style:family="paragraph" style:parent-style-name="Standard">
      <style:text-properties style:font-name="Calibri" fo:font-size="11pt" style:font-size-asian="11pt" style:font-size-complex="11pt"/>
    </style:style>
    <style:style style:name="MP2" style:family="paragraph" style:parent-style-name="Standard">
      <style:paragraph-properties fo:text-align="center" style:justify-single-word="false"/>
      <style:text-properties style:font-name="Calibri" fo:font-size="11pt" style:font-size-asian="11pt" style:font-size-complex="11pt"/>
    </style:style>
    <style:style style:name="MP3" style:family="paragraph" style:parent-style-name="Standard">
      <style:paragraph-properties fo:text-align="end" style:justify-single-word="false"/>
      <style:text-properties style:font-name="Calibri" fo:font-size="11pt" style:font-size-asian="11pt" style:font-size-complex="11pt"/>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fo:font-weight="bold" style:font-weight-asian="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0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MP1">Académies de Besançon et Dijon</text:p>
            </table:table-cell>
            <table:table-cell table:style-name="Tableau1.A1" office:value-type="string">
              <text:p text:style-name="MP2">BTS CIEL option A</text:p>
            </table:table-cell>
            <table:table-cell table:style-name="Tableau1.A1" office:value-type="string">
              <text:p text:style-name="MP3">Session 2026</text:p>
            </table:table-cell>
          </table:table-row>
        </table:table>
        <text:p text:style-name="Standard"/>
      </style:header>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Standard">Lycée Gustave Eiffel</text:p>
            </table:table-cell>
            <table:table-cell table:style-name="Tableau2.A1" office:value-type="string">
              <text:p text:style-name="MP4">Page <text:span text:style-name="Police_20_par_20_défaut"><text:span text:style-name="MT1"><text:page-number text:select-page="current">33</text:page-number></text:span></text:span><text:s/>sur <text:span text:style-name="Police_20_par_20_défaut"><text:span text:style-name="MT1"><text:page-count>35</text:page-count></text:span></text:span></text:p>
            </table:table-cell>
            <table:table-cell table:style-name="Tableau2.A1" office:value-type="string">
              <text:p text:style-name="MP5">Sechoir a houblon</text:p>
            </table:table-cell>
          </table:table-row>
        </table:table>
        <text:p text:style-name="Standard"/>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meta:creation-date>2026-04-03T09:15:00Z</meta:creation-date>
    <dc:date>2026-05-11T20:18:18.522309800</dc:date>
    <meta:editing-cycles>495</meta:editing-cycles>
    <meta:editing-duration>PT8H8M36S</meta:editing-duration>
    <meta:print-date>2026-05-07T15:47:43.868903600</meta:print-date>
    <meta:printed-by>Fichiers PDF</meta:printed-by>
    <meta:document-statistic meta:table-count="8" meta:image-count="17" meta:object-count="0" meta:page-count="35" meta:paragraph-count="681" meta:word-count="8142" meta:character-count="52561" meta:non-whitespace-character-count="44835"/>
    <meta:template xlink:type="simple" xlink:actuate="onRequest" xlink:title="" xlink:href="Normal.dotm"/>
  </office:meta>
</office:document-meta>
</file>