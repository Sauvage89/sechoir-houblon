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5000002A7F6C5C2CD.png" manifest:media-type="image/png"/>
  <manifest:file-entry manifest:full-path="Pictures/10000000000002C700000255FBB98AD2.png" manifest:media-type="image/png"/>
  <manifest:file-entry manifest:full-path="Pictures/10000000000005DD00000305FF240FF1.png" manifest:media-type="image/png"/>
  <manifest:file-entry manifest:full-path="Pictures/100000000000034E000001B9CB299582.png" manifest:media-type="image/png"/>
  <manifest:file-entry manifest:full-path="Pictures/10000000000002B300000309D585006B.png" manifest:media-type="image/png"/>
  <manifest:file-entry manifest:full-path="Pictures/1000000000000211000001FA72AC28BB.png" manifest:media-type="image/png"/>
  <manifest:file-entry manifest:full-path="Pictures/10000001000003F7000002BCC03EE852.png" manifest:media-type="image/png"/>
  <manifest:file-entry manifest:full-path="Pictures/10000000000001CA000001CA1515B11A.png" manifest:media-type="image/png"/>
  <manifest:file-entry manifest:full-path="Pictures/10000000000006D50000023453A19DD6.png" manifest:media-type="image/png"/>
  <manifest:file-entry manifest:full-path="Pictures/100000000000012C0000012CA7B4D2E3.png" manifest:media-type="image/png"/>
  <manifest:file-entry manifest:full-path="Pictures/100000000000020300000126BA6A0B0B.png" manifest:media-type="image/png"/>
  <manifest:file-entry manifest:full-path="Pictures/100000000000010E000000B4D058DA82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1000001F400000139AB32F5E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335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003cm" fo:padding-top="0.175cm" fo:padding-bottom="0.175cm" fo:padding-left="0.3cm" fo:padding-right="0.3cm" loext:decorative="false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solid" draw:fill-color="#dddddd"/>
      <style:text-properties fo:font-size="18pt"/>
    </style:style>
    <style:style style:name="P9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3" style:family="paragraph">
      <style:text-properties fo:font-size="28pt" fo:background-color="#000000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fo:background-color="#000000" style:font-size-asian="28pt" style:font-size-complex="28pt"/>
    </style:style>
    <style:style style:name="T11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échoir à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e houblon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17.5cm" svg:height="3.473cm" svg:x="4.5cm" svg:y="0.027cm" presentation:class="title" presentation:user-transformed="true">
          <draw:text-box>
            <text:p>Cycle de séchage</text:p>
          </draw:text-box>
        </draw:frame>
        <draw:frame draw:style-name="gr6" draw:text-style-name="P7" draw:layer="layout" svg:width="7cm" svg:height="1.5cm" svg:x="2.5cm" svg:y="4cm">
          <draw:text-box>
            <text:p><text:span text:style-name="T6">Mécanique</text:span></text:p>
          </draw:text-box>
        </draw:frame>
        <draw:frame draw:style-name="gr2" draw:text-style-name="P3" draw:layer="layout" svg:width="14cm" svg:height="11.755cm" svg:x="12cm" svg:y="3.5cm">
          <draw:image xlink:href="Pictures/10000000000002C700000255FBB98A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17.5cm" svg:height="3.473cm" svg:x="4.5cm" svg:y="0.027cm" presentation:class="title" presentation:user-transformed="true">
          <draw:text-box>
            <text:p>Cycle de séchage</text:p>
          </draw:text-box>
        </draw:frame>
        <draw:frame draw:style-name="gr6" draw:text-style-name="P7" draw:layer="layout" svg:width="7cm" svg:height="1.5cm" svg:x="2.5cm" svg:y="4cm">
          <draw:text-box>
            <text:p><text:span text:style-name="T6">Informatique</text:span></text:p>
          </draw:text-box>
        </draw:frame>
        <draw:frame draw:style-name="gr2" draw:text-style-name="P3" draw:layer="layout" svg:width="25.275cm" svg:height="9.902cm" svg:x="1.5cm" svg:y="5.098cm">
          <draw:image xlink:href="Pictures/10000000000006C5000002A7F6C5C2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7" draw:text-style-name="P8" draw:layer="layout" svg:width="9.5cm" svg:height="5.685cm" svg:x="3.5cm" svg:y="5.093cm">
          <draw:text-box>
            <text:p><text:span text:style-name="T7">Objectif</text:span></text:p>
            <text:p><text:span text:style-name="T8"/></text:p>
            <text:list text:style-name="L1">
              <text:list-item>
                <text:p text:style-name="P1"><text:span text:style-name="T9">Contrôler le séchoir via une application web</text:span></text:p>
              </text:list-item>
              <text:list-item>
                <text:p text:style-name="P1"><text:span text:style-name="T9">Sauvegarder les données d’une session de séchage de houbl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6.199cm" svg:y="0.628cm" presentation:class="title" presentation:user-transformed="true">
          <draw:text-box>
            <text:p>Synoptique</text:p>
          </draw:text-box>
        </draw:frame>
        <draw:frame draw:style-name="gr2" draw:text-style-name="P3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111cm" svg:height="14.559cm" svg:x="1cm" svg:y="0.5cm">
          <draw:image xlink:href="Pictures/10000001000003F7000002BCC03EE852.png" xlink:type="simple" xlink:show="embed" xlink:actuate="onLoad" draw:mime-type="image/png">
            <text:p/>
          </draw:image>
        </draw:frame>
        <draw:frame draw:style-name="gr8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9" draw:text-style-name="P9" draw:layer="layout" svg:width="7cm" svg:height="4.655cm" svg:x="19.5cm" svg:y="0.845cm">
          <draw:text-box>
            <text:p><text:span text:style-name="T10">Diagramme de cas <text:s/>d’utilisation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9.028cm" svg:x="0.001cm" svg:y="2.972cm">
          <draw:image xlink:href="Pictures/10000000000006D50000023453A19DD6.png" xlink:type="simple" xlink:show="embed" xlink:actuate="onLoad" draw:mime-type="image/png">
            <text:p/>
          </draw:image>
        </draw:frame>
        <draw:frame draw:style-name="gr10" draw:text-style-name="P9" draw:layer="layout" svg:width="9.5cm" svg:height="3.554cm" svg:x="13cm" svg:y="1.446cm">
          <draw:text-box>
            <text:p><text:span text:style-name="T10">Diagramme d’exigences</text:span></text:p>
            <text:p><text:span text:style-name="T10"/></text:p>
          </draw:text-box>
        </draw:frame>
        <draw:frame draw:style-name="gr11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12" draw:text-style-name="P8" draw:layer="layout" svg:width="9cm" svg:height="3.195cm" svg:x="16cm" svg:y="6.805cm">
          <draw:text-box>
            <text:p><text:span text:style-name="T8">Raspberry Pi 3 B+</text:span></text:p>
            <text:p><text:span text:style-name="T8">6 capteurs de température</text:span></text:p>
            <text:p><text:span text:style-name="T8">Sirène</text:span></text:p>
            <text:p><text:span text:style-name="T8">Voyant</text:span></text:p>
          </draw:text-box>
        </draw:frame>
        <draw:frame draw:style-name="gr13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3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3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3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4" draw:text-style-name="P8" draw:layer="layout" svg:width="15.5cm" svg:height="5.353cm" svg:x="1.5cm" svg:y="6cm">
          <draw:text-box>
            <text:p><text:span text:style-name="T7">Logiciels</text:span></text:p>
            <text:p><text:span text:style-name="T6"/></text:p>
            <text:list text:style-name="L1">
              <text:list-item>
                <text:p><text:span text:style-name="T8">Apache2</text:span><text:span text:style-name="T8"><text:tab/></text:span><text:span text:style-name="T8"><text:tab/></text:span><text:span text:style-name="T8">(serveur web)</text:span></text:p>
              </text:list-item>
              <text:list-item>
                <text:p><text:span text:style-name="T8">Mysql</text:span><text:span text:style-name="T8"><text:tab/></text:span><text:span text:style-name="T8"><text:tab/></text:span><text:span text:style-name="T8"><text:tab/></text:span><text:span text:style-name="T8">(serveur base de donnée)</text:span></text:p>
              </text:list-item>
              <text:list-item>
                <text:p><text:span text:style-name="T8">Git</text:span></text:p>
              </text:list-item>
              <text:list-item>
                <text:p><text:span text:style-name="T8">Github</text:span></text:p>
              </text:list-item>
            </text:list>
          </draw:text-box>
        </draw:frame>
        <draw:frame draw:style-name="gr15" draw:text-style-name="P8" draw:layer="layout" svg:width="6cm" svg:height="6.353cm" svg:x="19.5cm" svg:y="5.647cm">
          <draw:text-box>
            <text:p><text:span text:style-name="T7">Langage</text:span></text:p>
            <text:p><text:span text:style-name="T6"/></text:p>
            <text:list text:style-name="L1">
              <text:list-item>
                <text:p><text:span text:style-name="T8">HTML</text:span></text:p>
              </text:list-item>
              <text:list-item>
                <text:p><text:span text:style-name="T8">CSS</text:span></text:p>
              </text:list-item>
              <text:list-item>
                <text:p text:style-name="P10"><text:span text:style-name="T8">PHP</text:span></text:p>
              </text:list-item>
              <text:list-item>
                <text:p><text:span text:style-name="T8">Javasript</text:span></text:p>
              </text:list-item>
              <text:list-item>
                <text:p><text:span text:style-name="T8">C</text:span></text:p>
              </text:list-item>
              <text:list-item>
                <text:p><text:span text:style-name="T8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thodes de travail commune</text:p>
          </draw:text-box>
        </draw:frame>
        <draw:frame draw:style-name="gr16" draw:text-style-name="P12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1"><text:span text:style-name="T11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3" draw:layer="layout" svg:width="9cm" svg:height="2.5cm" svg:x="-1cm" svg:y="0.5cm" presentation:class="title" presentation:user-transformed="true">
          <draw:text-box>
            <text:p><text:span text:style-name="T10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8.5.2$Windows_X86_64 LibreOffice_project/9c8b85f387cc00a89945a79c9e6239f32e450ac2</meta:generator>
    <dc:date>2026-05-06T13:37:01.163358600</dc:date>
    <meta:editing-duration>PT5H36M26S</meta:editing-duration>
    <meta:editing-cycles>356</meta:editing-cycles>
    <meta:document-statistic meta:object-count="86"/>
  </office:meta>
</office:document-meta>
</file>